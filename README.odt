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9">
      <style:paragraph-properties fo:margin-top="0in" fo:margin-bottom="0in"/>
    </style:style>
    <style:style style:name="P26" style:family="paragraph" style:parent-style-name="Text_20_body" style:list-style-name="L10">
      <style:paragraph-properties fo:margin-top="0in" fo:margin-bottom="0in"/>
    </style:style>
    <style:style style:name="P27" style:family="paragraph" style:parent-style-name="Text_20_body" style:list-style-name="L11">
      <style:paragraph-properties fo:margin-top="0in" fo:margin-bottom="0in"/>
    </style:style>
    <style:style style:name="P28" style:family="paragraph" style:parent-style-name="Text_20_body" style:list-style-name="L12">
      <style:paragraph-properties fo:margin-top="0in" fo:margin-bottom="0in"/>
    </style:style>
    <style:style style:name="P29" style:family="paragraph" style:parent-style-name="Preformatted_20_Text">
    </style:style>
    <style:style style:name="P30" style:family="paragraph" style:parent-style-name="Text_20_body" style:list-style-name="L13">
      <style:paragraph-properties fo:margin-top="0in" fo:margin-bottom="0in"/>
    </style:style>
    <style:style style:name="P31" style:family="paragraph" style:parent-style-name="Text_20_body" style:list-style-name="L14">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15">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16">
      <style:paragraph-properties fo:margin-top="0in" fo:margin-bottom="0in"/>
    </style:style>
    <style:style style:name="P45" style:family="paragraph" style:parent-style-name="Text_20_body" style:list-style-name="L17">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8">
      <style:paragraph-properties fo:margin-top="0in" fo:margin-bottom="0in"/>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19">
      <style:paragraph-properties fo:margin-top="0in" fo:margin-bottom="0in"/>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Text_20_body" style:list-style-name="L20">
      <style:paragraph-properties fo:margin-top="0in" fo:margin-bottom="0in"/>
    </style:style>
    <style:style style:name="P71" style:family="paragraph" style:parent-style-name="Text_20_body" style:list-style-name="L21">
      <style:paragraph-properties fo:margin-top="0in" fo:margin-bottom="0in"/>
    </style:style>
    <style:style style:name="P72" style:family="paragraph" style:parent-style-name="Text_20_body" style:list-style-name="L22">
      <style:paragraph-properties fo:margin-top="0in" fo:margin-bottom="0in"/>
    </style:style>
    <style:style style:name="P73" style:family="paragraph" style:parent-style-name="Text_20_body" style:list-style-name="L23">
      <style:paragraph-properties fo:margin-top="0in" fo:margin-bottom="0in"/>
    </style:style>
    <style:style style:name="P74" style:family="paragraph" style:parent-style-name="Text_20_body" style:list-style-name="L24">
      <style:paragraph-properties fo:margin-top="0in" fo:margin-bottom="0in"/>
    </style:style>
    <style:style style:name="P75" style:family="paragraph" style:parent-style-name="Text_20_body" style:list-style-name="L25">
      <style:paragraph-properties fo:margin-top="0in" fo:margin-bottom="0in"/>
    </style:style>
    <style:style style:name="P76" style:family="paragraph" style:parent-style-name="Preformatted_20_Text">
    </style:style>
    <style:style style:name="P77" style:family="paragraph" style:parent-style-name="Text_20_body" style:list-style-name="L26">
      <style:paragraph-properties fo:margin-top="0in" fo:margin-bottom="0in"/>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Text_20_body" style:list-style-name="L27">
      <style:paragraph-properties fo:margin-top="0in" fo:margin-bottom="0in"/>
    </style:style>
    <style:style style:name="P84" style:family="paragraph" style:parent-style-name="Text_20_body" style:list-style-name="L28">
      <style:paragraph-properties fo:margin-top="0in" fo:margin-bottom="0in"/>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29">
      <style:paragraph-properties fo:margin-top="0in" fo:margin-bottom="0in"/>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30">
      <style:paragraph-properties fo:margin-top="0in" fo:margin-bottom="0in"/>
    </style:style>
    <style:style style:name="P93" style:family="paragraph" style:parent-style-name="Preformatted_20_Text">
    </style:style>
    <style:style style:name="P94" style:family="paragraph" style:parent-style-name="Text_20_body" style:list-style-name="L31">
      <style:paragraph-properties fo:margin-top="0in" fo:margin-bottom="0in"/>
    </style:style>
    <style:style style:name="P95" style:family="paragraph" style:parent-style-name="Text_20_body" style:list-style-name="L32">
      <style:paragraph-properties fo:margin-top="0in" fo:margin-bottom="0in"/>
    </style:style>
    <style:style style:name="P96" style:family="paragraph" style:parent-style-name="Text_20_body" style:list-style-name="L33">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34">
      <style:paragraph-properties fo:margin-top="0in" fo:margin-bottom="0in"/>
    </style:style>
    <style:style style:name="P100" style:family="paragraph" style:parent-style-name="Text_20_body" style:list-style-name="L35">
      <style:paragraph-properties fo:margin-top="0in" fo:margin-bottom="0in"/>
    </style:style>
    <style:style style:name="P101" style:family="paragraph" style:parent-style-name="Text_20_body" style:list-style-name="L36">
      <style:paragraph-properties fo:margin-top="0in" fo:margin-bottom="0in"/>
    </style:style>
    <style:style style:name="P102" style:family="paragraph" style:parent-style-name="Text_20_body" style:list-style-name="L37">
      <style:paragraph-properties fo:margin-top="0in" fo:margin-bottom="0in"/>
    </style:style>
    <style:style style:name="P103" style:family="paragraph" style:parent-style-name="Text_20_body" style:list-style-name="L38">
      <style:paragraph-properties fo:margin-top="0in" fo:margin-bottom="0in"/>
    </style:style>
    <style:style style:name="P104" style:family="paragraph" style:parent-style-name="Text_20_body" style:list-style-name="L39">
      <style:paragraph-properties fo:margin-top="0in" fo:margin-bottom="0in"/>
    </style:style>
    <style:style style:name="P105" style:family="paragraph" style:parent-style-name="Text_20_body" style:list-style-name="L40">
      <style:paragraph-properties fo:margin-top="0in" fo:margin-bottom="0in"/>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41">
      <style:paragraph-properties fo:margin-top="0in" fo:margin-bottom="0in"/>
    </style:style>
    <style:style style:name="P109" style:family="paragraph" style:parent-style-name="Text_20_body" style:list-style-name="L42">
      <style:paragraph-properties fo:margin-top="0in" fo:margin-bottom="0in"/>
    </style:style>
    <style:style style:name="P110" style:family="paragraph" style:parent-style-name="Text_20_body" style:list-style-name="L43">
      <style:paragraph-properties fo:margin-top="0in" fo:margin-bottom="0in"/>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Text_20_body" style:list-style-name="L44">
      <style:paragraph-properties fo:margin-top="0in" fo:margin-bottom="0in"/>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45">
      <style:paragraph-properties fo:margin-top="0in" fo:margin-bottom="0in"/>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Text_20_body" style:list-style-name="L46">
      <style:paragraph-properties fo:margin-top="0in" fo:margin-bottom="0in"/>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Text_20_body" style:list-style-name="L4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48">
      <style:paragraph-properties fo:margin-top="0in" fo:margin-bottom="0in"/>
    </style:style>
    <style:style style:name="P140" style:family="paragraph" style:parent-style-name="Preformatted_20_Text">
    </style:style>
    <style:style style:name="P141" style:family="paragraph" style:parent-style-name="Preformatted_20_Text">
    </style:style>
    <style:style style:name="P142" style:family="paragraph" style:parent-style-name="Text_20_body" style:list-style-name="L49">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50">
      <style:paragraph-properties fo:margin-top="0in" fo:margin-bottom="0in"/>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51">
      <style:paragraph-properties fo:margin-top="0in" fo:margin-bottom="0in"/>
    </style:style>
    <style:style style:name="P153" style:family="paragraph" style:parent-style-name="Text_20_body" style:list-style-name="L52">
      <style:paragraph-properties fo:margin-top="0in" fo:margin-bottom="0in"/>
    </style:style>
    <style:style style:name="P154" style:family="paragraph" style:parent-style-name="Preformatted_20_Text">
    </style:style>
    <style:style style:name="P155" style:family="paragraph" style:parent-style-name="Preformatted_20_Text">
    </style:style>
    <style:style style:name="P156" style:family="paragraph" style:parent-style-name="Text_20_body" style:list-style-name="L53">
      <style:paragraph-properties fo:margin-top="0in" fo:margin-bottom="0in"/>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54">
      <style:paragraph-properties fo:margin-top="0in" fo:margin-bottom="0in"/>
    </style:style>
    <style:style style:name="P162" style:family="paragraph" style:parent-style-name="Preformatted_20_Text">
    </style:style>
    <style:style style:name="P163" style:family="paragraph" style:parent-style-name="Preformatted_20_Text">
    </style:style>
    <style:style style:name="P164" style:family="paragraph" style:parent-style-name="Text_20_body" style:list-style-name="L55">
      <style:paragraph-properties fo:margin-top="0in" fo:margin-bottom="0in"/>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56">
      <style:paragraph-properties fo:margin-top="0in" fo:margin-bottom="0in"/>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Text_20_body" style:list-style-name="L57">
      <style:paragraph-properties fo:margin-top="0in" fo:margin-bottom="0in"/>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Text_20_body" style:list-style-name="L58">
      <style:paragraph-properties fo:margin-top="0in" fo:margin-bottom="0in"/>
    </style:style>
    <style:style style:name="P194" style:family="paragraph" style:parent-style-name="Text_20_body" style:list-style-name="L59">
      <style:paragraph-properties fo:margin-top="0in" fo:margin-bottom="0in"/>
    </style:style>
    <style:style style:name="P195" style:family="paragraph" style:parent-style-name="Text_20_body" style:list-style-name="L60">
      <style:paragraph-properties fo:margin-top="0in" fo:margin-bottom="0in"/>
    </style:style>
    <style:style style:name="P196" style:family="paragraph" style:parent-style-name="Text_20_body" style:list-style-name="L61">
      <style:paragraph-properties fo:margin-top="0in" fo:margin-bottom="0in"/>
    </style:style>
    <style:style style:name="P197" style:family="paragraph" style:parent-style-name="Preformatted_20_Text">
    </style:style>
    <style:style style:name="P198" style:family="paragraph" style:parent-style-name="Text_20_body" style:list-style-name="L62">
      <style:paragraph-properties fo:margin-top="0in" fo:margin-bottom="0in"/>
    </style:style>
    <style:style style:name="P199" style:family="paragraph" style:parent-style-name="Text_20_body" style:list-style-name="L63">
      <style:paragraph-properties fo:margin-top="0in" fo:margin-bottom="0in"/>
    </style:style>
    <style:style style:name="P200" style:family="paragraph" style:parent-style-name="Text_20_body" style:list-style-name="L64">
      <style:paragraph-properties fo:margin-top="0in" fo:margin-bottom="0in"/>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65">
      <style:paragraph-properties fo:margin-top="0in" fo:margin-bottom="0in"/>
    </style:style>
    <style:style style:name="P204" style:family="paragraph" style:parent-style-name="Text_20_body" style:list-style-name="L66">
      <style:paragraph-properties fo:margin-top="0in" fo:margin-bottom="0in"/>
    </style:style>
    <style:style style:name="P205" style:family="paragraph" style:parent-style-name="Preformatted_20_Text">
    </style:style>
    <style:style style:name="P206" style:family="paragraph" style:parent-style-name="Text_20_body" style:list-style-name="L67">
      <style:paragraph-properties fo:margin-top="0in" fo:margin-bottom="0in"/>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Text_20_body" style:list-style-name="L68">
      <style:paragraph-properties fo:margin-top="0in" fo:margin-bottom="0in"/>
    </style:style>
    <style:style style:name="P212" style:family="paragraph" style:parent-style-name="Text_20_body" style:list-style-name="L69">
      <style:paragraph-properties fo:margin-top="0in" fo:margin-bottom="0in"/>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70">
      <style:paragraph-properties fo:margin-top="0in" fo:margin-bottom="0in"/>
    </style:style>
    <style:style style:name="P216" style:family="paragraph" style:parent-style-name="Text_20_body" style:list-style-name="L71">
      <style:paragraph-properties fo:margin-top="0in" fo:margin-bottom="0in"/>
    </style:style>
    <style:style style:name="P217" style:family="paragraph" style:parent-style-name="Text_20_body" style:list-style-name="L72">
      <style:paragraph-properties fo:margin-top="0in" fo:margin-bottom="0in"/>
    </style:style>
    <style:style style:name="P218" style:family="paragraph" style:parent-style-name="Text_20_body" style:list-style-name="L73">
      <style:paragraph-properties fo:margin-top="0in" fo:margin-bottom="0in"/>
    </style:style>
    <style:style style:name="P219" style:family="paragraph" style:parent-style-name="Preformatted_20_Text">
    </style:style>
    <style:style style:name="P220" style:family="paragraph" style:parent-style-name="Text_20_body" style:list-style-name="L74">
      <style:paragraph-properties fo:margin-top="0in" fo:margin-bottom="0in"/>
    </style:style>
    <style:style style:name="P221" style:family="paragraph" style:parent-style-name="Preformatted_20_Text">
    </style:style>
    <style:style style:name="P222" style:family="paragraph" style:parent-style-name="Text_20_body" style:list-style-name="L75">
      <style:paragraph-properties fo:margin-top="0in" fo:margin-bottom="0in"/>
    </style:style>
    <style:style style:name="P223" style:family="paragraph" style:parent-style-name="Text_20_body" style:list-style-name="L76">
      <style:paragraph-properties fo:margin-top="0in" fo:margin-bottom="0in"/>
    </style:style>
    <style:style style:name="P224" style:family="paragraph" style:parent-style-name="Text_20_body" style:list-style-name="L77">
      <style:paragraph-properties fo:margin-top="0in" fo:margin-bottom="0in"/>
    </style:style>
    <style:style style:name="P225" style:family="paragraph" style:parent-style-name="Text_20_body" style:list-style-name="L78">
      <style:paragraph-properties fo:margin-top="0in" fo:margin-bottom="0in"/>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79">
      <style:paragraph-properties fo:margin-top="0in" fo:margin-bottom="0in"/>
    </style:style>
    <style:style style:name="P233" style:family="paragraph" style:parent-style-name="Preformatted_20_Text">
    </style:style>
    <style:style style:name="P234" style:family="paragraph" style:parent-style-name="Preformatted_20_Text">
    </style:style>
    <style:style style:name="P235" style:family="paragraph" style:parent-style-name="Text_20_body" style:list-style-name="L80">
      <style:paragraph-properties fo:margin-top="0in" fo:margin-bottom="0in"/>
    </style:style>
    <style:style style:name="P236" style:family="paragraph" style:parent-style-name="Text_20_body" style:list-style-name="L81">
      <style:paragraph-properties fo:margin-top="0in" fo:margin-bottom="0in"/>
    </style:style>
    <style:style style:name="P237" style:family="paragraph" style:parent-style-name="Text_20_body" style:list-style-name="L82">
      <style:paragraph-properties fo:margin-top="0in" fo:margin-bottom="0in"/>
    </style:style>
    <style:style style:name="P238" style:family="paragraph" style:parent-style-name="Text_20_body" style:list-style-name="L83">
      <style:paragraph-properties fo:margin-top="0in" fo:margin-bottom="0in"/>
    </style:style>
    <style:style style:name="P239" style:family="paragraph" style:parent-style-name="Text_20_body" style:list-style-name="L84">
      <style:paragraph-properties fo:margin-top="0in" fo:margin-bottom="0in"/>
    </style:style>
    <style:style style:name="P240" style:family="paragraph" style:parent-style-name="Text_20_body" style:list-style-name="L85">
      <style:paragraph-properties fo:margin-top="0in" fo:margin-bottom="0in"/>
    </style:style>
    <style:style style:name="P241" style:family="paragraph" style:parent-style-name="Preformatted_20_Text">
    </style:style>
    <style:style style:name="P242" style:family="paragraph" style:parent-style-name="Text_20_body" style:list-style-name="L86">
      <style:paragraph-properties fo:margin-top="0in" fo:margin-bottom="0in"/>
    </style:style>
    <style:style style:name="P243" style:family="paragraph" style:parent-style-name="Text_20_body" style:list-style-name="L87">
      <style:paragraph-properties fo:margin-top="0in" fo:margin-bottom="0in"/>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88">
      <style:paragraph-properties fo:margin-top="0in" fo:margin-bottom="0in"/>
    </style:style>
    <style:style style:name="P247" style:family="paragraph" style:parent-style-name="Preformatted_20_Text">
    </style:style>
    <style:style style:name="P248" style:family="paragraph" style:parent-style-name="Text_20_body" style:list-style-name="L89">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90">
      <style:paragraph-properties fo:margin-top="0in" fo:margin-bottom="0in"/>
    </style:style>
    <style:style style:name="P253" style:family="paragraph" style:parent-style-name="Text_20_body" style:list-style-name="L91">
      <style:paragraph-properties fo:margin-top="0in" fo:margin-bottom="0in"/>
    </style:style>
    <style:style style:name="P254" style:family="paragraph" style:parent-style-name="Preformatted_20_Text">
    </style:style>
    <style:style style:name="P255" style:family="paragraph" style:parent-style-name="Text_20_body" style:list-style-name="L92">
      <style:paragraph-properties fo:margin-top="0in" fo:margin-bottom="0in"/>
    </style:style>
    <style:style style:name="P256" style:family="paragraph" style:parent-style-name="Text_20_body" style:list-style-name="L93">
      <style:paragraph-properties fo:margin-top="0in" fo:margin-bottom="0in"/>
    </style:style>
    <style:style style:name="P257" style:family="paragraph" style:parent-style-name="Text_20_body" style:list-style-name="L94">
      <style:paragraph-properties fo:margin-top="0in" fo:margin-bottom="0in"/>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95">
      <style:paragraph-properties fo:margin-top="0in" fo:margin-bottom="0in"/>
    </style:style>
    <style:style style:name="P268" style:family="paragraph" style:parent-style-name="Text_20_body" style:list-style-name="L96">
      <style:paragraph-properties fo:margin-top="0in" fo:margin-bottom="0in"/>
    </style:style>
    <style:style style:name="P269" style:family="paragraph" style:parent-style-name="Preformatted_20_Text">
    </style:style>
    <style:style style:name="P270" style:family="paragraph" style:parent-style-name="Text_20_body" style:list-style-name="L97">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Text_20_body" style:list-style-name="L98">
      <style:paragraph-properties fo:margin-top="0in" fo:margin-bottom="0in"/>
    </style:style>
    <style:style style:name="P280" style:family="paragraph" style:parent-style-name="Text_20_body" style:list-style-name="L99">
      <style:paragraph-properties fo:margin-top="0in" fo:margin-bottom="0in"/>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Text_20_body" style:list-style-name="L100">
      <style:paragraph-properties fo:margin-top="0in" fo:margin-bottom="0in"/>
    </style:style>
    <style:style style:name="P285" style:family="paragraph" style:parent-style-name="Text_20_body" style:list-style-name="L101">
      <style:paragraph-properties fo:margin-top="0in" fo:margin-bottom="0in"/>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02">
      <style:paragraph-properties fo:margin-top="0in" fo:margin-bottom="0in"/>
    </style:style>
    <style:style style:name="P289" style:family="paragraph" style:parent-style-name="Preformatted_20_Text">
    </style:style>
    <style:style style:name="P290" style:family="paragraph" style:parent-style-name="Text_20_body" style:list-style-name="L103">
      <style:paragraph-properties fo:margin-top="0in" fo:margin-bottom="0in"/>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04">
      <style:paragraph-properties fo:margin-top="0in" fo:margin-bottom="0in"/>
    </style:style>
    <style:style style:name="P295" style:family="paragraph" style:parent-style-name="Text_20_body" style:list-style-name="L105">
      <style:paragraph-properties fo:margin-top="0in" fo:margin-bottom="0in"/>
    </style:style>
    <style:style style:name="P296" style:family="paragraph" style:parent-style-name="Text_20_body" style:list-style-name="L106">
      <style:paragraph-properties fo:margin-top="0in" fo:margin-bottom="0in"/>
    </style:style>
    <style:style style:name="P297" style:family="paragraph" style:parent-style-name="Text_20_body" style:list-style-name="L107">
      <style:paragraph-properties fo:margin-top="0in" fo:margin-bottom="0in"/>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Text_20_body" style:list-style-name="L108">
      <style:paragraph-properties fo:margin-top="0in" fo:margin-bottom="0in"/>
    </style:style>
    <style:style style:name="P310" style:family="paragraph" style:parent-style-name="Text_20_body" style:list-style-name="L109">
      <style:paragraph-properties fo:margin-top="0in" fo:margin-bottom="0in"/>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10">
      <style:paragraph-properties fo:margin-top="0in" fo:margin-bottom="0in"/>
    </style:style>
    <style:style style:name="P314" style:family="paragraph" style:parent-style-name="Text_20_body" style:list-style-name="L11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12">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13">
      <style:paragraph-properties fo:margin-top="0in" fo:margin-bottom="0in"/>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Text_20_body" style:list-style-name="L114">
      <style:paragraph-properties fo:margin-top="0in" fo:margin-bottom="0in"/>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Text_20_body" style:list-style-name="L115">
      <style:paragraph-properties fo:margin-top="0in" fo:margin-bottom="0in"/>
    </style:style>
    <style:style style:name="P404" style:family="paragraph" style:parent-style-name="Text_20_body" style:list-style-name="L116">
      <style:paragraph-properties fo:margin-top="0in" fo:margin-bottom="0in"/>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Text_20_body" style:list-style-name="L117">
      <style:paragraph-properties fo:margin-top="0in" fo:margin-bottom="0in"/>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18">
      <style:paragraph-properties fo:margin-top="0in" fo:margin-bottom="0in"/>
    </style:style>
    <style:style style:name="P435" style:family="paragraph" style:parent-style-name="Text_20_body" style:list-style-name="L119">
      <style:paragraph-properties fo:margin-top="0in" fo:margin-bottom="0in"/>
    </style:style>
    <style:style style:name="P436" style:family="paragraph" style:parent-style-name="Text_20_body" style:list-style-name="L120">
      <style:paragraph-properties fo:margin-top="0in" fo:margin-bottom="0in"/>
    </style:style>
    <style:style style:name="P437" style:family="paragraph" style:parent-style-name="Text_20_body" style:list-style-name="L121">
      <style:paragraph-properties fo:margin-top="0in" fo:margin-bottom="0in"/>
    </style:style>
    <style:style style:name="P438" style:family="paragraph" style:parent-style-name="Text_20_body" style:list-style-name="L122">
      <style:paragraph-properties fo:margin-top="0in" fo:margin-bottom="0in"/>
    </style:style>
    <style:style style:name="P439" style:family="paragraph" style:parent-style-name="Text_20_body" style:list-style-name="L123">
      <style:paragraph-properties fo:margin-top="0in" fo:margin-bottom="0in"/>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Text_20_body" style:list-style-name="L124">
      <style:paragraph-properties fo:margin-top="0in" fo:margin-bottom="0in"/>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25">
      <style:paragraph-properties fo:margin-top="0in" fo:margin-bottom="0in"/>
    </style:style>
    <style:style style:name="P455" style:family="paragraph" style:parent-style-name="Preformatted_20_Text">
    </style:style>
    <style:style style:name="P456" style:family="paragraph" style:parent-style-name="Preformatted_20_Text">
    </style:style>
    <style:style style:name="P457" style:family="paragraph" style:parent-style-name="Text_20_body" style:list-style-name="L126">
      <style:paragraph-properties fo:margin-top="0in" fo:margin-bottom="0in"/>
    </style:style>
    <style:style style:name="P458" style:family="paragraph" style:parent-style-name="Text_20_body" style:list-style-name="L127">
      <style:paragraph-properties fo:margin-top="0in" fo:margin-bottom="0in"/>
    </style:style>
    <style:style style:name="P459" style:family="paragraph" style:parent-style-name="Text_20_body" style:list-style-name="L128">
      <style:paragraph-properties fo:margin-top="0in" fo:margin-bottom="0in"/>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29">
      <style:paragraph-properties fo:margin-top="0in" fo:margin-bottom="0in"/>
    </style:style>
    <style:style style:name="P492" style:family="paragraph" style:parent-style-name="Text_20_body" style:list-style-name="L130">
      <style:paragraph-properties fo:margin-top="0in" fo:margin-bottom="0in"/>
    </style:style>
    <style:style style:name="P493" style:family="paragraph" style:parent-style-name="Preformatted_20_Text">
    </style:style>
    <style:style style:name="P494" style:family="paragraph" style:parent-style-name="Text_20_body" style:list-style-name="L131">
      <style:paragraph-properties fo:margin-top="0in" fo:margin-bottom="0in"/>
    </style:style>
    <style:style style:name="P495" style:family="paragraph" style:parent-style-name="Preformatted_20_Text">
    </style:style>
    <style:style style:name="P496" style:family="paragraph" style:parent-style-name="Text_20_body" style:list-style-name="L132">
      <style:paragraph-properties fo:margin-top="0in" fo:margin-bottom="0in"/>
    </style:style>
    <style:style style:name="P497" style:family="paragraph" style:parent-style-name="Text_20_body" style:list-style-name="L133">
      <style:paragraph-properties fo:margin-top="0in" fo:margin-bottom="0in"/>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Text_20_body" style:list-style-name="L134">
      <style:paragraph-properties fo:margin-top="0in" fo:margin-bottom="0in"/>
    </style:style>
    <style:style style:name="P514" style:family="paragraph" style:parent-style-name="Text_20_body" style:list-style-name="L135">
      <style:paragraph-properties fo:margin-top="0in" fo:margin-bottom="0in"/>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Text_20_body" style:list-style-name="L136">
      <style:paragraph-properties fo:margin-top="0in" fo:margin-bottom="0in"/>
    </style:style>
    <style:style style:name="P520" style:family="paragraph" style:parent-style-name="Text_20_body" style:list-style-name="L137">
      <style:paragraph-properties fo:margin-top="0in" fo:margin-bottom="0in"/>
    </style:style>
    <style:style style:name="P521" style:family="paragraph" style:parent-style-name="Text_20_body" style:list-style-name="L138">
      <style:paragraph-properties fo:margin-top="0in" fo:margin-bottom="0in"/>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39">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40">
      <style:paragraph-properties fo:margin-top="0in" fo:margin-bottom="0in"/>
    </style:style>
    <style:style style:name="P54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3" style:family="table">
      <style:table-properties table:align="center"/>
    </style:style>
    <style:style style:name="Table23.A" style:family="table-column"/>
    <style:style style:name="Table23.B"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2" style:family="table">
      <style:table-properties table:align="center"/>
    </style:style>
    <style:style style:name="Table32.A" style:family="table-column"/>
    <style:style style:name="Table32.B" style:family="table-column"/>
    <style:style style:name="Table33" style:family="table">
      <style:table-properties table:align="center"/>
    </style:style>
    <style:style style:name="Table33.A" style:family="table-column"/>
    <style:style style:name="Table33.B" style:family="table-column"/>
    <style:style style:name="Table34" style:family="table">
      <style:table-properties table:align="center"/>
    </style:style>
    <style:style style:name="Table34.A" style:family="table-column"/>
    <style:style style:name="Table34.B"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6" style:family="table">
      <style:table-properties table:align="center"/>
    </style:style>
    <style:style style:name="Table36.A" style:family="table-column"/>
    <style:style style:name="Table36.B" style:family="table-column"/>
    <style:style style:name="Table37" style:family="table">
      <style:table-properties table:align="center"/>
    </style:style>
    <style:style style:name="Table37.A" style:family="table-column"/>
    <style:style style:name="Table37.B" style:family="table-column"/>
    <style:style style:name="Table38" style:family="table">
      <style:table-properties table:align="center"/>
    </style:style>
    <style:style style:name="Table38.A" style:family="table-column"/>
    <style:style style:name="Table38.B" style:family="table-column"/>
    <style:style style:name="Table39" style:family="table">
      <style:table-properties table:align="center"/>
    </style:style>
    <style:style style:name="Table39.A" style:family="table-column"/>
    <style:style style:name="Table39.B" style:family="table-column"/>
    <style:style style:name="Table40" style:family="table">
      <style:table-properties table:align="center"/>
    </style:style>
    <style:style style:name="Table40.A" style:family="table-column"/>
    <style:style style:name="Table40.B" style:family="table-column"/>
    <style:style style:name="Table41" style:family="table">
      <style:table-properties table:align="center"/>
    </style:style>
    <style:style style:name="Table41.A" style:family="table-column"/>
    <style:style style:name="Table41.B" style:family="table-column"/>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4" style:family="table">
      <style:table-properties table:align="center"/>
    </style:style>
    <style:style style:name="Table44.A" style:family="table-column"/>
    <style:style style:name="Table44.B" style:family="table-column"/>
    <style:style style:name="Table45" style:family="table">
      <style:table-properties table:align="center"/>
    </style:style>
    <style:style style:name="Table45.A" style:family="table-column"/>
    <style:style style:name="Table45.B" style:family="table-column"/>
    <style:style style:name="Table46" style:family="table">
      <style:table-properties table:align="center"/>
    </style:style>
    <style:style style:name="Table46.A" style:family="table-column"/>
    <style:style style:name="Table46.B" style:family="table-column"/>
    <style:style style:name="Table47" style:family="table">
      <style:table-properties table:align="center"/>
    </style:style>
    <style:style style:name="Table47.A" style:family="table-column"/>
    <style:style style:name="Table47.B" style:family="table-column"/>
    <style:style style:name="Table48" style:family="table">
      <style:table-properties table:align="center"/>
    </style:style>
    <style:style style:name="Table48.A" style:family="table-column"/>
    <style:style style:name="Table48.B" style:family="table-column"/>
    <style:style style:name="Table49" style:family="table">
      <style:table-properties table:align="center"/>
    </style:style>
    <style:style style:name="Table49.A" style:family="table-column"/>
    <style:style style:name="Table49.B" style:family="table-column"/>
    <style:style style:name="Table50" style:family="table">
      <style:table-properties table:align="center"/>
    </style:style>
    <style:style style:name="Table50.A" style:family="table-column"/>
    <style:style style:name="Table50.B" style:family="table-column"/>
    <style:style style:name="Table51" style:family="table">
      <style:table-properties table:align="center"/>
    </style:style>
    <style:style style:name="Table51.A" style:family="table-column"/>
    <style:style style:name="Table51.B" style:family="table-column"/>
    <style:style style:name="Table52" style:family="table">
      <style:table-properties table:align="center"/>
    </style:style>
    <style:style style:name="Table52.A" style:family="table-column"/>
    <style:style style:name="Table52.B" style:family="table-column"/>
    <style:style style:name="Table53" style:family="table">
      <style:table-properties table:align="center"/>
    </style:style>
    <style:style style:name="Table53.A" style:family="table-column"/>
    <style:style style:name="Table53.B" style:family="table-column"/>
    <style:style style:name="Table54" style:family="table">
      <style:table-properties table:align="center"/>
    </style:style>
    <style:style style:name="Table54.A" style:family="table-column"/>
    <style:style style:name="Table54.B" style:family="table-column"/>
    <style:style style:name="Table55" style:family="table">
      <style:table-properties table:align="center"/>
    </style:style>
    <style:style style:name="Table55.A" style:family="table-column"/>
    <style:style style:name="Table55.B" style:family="table-column"/>
    <style:style style:name="Table56" style:family="table">
      <style:table-properties table:align="center"/>
    </style:style>
    <style:style style:name="Table56.A" style:family="table-column"/>
    <style:style style:name="Table56.B"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office:automatic-styles>
  <office:body>
    <office:text>
      <text:p text:style-name="Title">ClusterSetup</text:p>
      <text:p text:style-name="Author">Cisco Ramon</text:p>
      <text:p text:style-name="Date">[2026-03-14 Sat 00:35]</text:p>
      <text:h text:style-name="Heading_20_1" text:outline-level="1"><text:bookmark-start text:name="abstract"/>Abstract<text:bookmark-end text:name="abstract"/></text:h>
      <text:p text:style-name="First_20_paragraph">This documentation presents the complete setup and configuration of a lightweight High Performance Computing (HPC) cluster environment using Rocky Linux and VirtualBox. The guide covers practical implementation of core HPC infrastructure components including shared storage, Slurm workload management, LDAP-based centralized authentication, MPI runtime environment, and centralized software stack management using Spack.</text:p>
      <text:p text:style-name="Text_20_body">The cluster environment supports multinode job execution, centralized software distribution, distributed MPI applications, and scheduler-aware runtime execution. The setup follows real-world HPC concepts while remaining suitable for learning, experimentation, and practical hands-on training.</text:p>
      <text:h text:style-name="Heading_20_1" text:outline-level="1"><text:bookmark-start text:name="preface"/>Preface<text:bookmark-end text:name="preface"/></text:h>
      <text:p text:style-name="First_20_paragraph">This documentation was prepared with the assistance of AI tools for:</text:p>
      <text:list text:style-name="L1">
        <text:list-item>
          <text:p text:style-name="P1">structuring</text:p>
        </text:list-item>
        <text:list-item>
          <text:p text:style-name="P1">formatting</text:p>
        </text:list-item>
        <text:list-item>
          <text:p text:style-name="P1">workflow organization</text:p>
        </text:list-item>
        <text:list-item>
          <text:p text:style-name="P1">command documentation</text:p>
        </text:list-item>
        <text:list-item>
          <text:p text:style-name="P1">concept explanations</text:p>
        </text:list-item>
      </text:list>
      <text:p text:style-name="First_20_paragraph">However, the complete HPC cluster setup, configuration, testing, and validation were performed manually by me in a fully working VirtualBox based cluster environment.</text:p>
      <text:p text:style-name="Text_20_body">All commands, scripts, workflows, and configurations documented in this guide were tested successfully during the setup process, including:</text:p>
      <text:list text:style-name="L2">
        <text:list-item>
          <text:p text:style-name="P2">cluster networking</text:p>
        </text:list-item>
        <text:list-item>
          <text:p text:style-name="P2">shared storage</text:p>
        </text:list-item>
        <text:list-item>
          <text:p text:style-name="P2">NFS configuration</text:p>
        </text:list-item>
        <text:list-item>
          <text:p text:style-name="P2">Slurm workload manager</text:p>
        </text:list-item>
        <text:list-item>
          <text:p text:style-name="P2">LDAP authentication</text:p>
        </text:list-item>
        <text:list-item>
          <text:p text:style-name="P2">centralized user management</text:p>
        </text:list-item>
        <text:list-item>
          <text:p text:style-name="P2">Spack software stack</text:p>
        </text:list-item>
        <text:list-item>
          <text:p text:style-name="P2">MPI runtime environment</text:p>
        </text:list-item>
        <text:list-item>
          <text:p text:style-name="P2">multinode execution</text:p>
        </text:list-item>
      </text:list>
      <text:p text:style-name="First_20_paragraph">This guide is intended for:</text:p>
      <text:list text:style-name="L3">
        <text:list-item>
          <text:p text:style-name="P3">students</text:p>
        </text:list-item>
        <text:list-item>
          <text:p text:style-name="P3">beginners</text:p>
        </text:list-item>
        <text:list-item>
          <text:p text:style-name="P3">Linux learners</text:p>
        </text:list-item>
        <text:list-item>
          <text:p text:style-name="P3">HPC enthusiasts</text:p>
        </text:list-item>
        <text:list-item>
          <text:p text:style-name="P3">system administrators</text:p>
        </text:list-item>
        <text:list-item>
          <text:p text:style-name="P3">researchers</text:p>
        </text:list-item>
      </text:list>
      <text:p text:style-name="First_20_paragraph">who want practical hands-on experience in:</text:p>
      <text:list text:style-name="L4">
        <text:list-item>
          <text:p text:style-name="P4">HPC infrastructure setup</text:p>
        </text:list-item>
        <text:list-item>
          <text:p text:style-name="P4">cluster administration</text:p>
        </text:list-item>
        <text:list-item>
          <text:p text:style-name="P4">workload scheduling</text:p>
        </text:list-item>
        <text:list-item>
          <text:p text:style-name="P4">centralized authentication</text:p>
        </text:list-item>
        <text:list-item>
          <text:p text:style-name="P4">parallel programming</text:p>
        </text:list-item>
        <text:list-item>
          <text:p text:style-name="P4">MPI execution</text:p>
        </text:list-item>
        <text:list-item>
          <text:p text:style-name="P4">software stack management</text:p>
        </text:list-item>
      </text:list>
      <text:p text:style-name="First_20_paragraph">The goal of this documentation is not only to provide commands, but also to explain the practical concepts behind real HPC environments in a simple and beginner-friendly manner.</text:p>
      <text:h text:style-name="Heading_20_1" text:outline-level="1"><text:bookmark-start text:name="about-the-author"/>About the Author<text:bookmark-end text:name="about-the-author"/></text:h>
      <text:p text:style-name="First_20_paragraph">Hi 👋, I'm Abhishek Raj</text:p>
      <text:p text:style-name="Text_20_body">I work in the field of High Performance Computing (HPC), Linux systems, parallel programming, and scientific computing with experience in HPC application optimization and distributed computing environments, including the PARAM series of supercomputers.</text:p>
      <text:p text:style-name="Text_20_body">My primary areas of interest include:</text:p>
      <text:list text:style-name="L5">
        <text:list-item>
          <text:p text:style-name="P5">HPC clusters and infrastructure</text:p>
        </text:list-item>
        <text:list-item>
          <text:p text:style-name="P5">Linux systems and administration</text:p>
        </text:list-item>
        <text:list-item>
          <text:p text:style-name="P5">MPI, OpenMP, CUDA, and OpenACC</text:p>
        </text:list-item>
        <text:list-item>
          <text:p text:style-name="P5">scientific and research workloads</text:p>
        </text:list-item>
        <text:list-item>
          <text:p text:style-name="P5">distributed systems</text:p>
        </text:list-item>
        <text:list-item>
          <text:p text:style-name="P5">software optimization and performance tuning</text:p>
        </text:list-item>
        <text:list-item>
          <text:p text:style-name="P5">automation and reproducible environments</text:p>
        </text:list-item>
      </text:list>
      <text:p text:style-name="First_20_paragraph">This project was created to gain a deeper understanding of how HPC clusters are designed and managed internally. The objective was not only to build a working cluster environment from scratch, but also to better understand the complete software and infrastructure stack behind parallel computing systems, which ultimately helps in writing and optimizing efficient HPC applications.</text:p>
      <text:p text:style-name="Text_20_body">GitHub Profile:</text:p>
      <text:p text:style-name="Text_20_body"><text:a xlink:type="simple" xlink:href="https://github.com/CISSSCO/" office:name=""><text:span text:style-name="Definition"><text:a xlink:type="simple" xlink:href="https://github.com/CISSSCO/" office:name=""><text:span text:style-name="Definition"><text:span text:style-name="T1">https://github.com/CISSSCO/</text:span></text:span></text:a></text:span></text:a></text:p>
      <text:p text:style-name="Text_20_body">LinkedIn :</text:p>
      <text:p text:style-name="Text_20_body"><text:a xlink:type="simple" xlink:href="https://www.linkedin.com/in/abhi581b" office:name=""><text:span text:style-name="Definition"><text:a xlink:type="simple" xlink:href="https://www.linkedin.com/in/abhi581b" office:name=""><text:span text:style-name="Definition"><text:span text:style-name="T1">https://www.linkedin.com/in/abhi581b</text:span></text:span></text:a></text:span></text:a></text:p>
      <text:p text:style-name="Text_20_body">Project Repository:</text:p>
      <text:p text:style-name="Text_20_body"><text:a xlink:type="simple" xlink:href="https://github.com/CISSSCO/hpccfs" office:name=""><text:span text:style-name="Definition"><text:a xlink:type="simple" xlink:href="https://github.com/CISSSCO/hpccfs" office:name=""><text:span text:style-name="Definition"><text:span text:style-name="T1">https://github.com/CISSSCO/hpccfs</text:span></text:span></text:a></text:span></text:a></text:p>
      <text:p text:style-name="Text_20_body">Hosted Documentation:</text:p>
      <text:p text:style-name="Text_20_body"><text:a xlink:type="simple" xlink:href="https://cisssco.github.io/hpccfs" office:name=""><text:span text:style-name="Definition"><text:a xlink:type="simple" xlink:href="https://cisssco.github.io/hpccfs" office:name=""><text:span text:style-name="Definition"><text:span text:style-name="T1">https://cisssco.github.io/hpccfs</text:span></text:span></text:a></text:span></text:a></text:p>
      <text:p text:style-name="Text_20_body">Source codes, scripts, configuration files, and examples used in this guide are available in the project repository.</text:p>
      <text:p text:style-name="Text_20_body">For queries, suggestions, or discussions:</text:p>
      <text:p text:style-name="Text_20_body"><text:a xlink:type="simple" xlink:href="https://ciscoramon.pages.dev/" office:name=""><text:span text:style-name="Definition"><text:a xlink:type="simple" xlink:href="https://ciscoramon.pages.dev/" office:name=""><text:span text:style-name="Definition"><text:span text:style-name="T1">https://ciscoramon.pages.dev/</text:span></text:span></text:a></text:span></text:a></text:p>
      <text:p text:style-name="Text_20_body">If you encounter any issue in the documentation, setup process, or configuration steps, feel free to create an issue in the GitHub repository.</text:p>
      <text:h text:style-name="Heading_20_1" text:outline-level="1"><text:bookmark-start text:name="introduction"/>Introduction<text:bookmark-end text:name="introduction"/></text:h>
      <text:p text:style-name="First_20_paragraph">High Performance Computing (HPC) clusters are distributed computing systems designed to execute computational workloads across multiple machines simultaneously. Instead of relying on a single system, HPC clusters combine multiple compute nodes to provide higher computational capacity, scalability, and parallel execution capability.</text:p>
      <text:p text:style-name="Text_20_body">Modern HPC environments are widely used in:</text:p>
      <text:list text:style-name="L6">
        <text:list-item>
          <text:p text:style-name="P6">scientific simulations</text:p>
        </text:list-item>
        <text:list-item>
          <text:p text:style-name="P6">engineering workloads</text:p>
        </text:list-item>
        <text:list-item>
          <text:p text:style-name="P6">computational chemistry</text:p>
        </text:list-item>
        <text:list-item>
          <text:p text:style-name="P6">artificial intelligence</text:p>
        </text:list-item>
        <text:list-item>
          <text:p text:style-name="P6">machine learning</text:p>
        </text:list-item>
        <text:list-item>
          <text:p text:style-name="P6">weather modeling</text:p>
        </text:list-item>
        <text:list-item>
          <text:p text:style-name="P6">large-scale data analysis</text:p>
        </text:list-item>
      </text:list>
      <text:p text:style-name="First_20_paragraph">A typical HPC cluster contains several important components working together:</text:p>
      <table:table table:name="Table1" table:style-name="Table1">
        <table:table-column table:style-name="Table1.A"/>
        <table:table-column table:style-name="Table1.B"/>
        <table:table-header-rows>
          <table:table-row>
            <table:table-cell table:style-name="TableHeaderRowCell" office:value-type="string">
              <text:p text:style-name="Table_20_Heading">Component</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Login Node</text:p>
          </table:table-cell>
          <table:table-cell table:style-name="TableRowCell" office:value-type="string">
            <text:p text:style-name="Table_20_Contents">User access and job submission</text:p>
          </table:table-cell>
        </table:table-row>
        <table:table-row>
          <table:table-cell table:style-name="TableRowCell" office:value-type="string">
            <text:p text:style-name="Table_20_Contents">Compute Nodes</text:p>
          </table:table-cell>
          <table:table-cell table:style-name="TableRowCell" office:value-type="string">
            <text:p text:style-name="Table_20_Contents">Execute computational workloads</text:p>
          </table:table-cell>
        </table:table-row>
        <table:table-row>
          <table:table-cell table:style-name="TableRowCell" office:value-type="string">
            <text:p text:style-name="Table_20_Contents">Shared Storage</text:p>
          </table:table-cell>
          <table:table-cell table:style-name="TableRowCell" office:value-type="string">
            <text:p text:style-name="Table_20_Contents">Shared user data and software</text:p>
          </table:table-cell>
        </table:table-row>
        <table:table-row>
          <table:table-cell table:style-name="TableRowCell" office:value-type="string">
            <text:p text:style-name="Table_20_Contents">Scheduler</text:p>
          </table:table-cell>
          <table:table-cell table:style-name="TableRowCell" office:value-type="string">
            <text:p text:style-name="Table_20_Contents">Resource allocation and job management</text:p>
          </table:table-cell>
        </table:table-row>
        <table:table-row>
          <table:table-cell table:style-name="TableRowCell" office:value-type="string">
            <text:p text:style-name="Table_20_Contents">MPI Runtime</text:p>
          </table:table-cell>
          <table:table-cell table:style-name="TableRowCell" office:value-type="string">
            <text:p text:style-name="Table_20_Contents">Distributed parallel execution</text:p>
          </table:table-cell>
        </table:table-row>
        <table:table-row>
          <table:table-cell table:style-name="TableRowCell" office:value-type="string">
            <text:p text:style-name="Table_20_Contents">Authentication System</text:p>
          </table:table-cell>
          <table:table-cell table:style-name="TableRowCell" office:value-type="string">
            <text:p text:style-name="Table_20_Contents">Centralized user management</text:p>
          </table:table-cell>
        </table:table-row>
      </table:table>
      <text:p text:style-name="First_20_paragraph">This guide focuses on building these components step-by-step in a small virtualized environment using:</text:p>
      <text:list text:style-name="L7">
        <text:list-item>
          <text:p text:style-name="P7">Rocky Linux</text:p>
        </text:list-item>
        <text:list-item>
          <text:p text:style-name="P7">VirtualBox</text:p>
        </text:list-item>
        <text:list-item>
          <text:p text:style-name="P7">Slurm</text:p>
        </text:list-item>
        <text:list-item>
          <text:p text:style-name="P7">OpenMPI</text:p>
        </text:list-item>
        <text:list-item>
          <text:p text:style-name="P7">LDAP</text:p>
        </text:list-item>
        <text:list-item>
          <text:p text:style-name="P7">NFS</text:p>
        </text:list-item>
        <text:list-item>
          <text:p text:style-name="P7">Spack</text:p>
        </text:list-item>
      </text:list>
      <text:p text:style-name="First_20_paragraph">Although the setup is lightweight and designed for learning purposes, the overall architecture closely follows concepts used in production HPC centers and supercomputers.</text:p>
      <text:p text:style-name="Text_20_body">Throughout this documentation, readers will gradually configure:</text:p>
      <text:list text:style-name="L8">
        <text:list-item>
          <text:p text:style-name="P8">cluster networking</text:p>
        </text:list-item>
        <text:list-item>
          <text:p text:style-name="P8">shared storage</text:p>
        </text:list-item>
        <text:list-item>
          <text:p text:style-name="P8">centralized authentication</text:p>
        </text:list-item>
        <text:list-item>
          <text:p text:style-name="P8">workload scheduling</text:p>
        </text:list-item>
        <text:list-item>
          <text:p text:style-name="P8">distributed software stacks</text:p>
        </text:list-item>
        <text:list-item>
          <text:p text:style-name="P8">MPI-based parallel execution</text:p>
        </text:list-item>
        <text:list-item>
          <text:p text:style-name="P8">scheduler-aware job execution</text:p>
        </text:list-item>
      </text:list>
      <text:p text:style-name="First_20_paragraph">The final environment provides a fully working multinode HPC cluster capable of running distributed parallel applications across multiple compute nodes.</text:p>
      <text:h text:style-name="Heading_20_1" text:outline-level="1"><text:bookmark-start text:name="cluster-architecture"/>Cluster Architecture<text:bookmark-end text:name="cluster-architecture"/></text:h>
      <text:p text:style-name="First_20_paragraph">The cluster consists of five virtual machines connected using an internal network.</text:p>
      <text:p text:style-name="P9"><text:s text:c="17"/>HOST MACHINE</text:p>
      <text:p text:style-name="P10"><text:s text:c="23"/>|</text:p>
      <text:p text:style-name="P11"><text:s text:c="9"/>ssh -p XXXX localhost</text:p>
      <text:p text:style-name="P12"><text:s text:c="23"/>|</text:p>
      <text:p text:style-name="P13"><text:s text:c="15"/>[ NAT Adapter ]</text:p>
      <text:p text:style-name="P14"><text:s text:c="23"/>|</text:p>
      <text:p text:style-name="P15"><text:s text:c="1"/>------------------------------------------------</text:p>
      <text:p text:style-name="P16"><text:s text:c="1"/>| <text:s text:c="14"/>INTERNAL NETWORK <text:s text:c="14"/>|</text:p>
      <text:p text:style-name="P17"><text:s text:c="1"/>| <text:s text:c="17"/>"hpcnet" <text:s text:c="19"/>|</text:p>
      <text:p text:style-name="P18"><text:s text:c="1"/>------------------------------------------------</text:p>
      <text:p text:style-name="P19"/>
      <text:p text:style-name="P20">master <text:s text:c="5"/>10.10.10.1</text:p>
      <text:p text:style-name="P21">login <text:s text:c="6"/>10.10.10.2</text:p>
      <text:p text:style-name="P22">compute01 <text:s text:c="2"/>10.10.10.11</text:p>
      <text:p text:style-name="P23">compute02 <text:s text:c="2"/>10.10.10.12</text:p>
      <text:p text:style-name="P24">compute03 <text:s text:c="2"/>10.10.10.13</text:p>
      <text:h text:style-name="Heading_20_1" text:outline-level="1"><text:bookmark-start text:name="node-details"/>Node Details<text:bookmark-end text:name="node-details"/></text:h>
      <text:h text:style-name="Heading_20_2" text:outline-level="2"><text:bookmark-start text:name="node-role"/>Node Role<text:bookmark-end text:name="node-role"/></text:h>
      <text:h text:style-name="Heading_20_3" text:outline-level="3"><text:bookmark-start text:name="master-node"/>Master Node<text:bookmark-end text:name="master-node"/></text:h>
      <text:p text:style-name="First_20_paragraph">The master node manages the overall cluster.</text:p>
      <text:p text:style-name="Text_20_body">Main responsibilities:</text:p>
      <text:list text:style-name="L9">
        <text:list-item>
          <text:p text:style-name="P25">Slurm controller</text:p>
        </text:list-item>
        <text:list-item>
          <text:p text:style-name="P25">NFS server</text:p>
        </text:list-item>
        <text:list-item>
          <text:p text:style-name="P25">LDAP server</text:p>
        </text:list-item>
        <text:list-item>
          <text:p text:style-name="P25">Monitoring tools</text:p>
        </text:list-item>
        <text:list-item>
          <text:p text:style-name="P25">Shared software stack</text:p>
        </text:list-item>
        <text:list-item>
          <text:p text:style-name="P25">Cluster configuration</text:p>
        </text:list-item>
      </text:list>
      <text:h text:style-name="Heading_20_3" text:outline-level="3"><text:bookmark-start text:name="login-node"/>Login Node<text:bookmark-end text:name="login-node"/></text:h>
      <text:p text:style-name="First_20_paragraph">The login node is the access point for users.</text:p>
      <text:p text:style-name="Text_20_body">Typical tasks performed here:</text:p>
      <text:list text:style-name="L10">
        <text:list-item>
          <text:p text:style-name="P26">SSH login</text:p>
        </text:list-item>
        <text:list-item>
          <text:p text:style-name="P26">Code compilation</text:p>
        </text:list-item>
        <text:list-item>
          <text:p text:style-name="P26">Job submission</text:p>
        </text:list-item>
        <text:list-item>
          <text:p text:style-name="P26">Accessing shared storage</text:p>
        </text:list-item>
      </text:list>
      <text:h text:style-name="Heading_20_3" text:outline-level="3"><text:bookmark-start text:name="compute-nodes"/>Compute Nodes<text:bookmark-end text:name="compute-nodes"/></text:h>
      <text:p text:style-name="First_20_paragraph">Compute nodes run the actual workloads.</text:p>
      <text:p text:style-name="Text_20_body">These nodes are mainly used for:</text:p>
      <text:list text:style-name="L11">
        <text:list-item>
          <text:p text:style-name="P27">MPI jobs</text:p>
        </text:list-item>
        <text:list-item>
          <text:p text:style-name="P27">OpenMP jobs</text:p>
        </text:list-item>
        <text:list-item>
          <text:p text:style-name="P27">Batch workloads</text:p>
        </text:list-item>
        <text:list-item>
          <text:p text:style-name="P27">Parallel execution</text:p>
        </text:list-item>
      </text:list>
      <text:h text:style-name="Heading_20_2" text:outline-level="2"><text:bookmark-start text:name="networking-setup"/>Networking Setup<text:bookmark-end text:name="networking-setup"/></text:h>
      <text:p text:style-name="First_20_paragraph">Two network adapters are used for each VM.</text:p>
      <text:h text:style-name="Heading_20_3" text:outline-level="3"><text:bookmark-start text:name="nat-adapter"/>NAT Adapter<text:bookmark-end text:name="nat-adapter"/></text:h>
      <text:p text:style-name="First_20_paragraph">Used for:</text:p>
      <text:list text:style-name="L12">
        <text:list-item>
          <text:p text:style-name="P28">Internet access</text:p>
        </text:list-item>
        <text:list-item>
          <text:p text:style-name="P28">Package installation</text:p>
        </text:list-item>
        <text:list-item>
          <text:p text:style-name="P28">SSH access from host system</text:p>
        </text:list-item>
      </text:list>
      <text:h text:style-name="Heading_20_3" text:outline-level="3"><text:bookmark-start text:name="internal-network"/>Internal Network<text:bookmark-end text:name="internal-network"/></text:h>
      <text:p text:style-name="First_20_paragraph">Used for communication between cluster nodes.</text:p>
      <text:p text:style-name="Text_20_body">Network name:</text:p>
      <text:p text:style-name="P29">hpcnet</text:p>
      <text:p text:style-name="First_20_paragraph">This network is isolated and only used inside the cluster.</text:p>
      <text:h text:style-name="Heading_20_2" text:outline-level="2"><text:bookmark-start text:name="static-ip-addressing"/>Static IP Addressing<text:bookmark-end text:name="static-ip-addressing"/></text:h>
      <text:p text:style-name="First_20_paragraph">Each node uses a fixed IP addres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VM Name</text:p>
            </table:table-cell>
            <table:table-cell table:style-name="TableHeaderRowCell" office:value-type="string">
              <text:p text:style-name="Table_20_Heading">Hostname</text:p>
            </table:table-cell>
            <table:table-cell table:style-name="TableHeaderRowCell" office:value-type="string">
              <text:p text:style-name="Table_20_Heading">Internal IP</text:p>
            </table:table-cell>
            <table:table-cell table:style-name="TableHeaderRowCell" office:value-type="string">
              <text:p text:style-name="Table_20_Heading">SSH Port</text:p>
            </table:table-cell>
          </table:table-row>
        </table:table-header-rows>
        <table:table-row>
          <table:table-cell table:style-name="TableRowCell" office:value-type="string">
            <text:p text:style-name="Table_20_Contents">master</text:p>
          </table:table-cell>
          <table:table-cell table:style-name="TableRowCell" office:value-type="string">
            <text:p text:style-name="Table_20_Contents">master.local</text:p>
          </table:table-cell>
          <table:table-cell table:style-name="TableRowCell" office:value-type="string">
            <text:p text:style-name="Table_20_Contents">10.10.10.1</text:p>
          </table:table-cell>
          <table:table-cell table:style-name="TableRowCell" office:value-type="string">
            <text:p text:style-name="Table_20_Contents">2221</text:p>
          </table:table-cell>
        </table:table-row>
        <table:table-row>
          <table:table-cell table:style-name="TableRowCell" office:value-type="string">
            <text:p text:style-name="Table_20_Contents">login</text:p>
          </table:table-cell>
          <table:table-cell table:style-name="TableRowCell" office:value-type="string">
            <text:p text:style-name="Table_20_Contents">login.local</text:p>
          </table:table-cell>
          <table:table-cell table:style-name="TableRowCell" office:value-type="string">
            <text:p text:style-name="Table_20_Contents">10.10.10.2</text:p>
          </table:table-cell>
          <table:table-cell table:style-name="TableRowCell" office:value-type="string">
            <text:p text:style-name="Table_20_Contents">2222</text:p>
          </table:table-cell>
        </table:table-row>
        <table:table-row>
          <table:table-cell table:style-name="TableRowCell" office:value-type="string">
            <text:p text:style-name="Table_20_Contents">compute01</text:p>
          </table:table-cell>
          <table:table-cell table:style-name="TableRowCell" office:value-type="string">
            <text:p text:style-name="Table_20_Contents">compute01.local</text:p>
          </table:table-cell>
          <table:table-cell table:style-name="TableRowCell" office:value-type="string">
            <text:p text:style-name="Table_20_Contents">10.10.10.11</text:p>
          </table:table-cell>
          <table:table-cell table:style-name="TableRowCell" office:value-type="string">
            <text:p text:style-name="Table_20_Contents">2223</text:p>
          </table:table-cell>
        </table:table-row>
        <table:table-row>
          <table:table-cell table:style-name="TableRowCell" office:value-type="string">
            <text:p text:style-name="Table_20_Contents">compute02</text:p>
          </table:table-cell>
          <table:table-cell table:style-name="TableRowCell" office:value-type="string">
            <text:p text:style-name="Table_20_Contents">compute02.local</text:p>
          </table:table-cell>
          <table:table-cell table:style-name="TableRowCell" office:value-type="string">
            <text:p text:style-name="Table_20_Contents">10.10.10.12</text:p>
          </table:table-cell>
          <table:table-cell table:style-name="TableRowCell" office:value-type="string">
            <text:p text:style-name="Table_20_Contents">2224</text:p>
          </table:table-cell>
        </table:table-row>
        <table:table-row>
          <table:table-cell table:style-name="TableRowCell" office:value-type="string">
            <text:p text:style-name="Table_20_Contents">compute03</text:p>
          </table:table-cell>
          <table:table-cell table:style-name="TableRowCell" office:value-type="string">
            <text:p text:style-name="Table_20_Contents">compute03.local</text:p>
          </table:table-cell>
          <table:table-cell table:style-name="TableRowCell" office:value-type="string">
            <text:p text:style-name="Table_20_Contents">10.10.10.13</text:p>
          </table:table-cell>
          <table:table-cell table:style-name="TableRowCell" office:value-type="string">
            <text:p text:style-name="Table_20_Contents">2225</text:p>
          </table:table-cell>
        </table:table-row>
      </table:table>
      <text:p text:style-name="First_20_paragraph">Example SSH access:</text:p>
      <text:p text:style-name="Preformatted_20_Text">
<text:span text:style-name="FunctionTok">ssh</text:span><text:span text:style-name="NormalTok"><text:s text:c="1"/></text:span><text:span text:style-name="AttributeTok">-p</text:span><text:span text:style-name="NormalTok"><text:s text:c="1"/>2221 hpcuser@localhost</text:span>
</text:p>
      <text:h text:style-name="Heading_20_1" text:outline-level="1"><text:bookmark-start text:name="resource-allocation"/>Resource Allocation<text:bookmark-end text:name="resource-allocation"/></text:h>
      <text:p text:style-name="First_20_paragraph">The following configuration is enough for a lightweight HPC lab. You can increase resources later depending on your host system.</text:p>
      <text:h text:style-name="Heading_20_2" text:outline-level="2"><text:bookmark-start text:name="master-node-1"/>Master Node<text:bookmark-end text:name="master-node-1"/></text:h>
      <table:table table:name="Table3" table:style-name="Table3">
        <table:table-column table:style-name="Table3.A"/>
        <table:table-column table:style-name="Table3.B"/>
        <table:table-header-rows>
          <table:table-row>
            <table:table-cell table:style-name="TableHeaderRowCell" office:value-type="string">
              <text:p text:style-name="Table_20_Heading">Resource</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RAM</text:p>
          </table:table-cell>
          <table:table-cell table:style-name="TableRowCell" office:value-type="string">
            <text:p text:style-name="Table_20_Contents">2 GB</text:p>
          </table:table-cell>
        </table:table-row>
        <table:table-row>
          <table:table-cell table:style-name="TableRowCell" office:value-type="string">
            <text:p text:style-name="Table_20_Contents">CPU</text:p>
          </table:table-cell>
          <table:table-cell table:style-name="TableRowCell" office:value-type="string">
            <text:p text:style-name="Table_20_Contents">2</text:p>
          </table:table-cell>
        </table:table-row>
        <table:table-row>
          <table:table-cell table:style-name="TableRowCell" office:value-type="string">
            <text:p text:style-name="Table_20_Contents">Disk</text:p>
          </table:table-cell>
          <table:table-cell table:style-name="TableRowCell" office:value-type="string">
            <text:p text:style-name="Table_20_Contents">30 GB</text:p>
          </table:table-cell>
        </table:table-row>
      </table:table>
      <text:h text:style-name="Heading_20_2" text:outline-level="2"><text:bookmark-start text:name="login-node-1"/>Login Node<text:bookmark-end text:name="login-node-1"/></text:h>
      <table:table table:name="Table4" table:style-name="Table4">
        <table:table-column table:style-name="Table4.A"/>
        <table:table-column table:style-name="Table4.B"/>
        <table:table-header-rows>
          <table:table-row>
            <table:table-cell table:style-name="TableHeaderRowCell" office:value-type="string">
              <text:p text:style-name="Table_20_Heading">Resource</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RAM</text:p>
          </table:table-cell>
          <table:table-cell table:style-name="TableRowCell" office:value-type="string">
            <text:p text:style-name="Table_20_Contents">2 GB</text:p>
          </table:table-cell>
        </table:table-row>
        <table:table-row>
          <table:table-cell table:style-name="TableRowCell" office:value-type="string">
            <text:p text:style-name="Table_20_Contents">CPU</text:p>
          </table:table-cell>
          <table:table-cell table:style-name="TableRowCell" office:value-type="string">
            <text:p text:style-name="Table_20_Contents">2</text:p>
          </table:table-cell>
        </table:table-row>
        <table:table-row>
          <table:table-cell table:style-name="TableRowCell" office:value-type="string">
            <text:p text:style-name="Table_20_Contents">Disk</text:p>
          </table:table-cell>
          <table:table-cell table:style-name="TableRowCell" office:value-type="string">
            <text:p text:style-name="Table_20_Contents">25 GB</text:p>
          </table:table-cell>
        </table:table-row>
      </table:table>
      <text:h text:style-name="Heading_20_2" text:outline-level="2"><text:bookmark-start text:name="compute-nodes-1"/>Compute Nodes<text:bookmark-end text:name="compute-nodes-1"/></text:h>
      <table:table table:name="Table5" table:style-name="Table5">
        <table:table-column table:style-name="Table5.A"/>
        <table:table-column table:style-name="Table5.B"/>
        <table:table-header-rows>
          <table:table-row>
            <table:table-cell table:style-name="TableHeaderRowCell" office:value-type="string">
              <text:p text:style-name="Table_20_Heading">Resource</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RAM</text:p>
          </table:table-cell>
          <table:table-cell table:style-name="TableRowCell" office:value-type="string">
            <text:p text:style-name="Table_20_Contents">2 GB</text:p>
          </table:table-cell>
        </table:table-row>
        <table:table-row>
          <table:table-cell table:style-name="TableRowCell" office:value-type="string">
            <text:p text:style-name="Table_20_Contents">CPU</text:p>
          </table:table-cell>
          <table:table-cell table:style-name="TableRowCell" office:value-type="string">
            <text:p text:style-name="Table_20_Contents">2</text:p>
          </table:table-cell>
        </table:table-row>
        <table:table-row>
          <table:table-cell table:style-name="TableRowCell" office:value-type="string">
            <text:p text:style-name="Table_20_Contents">Disk</text:p>
          </table:table-cell>
          <table:table-cell table:style-name="TableRowCell" office:value-type="string">
            <text:p text:style-name="Table_20_Contents">20 GB</text:p>
          </table:table-cell>
        </table:table-row>
      </table:table>
      <text:h text:style-name="Heading_20_1" text:outline-level="1"><text:bookmark-start text:name="master-node-setup"/>Master Node Setup<text:bookmark-end text:name="master-node-setup"/></text:h>
      <text:p text:style-name="First_20_paragraph">This section covers the complete setup of the master node. The master node acts as the central management node of the cluster.</text:p>
      <text:p text:style-name="Text_20_body">Main responsibilities:</text:p>
      <text:list text:style-name="L13">
        <text:list-item>
          <text:p text:style-name="P30">Cluster management</text:p>
        </text:list-item>
        <text:list-item>
          <text:p text:style-name="P30">Shared storage</text:p>
        </text:list-item>
        <text:list-item>
          <text:p text:style-name="P30">Slurm controller</text:p>
        </text:list-item>
        <text:list-item>
          <text:p text:style-name="P30">Monitoring services</text:p>
        </text:list-item>
        <text:list-item>
          <text:p text:style-name="P30">User authentication</text:p>
        </text:list-item>
        <text:list-item>
          <text:p text:style-name="P30">Software management</text:p>
        </text:list-item>
      </text:list>
      <text:h text:style-name="Heading_20_2" text:outline-level="2"><text:bookmark-start text:name="install-virtualbox-on-manjaro"/>Install VirtualBox on Manjaro<text:bookmark-end text:name="install-virtualbox-on-manjaro"/></text:h>
      <text:p text:style-name="First_20_paragraph">I'm using Manjaro (Arch) as my base system.</text:p>
      <text:h text:style-name="Heading_20_3" text:outline-level="3"><text:bookmark-start text:name="update-packages"/>Update packages<text:bookmark-end text:name="update-packages"/></text:h>
      <text:p text:style-name="Preformatted_20_Text">
<text:span text:style-name="FunctionTok">sudo</text:span><text:span text:style-name="NormalTok"><text:s text:c="1"/>pacman </text:span><text:span text:style-name="AttributeTok">-Syu</text:span>
</text:p>
      <text:h text:style-name="Heading_20_3" text:outline-level="3"><text:bookmark-start text:name="install-virtualbox-and-host-modules"/>Install VirtualBox and host modules<text:bookmark-end text:name="install-virtualbox-and-host-modules"/></text:h>
      <text:p text:style-name="Preformatted_20_Text">
<text:span text:style-name="FunctionTok">sudo</text:span><text:span text:style-name="NormalTok"><text:s text:c="1"/>pacman </text:span><text:span text:style-name="AttributeTok">-S</text:span><text:span text:style-name="NormalTok"><text:s text:c="1"/>virtualbox virtualbox-host-modules-arch</text:span>
</text:p>
      <text:h text:style-name="Heading_20_3" text:outline-level="3"><text:bookmark-start text:name="install-virtualbox-extension-pack"/>Install VirtualBox extension pack<text:bookmark-end text:name="install-virtualbox-extension-pack"/></text:h>
      <text:p text:style-name="Preformatted_20_Text">
<text:span text:style-name="FunctionTok">sudo</text:span><text:span text:style-name="NormalTok"><text:s text:c="1"/>pacman </text:span><text:span text:style-name="AttributeTok">-S</text:span><text:span text:style-name="NormalTok"><text:s text:c="1"/>virtualbox-ext-oracle</text:span>
</text:p>
      <text:h text:style-name="Heading_20_3" text:outline-level="3"><text:bookmark-start text:name="load-virtualbox-kernel-module"/>Load VirtualBox kernel module<text:bookmark-end text:name="load-virtualbox-kernel-module"/></text:h>
      <text:p text:style-name="Preformatted_20_Text">
<text:span text:style-name="FunctionTok">sudo</text:span><text:span text:style-name="NormalTok"><text:s text:c="1"/>modprobe vboxdrv</text:span>
</text:p>
      <text:h text:style-name="Heading_20_3" text:outline-level="3"><text:bookmark-start text:name="add-current-user-to-virtualbox-group"/>Add current user to VirtualBox group<text:bookmark-end text:name="add-current-user-to-virtualbox-group"/></text:h>
      <text:p text:style-name="Preformatted_20_Text">
<text:span text:style-name="FunctionTok">sudo</text:span><text:span text:style-name="NormalTok"><text:s text:c="1"/>usermod </text:span><text:span text:style-name="AttributeTok">-aG</text:span><text:span text:style-name="NormalTok"><text:s text:c="1"/>vboxusers </text:span><text:span text:style-name="VariableTok">$USER</text:span>
</text:p>
      <text:h text:style-name="Heading_20_3" text:outline-level="3"><text:bookmark-start text:name="reboot-the-system"/>Reboot the system<text:bookmark-end text:name="reboot-the-system"/></text:h>
      <text:p text:style-name="Preformatted_20_Text">
<text:span text:style-name="FunctionTok">sudo</text:span><text:span text:style-name="NormalTok"><text:s text:c="1"/>reboot</text:span>
</text:p>
      <text:h text:style-name="Heading_20_2" text:outline-level="2"><text:bookmark-start text:name="download-rocky-linux"/>Download Rocky Linux<text:bookmark-end text:name="download-rocky-linux"/></text:h>
      <text:p text:style-name="First_20_paragraph">Download Rocky Linux Minimal ISO:</text:p>
      <text:p text:style-name="Text_20_body"><text:a xlink:type="simple" xlink:href="https://rockylinux.org/download" office:name=""><text:span text:style-name="Definition">https://rockylinux.org/download</text:span></text:a></text:p>
      <text:p text:style-name="Text_20_body">Choose:</text:p>
      <text:list text:style-name="L14">
        <text:list-item>
          <text:p text:style-name="P31">x86<text:span text:style-name="T2">64</text:span></text:p>
        </text:list-item>
        <text:list-item>
          <text:p text:style-name="P31">Minimal ISO</text:p>
        </text:list-item>
      </text:list>
      <text:p text:style-name="First_20_paragraph">The minimal installation keeps the environment lightweight and avoids unnecessary packages.</text:p>
      <text:h text:style-name="Heading_20_2" text:outline-level="2"><text:bookmark-start text:name="create-master-vm"/>Create Master VM<text:bookmark-end text:name="create-master-vm"/></text:h>
      <text:p text:style-name="First_20_paragraph">Open VirtualBox and create a new virtual machine.</text:p>
      <text:h text:style-name="Heading_20_3" text:outline-level="3"><text:bookmark-start text:name="vm-name"/>VM Name<text:bookmark-end text:name="vm-name"/></text:h>
      <text:p text:style-name="P32">master</text:p>
      <text:h text:style-name="Heading_20_3" text:outline-level="3"><text:bookmark-start text:name="type"/>Type<text:bookmark-end text:name="type"/></text:h>
      <text:p text:style-name="P33">Linux</text:p>
      <text:p text:style-name="P34">Red Hat (64-bit)</text:p>
      <text:h text:style-name="Heading_20_3" text:outline-level="3"><text:bookmark-start text:name="hardware"/>Hardware<text:bookmark-end text:name="hardware"/></text:h>
      <table:table table:name="Table6" table:style-name="Table6">
        <table:table-column table:style-name="Table6.A"/>
        <table:table-column table:style-name="Table6.B"/>
        <table:table-header-rows>
          <table:table-row>
            <table:table-cell table:style-name="TableHeaderRowCell" office:value-type="string">
              <text:p text:style-name="Table_20_Heading">Setting</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RAM</text:p>
          </table:table-cell>
          <table:table-cell table:style-name="TableRowCell" office:value-type="string">
            <text:p text:style-name="Table_20_Contents">2046 MB</text:p>
          </table:table-cell>
        </table:table-row>
        <table:table-row>
          <table:table-cell table:style-name="TableRowCell" office:value-type="string">
            <text:p text:style-name="Table_20_Contents">CPU</text:p>
          </table:table-cell>
          <table:table-cell table:style-name="TableRowCell" office:value-type="string">
            <text:p text:style-name="Table_20_Contents">2</text:p>
          </table:table-cell>
        </table:table-row>
        <table:table-row>
          <table:table-cell table:style-name="TableRowCell" office:value-type="string">
            <text:p text:style-name="Table_20_Contents">Disk</text:p>
          </table:table-cell>
          <table:table-cell table:style-name="TableRowCell" office:value-type="string">
            <text:p text:style-name="Table_20_Contents">30 GB</text:p>
          </table:table-cell>
        </table:table-row>
      </table:table>
      <text:h text:style-name="Heading_20_3" text:outline-level="3"><text:bookmark-start text:name="disk-type"/>Disk Type<text:bookmark-end text:name="disk-type"/></text:h>
      <text:p text:style-name="P35">VDI</text:p>
      <text:p text:style-name="P36">Dynamically Allocated</text:p>
      <text:p text:style-name="First_20_paragraph">This configuration is enough for a lightweight HPC lab environment.</text:p>
      <text:h text:style-name="Heading_20_2" text:outline-level="2"><text:bookmark-start text:name="network-configuration"/>Network Configuration<text:bookmark-end text:name="network-configuration"/></text:h>
      <text:h text:style-name="Heading_20_3" text:outline-level="3"><text:bookmark-start text:name="adapter-1"/>Adapter 1<text:bookmark-end text:name="adapter-1"/></text:h>
      <text:p text:style-name="P37">Attached to: NAT</text:p>
      <text:p text:style-name="First_20_paragraph">Used for:</text:p>
      <text:list text:style-name="L15">
        <text:list-item>
          <text:p text:style-name="P38">Internet access</text:p>
        </text:list-item>
        <text:list-item>
          <text:p text:style-name="P38">Package installation</text:p>
        </text:list-item>
        <text:list-item>
          <text:p text:style-name="P38">SSH access from host machine</text:p>
        </text:list-item>
      </text:list>
      <text:h text:style-name="Heading_20_3" text:outline-level="3"><text:bookmark-start text:name="nat-port-forwarding"/>NAT Port Forwarding<text:bookmark-end text:name="nat-port-forwarding"/></text:h>
      <text:p text:style-name="First_20_paragraph">Open:</text:p>
      <text:p text:style-name="P39">Settings -&gt; Network -&gt; Adapter 1 -&gt; Advanced -&gt; Port Forwarding</text:p>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Name</text:p>
            </table:table-cell>
            <table:table-cell table:style-name="TableHeaderRowCell" office:value-type="string">
              <text:p text:style-name="Table_20_Heading">Protocol</text:p>
            </table:table-cell>
            <table:table-cell table:style-name="TableHeaderRowCell" office:value-type="string">
              <text:p text:style-name="Table_20_Heading">Host Port</text:p>
            </table:table-cell>
            <table:table-cell table:style-name="TableHeaderRowCell" office:value-type="string">
              <text:p text:style-name="Table_20_Heading">Guest Port</text:p>
            </table:table-cell>
          </table:table-row>
        </table:table-header-rows>
        <table:table-row>
          <table:table-cell table:style-name="TableRowCell" office:value-type="string">
            <text:p text:style-name="Table_20_Contents">ssh</text:p>
          </table:table-cell>
          <table:table-cell table:style-name="TableRowCell" office:value-type="string">
            <text:p text:style-name="Table_20_Contents">TCP</text:p>
          </table:table-cell>
          <table:table-cell table:style-name="TableRowCell" office:value-type="string">
            <text:p text:style-name="Table_20_Contents">2221</text:p>
          </table:table-cell>
          <table:table-cell table:style-name="TableRowCell" office:value-type="string">
            <text:p text:style-name="Table_20_Contents">22</text:p>
          </table:table-cell>
        </table:table-row>
      </table:table>
      <text:h text:style-name="Heading_20_3" text:outline-level="3"><text:bookmark-start text:name="adapter-2"/>Adapter 2<text:bookmark-end text:name="adapter-2"/></text:h>
      <text:p text:style-name="P40">Attached to: Internal Network</text:p>
      <text:p text:style-name="First_20_paragraph">Internal Network Name:</text:p>
      <text:p text:style-name="P41">hpcnet</text:p>
      <text:p text:style-name="First_20_paragraph">IMPORTANT: All nodes MUST use the same internal network name. This network is used for communication between cluster nodes.</text:p>
      <text:h text:style-name="Heading_20_2" text:outline-level="2"><text:bookmark-start text:name="rocky-linux-installation"/>Rocky Linux Installation<text:bookmark-end text:name="rocky-linux-installation"/></text:h>
      <text:p text:style-name="First_20_paragraph">Choose:</text:p>
      <text:p text:style-name="P42">Minimal Install</text:p>
      <text:h text:style-name="Heading_20_3" text:outline-level="3"><text:bookmark-start text:name="network-and-hostname"/>Network and Hostname<text:bookmark-end text:name="network-and-hostname"/></text:h>
      <text:p text:style-name="First_20_paragraph">Enable BOTH network adapters.</text:p>
      <text:p text:style-name="Text_20_body">Set hostname:</text:p>
      <text:p text:style-name="P43">master.local</text:p>
      <text:h text:style-name="Heading_20_3" text:outline-level="3"><text:bookmark-start text:name="user-creation"/>User Creation<text:bookmark-end text:name="user-creation"/></text:h>
      <text:p text:style-name="First_20_paragraph">Create an administrative user during installation.</text:p>
      <table:table table:name="Table8" table:style-name="Table8">
        <table:table-column table:style-name="Table8.A"/>
        <table:table-column table:style-name="Table8.B"/>
        <table:table-header-rows>
          <table:table-row>
            <table:table-cell table:style-name="TableHeaderRowCell" office:value-type="string">
              <text:p text:style-name="Table_20_Heading">Field</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Username</text:p>
          </table:table-cell>
          <table:table-cell table:style-name="TableRowCell" office:value-type="string">
            <text:p text:style-name="Table_20_Contents">hpcadmin</text:p>
          </table:table-cell>
        </table:table-row>
        <table:table-row>
          <table:table-cell table:style-name="TableRowCell" office:value-type="string">
            <text:p text:style-name="Table_20_Contents">Administrator</text:p>
          </table:table-cell>
          <table:table-cell table:style-name="TableRowCell" office:value-type="string">
            <text:p text:style-name="Table_20_Contents">YES</text:p>
          </table:table-cell>
        </table:table-row>
      </table:table>
      <text:p text:style-name="First_20_paragraph">After installation, log into the VM.</text:p>
      <text:h text:style-name="Heading_20_2" text:outline-level="2"><text:bookmark-start text:name="initial-system-verification"/>Initial System Verification<text:bookmark-end text:name="initial-system-verification"/></text:h>
      <text:h text:style-name="Heading_20_3" text:outline-level="3"><text:bookmark-start text:name="check-interfaces"/>Check Interfaces<text:bookmark-end text:name="check-interfaces"/></text:h>
      <text:p text:style-name="Preformatted_20_Text">
<text:span text:style-name="ExtensionTok">ip</text:span><text:span text:style-name="NormalTok"><text:s text:c="1"/>addr</text:span>
</text:p>
      <text:p text:style-name="First_20_paragraph">Expected:</text:p>
      <text:list text:style-name="L16">
        <text:list-item>
          <text:p text:style-name="P44">NAT interface should receive:</text:p>
          <text:list text:style-name="L17">
            <text:list-item>
              <text:p text:style-name="P45">10.0.2.15</text:p>
            </text:list-item>
          </text:list>
        </text:list-item>
        <text:list-item>
          <text:p text:style-name="P44">Internal interface should exist but may not yet have static IP</text:p>
        </text:list-item>
      </text:list>
      <text:h text:style-name="Heading_20_2" text:outline-level="2"><text:bookmark-start text:name="configure-static-internal-network"/>Configure Static Internal Network<text:bookmark-end text:name="configure-static-internal-network"/></text:h>
      <text:h text:style-name="Heading_20_3" text:outline-level="3"><text:bookmark-start text:name="check-device-names"/>Check Device Names<text:bookmark-end text:name="check-device-names"/></text:h>
      <text:p text:style-name="Preformatted_20_Text">
<text:span text:style-name="ExtensionTok">nmcli</text:span><text:span text:style-name="NormalTok"><text:s text:c="1"/>device status</text:span>
</text:p>
      <text:p text:style-name="First_20_paragraph">Expected:</text:p>
      <table:table table:name="Table9" table:style-name="Table9">
        <table:table-column table:style-name="Table9.A"/>
        <table:table-column table:style-name="Table9.B"/>
        <table:table-header-rows>
          <table:table-row>
            <table:table-cell table:style-name="TableHeaderRowCell" office:value-type="string">
              <text:p text:style-name="Table_20_Heading">Interface</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enp0s3</text:p>
          </table:table-cell>
          <table:table-cell table:style-name="TableRowCell" office:value-type="string">
            <text:p text:style-name="Table_20_Contents">NAT</text:p>
          </table:table-cell>
        </table:table-row>
        <table:table-row>
          <table:table-cell table:style-name="TableRowCell" office:value-type="string">
            <text:p text:style-name="Table_20_Contents">enp0s8</text:p>
          </table:table-cell>
          <table:table-cell table:style-name="TableRowCell" office:value-type="string">
            <text:p text:style-name="Table_20_Contents">Internal Network</text:p>
          </table:table-cell>
        </table:table-row>
      </table:table>
      <text:h text:style-name="Heading_20_2" text:outline-level="2"><text:bookmark-start text:name="configure-internal-interface"/>Configure Internal Interface<text:bookmark-end text:name="configure-internal-interface"/></text:h>
      <text:p text:style-name="First_20_paragraph">Launch NetworkManager TUI:</text:p>
      <text:p text:style-name="Preformatted_20_Text">
<text:span text:style-name="FunctionTok">sudo</text:span><text:span text:style-name="NormalTok"><text:s text:c="1"/>nmtui</text:span>
</text:p>
      <text:p text:style-name="First_20_paragraph">Navigate:</text:p>
      <text:p text:style-name="P46">Edit a connection</text:p>
      <text:p text:style-name="First_20_paragraph">Select:</text:p>
      <text:p text:style-name="P47">enp0s8</text:p>
      <text:p text:style-name="First_20_paragraph">Set:</text:p>
      <table:table table:name="Table10" table:style-name="Table10">
        <table:table-column table:style-name="Table10.A"/>
        <table:table-column table:style-name="Table10.B"/>
        <table:table-header-rows>
          <table:table-row>
            <table:table-cell table:style-name="TableHeaderRowCell" office:value-type="string">
              <text:p text:style-name="Table_20_Heading">Field</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IPv4 Method</text:p>
          </table:table-cell>
          <table:table-cell table:style-name="TableRowCell" office:value-type="string">
            <text:p text:style-name="Table_20_Contents">Manual</text:p>
          </table:table-cell>
        </table:table-row>
        <table:table-row>
          <table:table-cell table:style-name="TableRowCell" office:value-type="string">
            <text:p text:style-name="Table_20_Contents">Address</text:p>
          </table:table-cell>
          <table:table-cell table:style-name="TableRowCell" office:value-type="string">
            <text:p text:style-name="Table_20_Contents">10.10.10.1/24</text:p>
          </table:table-cell>
        </table:table-row>
        <table:table-row>
          <table:table-cell table:style-name="TableRowCell" office:value-type="string">
            <text:p text:style-name="Table_20_Contents">Gateway</text:p>
          </table:table-cell>
          <table:table-cell table:style-name="TableRowCell" office:value-type="string">
            <text:p text:style-name="Table_20_Contents">blank</text:p>
          </table:table-cell>
        </table:table-row>
        <table:table-row>
          <table:table-cell table:style-name="TableRowCell" office:value-type="string">
            <text:p text:style-name="Table_20_Contents">DNS</text:p>
          </table:table-cell>
          <table:table-cell table:style-name="TableRowCell" office:value-type="string">
            <text:p text:style-name="Table_20_Contents">blank</text:p>
          </table:table-cell>
        </table:table-row>
      </table:table>
      <text:p text:style-name="First_20_paragraph">DO NOT modify NAT interface.</text:p>
      <text:h text:style-name="Heading_20_2" text:outline-level="2"><text:bookmark-start text:name="restart-networking"/>Restart Networking<text:bookmark-end text:name="restart-networking"/></text:h>
      <text:p text:style-name="Preformatted_20_Text">
<text:span text:style-name="FunctionTok">sudo</text:span><text:span text:style-name="NormalTok"><text:s text:c="1"/>systemctl restart NetworkManager</text:span>
</text:p>
      <text:h text:style-name="Heading_20_2" text:outline-level="2"><text:bookmark-start text:name="verify-networking"/>Verify Networking<text:bookmark-end text:name="verify-networking"/></text:h>
      <text:p text:style-name="Preformatted_20_Text">
<text:span text:style-name="ExtensionTok">ip</text:span><text:span text:style-name="NormalTok"><text:s text:c="1"/>addr</text:span>
</text:p>
      <text:p text:style-name="First_20_paragraph">Expected:</text:p>
      <table:table table:name="Table11" table:style-name="Table11">
        <table:table-column table:style-name="Table11.A"/>
        <table:table-column table:style-name="Table11.B"/>
        <table:table-header-rows>
          <table:table-row>
            <table:table-cell table:style-name="TableHeaderRowCell" office:value-type="string">
              <text:p text:style-name="Table_20_Heading">Interface</text:p>
            </table:table-cell>
            <table:table-cell table:style-name="TableHeaderRowCell" office:value-type="string">
              <text:p text:style-name="Table_20_Heading">IP</text:p>
            </table:table-cell>
          </table:table-row>
        </table:table-header-rows>
        <table:table-row>
          <table:table-cell table:style-name="TableRowCell" office:value-type="string">
            <text:p text:style-name="Table_20_Contents">NAT</text:p>
          </table:table-cell>
          <table:table-cell table:style-name="TableRowCell" office:value-type="string">
            <text:p text:style-name="Table_20_Contents">10.0.2.x</text:p>
          </table:table-cell>
        </table:table-row>
        <table:table-row>
          <table:table-cell table:style-name="TableRowCell" office:value-type="string">
            <text:p text:style-name="Table_20_Contents">Internal</text:p>
          </table:table-cell>
          <table:table-cell table:style-name="TableRowCell" office:value-type="string">
            <text:p text:style-name="Table_20_Contents">10.10.10.1</text:p>
          </table:table-cell>
        </table:table-row>
      </table:table>
      <text:h text:style-name="Heading_20_2" text:outline-level="2"><text:bookmark-start text:name="ssh-access-from-host"/>SSH Access from Host<text:bookmark-end text:name="ssh-access-from-host"/></text:h>
      <text:p text:style-name="First_20_paragraph">From host machine:</text:p>
      <text:p text:style-name="Preformatted_20_Text">
<text:span text:style-name="FunctionTok">ssh</text:span><text:span text:style-name="NormalTok"><text:s text:c="1"/></text:span><text:span text:style-name="AttributeTok">-p</text:span><text:span text:style-name="NormalTok"><text:s text:c="1"/>2221 hpcadmin@localhost</text:span>
</text:p>
      <text:p text:style-name="First_20_paragraph">If the connection works, port forwarding is configured correctly.</text:p>
      <text:h text:style-name="Heading_20_2" text:outline-level="2"><text:bookmark-start text:name="system-update-and-packages"/>System Update and Packages<text:bookmark-end text:name="system-update-and-packages"/></text:h>
      <text:h text:style-name="Heading_20_3" text:outline-level="3"><text:bookmark-start text:name="update-system"/>Update System<text:bookmark-end text:name="update-system"/></text:h>
      <text:p text:style-name="Preformatted_20_Text">
<text:span text:style-name="FunctionTok">sudo</text:span><text:span text:style-name="NormalTok"><text:s text:c="1"/>dnf update </text:span><text:span text:style-name="AttributeTok">-y</text:span>
</text:p>
      <text:h text:style-name="Heading_20_3" text:outline-level="3"><text:bookmark-start text:name="install-base-packages"/>Install Base Packages<text:bookmark-end text:name="install-base-packages"/></text:h>
      <text:p text:style-name="Preformatted_20_Text">
<text:span text:style-name="FunctionTok">sudo</text:span><text:span text:style-name="NormalTok"><text:s text:c="1"/>dnf install </text:span><text:span text:style-name="AttributeTok">-y</text:span><text:span text:style-name="NormalTok"><text:s text:c="1"/></text:span><text:span text:style-name="DataTypeTok">\</text:span>
</text:p>
      <text:p text:style-name="Preformatted_20_Text">
<text:span text:style-name="NormalTok">vim wget curl git </text:span><text:span text:style-name="DataTypeTok">\</text:span>
</text:p>
      <text:p text:style-name="Preformatted_20_Text">
<text:span text:style-name="NormalTok">net-tools bind-utils </text:span><text:span text:style-name="DataTypeTok">\</text:span>
</text:p>
      <text:p text:style-name="Preformatted_20_Text">
<text:span text:style-name="NormalTok">htop tmux tree </text:span><text:span text:style-name="DataTypeTok">\</text:span>
</text:p>
      <text:p text:style-name="Preformatted_20_Text">
<text:span text:style-name="NormalTok">gcc gcc-c++ gcc-gfortran </text:span><text:span text:style-name="DataTypeTok">\</text:span>
</text:p>
      <text:p text:style-name="Preformatted_20_Text">
<text:span text:style-name="NormalTok">make cmake </text:span><text:span text:style-name="DataTypeTok">\</text:span>
</text:p>
      <text:p text:style-name="Preformatted_20_Text">
<text:span text:style-name="NormalTok">python3 </text:span><text:span text:style-name="DataTypeTok">\</text:span>
</text:p>
      <text:p text:style-name="Preformatted_20_Text">
<text:span text:style-name="NormalTok">openssh-server</text:span>
</text:p>
      <text:p text:style-name="First_20_paragraph">These packages provide:</text:p>
      <text:list text:style-name="L18">
        <text:list-item>
          <text:p text:style-name="P48">Development tools</text:p>
        </text:list-item>
        <text:list-item>
          <text:p text:style-name="P48">Network utilities</text:p>
        </text:list-item>
        <text:list-item>
          <text:p text:style-name="P48">Monitoring utilities</text:p>
        </text:list-item>
        <text:list-item>
          <text:p text:style-name="P48">Basic administration tools</text:p>
        </text:list-item>
      </text:list>
      <text:h text:style-name="Heading_20_2" text:outline-level="2"><text:bookmark-start text:name="timezone-configuration"/>Timezone Configuration<text:bookmark-end text:name="timezone-configuration"/></text:h>
      <text:p text:style-name="First_20_paragraph">Check timezone:</text:p>
      <text:p text:style-name="Preformatted_20_Text">
<text:span text:style-name="ExtensionTok">timedatectl</text:span>
</text:p>
      <text:p text:style-name="First_20_paragraph">Set timezone if needed:</text:p>
      <text:p text:style-name="Preformatted_20_Text">
<text:span text:style-name="FunctionTok">sudo</text:span><text:span text:style-name="NormalTok"><text:s text:c="1"/>timedatectl set-timezone Asia/Kolkata</text:span>
</text:p>
      <text:h text:style-name="Heading_20_2" text:outline-level="2"><text:bookmark-start text:name="configure-etchosts"/>Configure /etc/hosts<text:bookmark-end text:name="configure-etchosts"/></text:h>
      <text:p text:style-name="First_20_paragraph">Edit:</text:p>
      <text:p text:style-name="Preformatted_20_Text">
<text:span text:style-name="FunctionTok">sudo</text:span><text:span text:style-name="NormalTok"><text:s text:c="1"/>vim /etc/hosts</text:span>
</text:p>
      <text:p text:style-name="First_20_paragraph">Add:</text:p>
      <text:p text:style-name="P49">10.10.10.1 <text:s text:c="2"/>master master.local</text:p>
      <text:p text:style-name="P50">10.10.10.2 <text:s text:c="2"/>login login.local</text:p>
      <text:p text:style-name="P51">10.10.10.11 <text:s text:c="1"/>compute01 compute01.local</text:p>
      <text:p text:style-name="P52">10.10.10.12 <text:s text:c="1"/>compute02 compute02.local</text:p>
      <text:p text:style-name="P53">10.10.10.13 <text:s text:c="1"/>compute03 compute03.local</text:p>
      <text:p text:style-name="First_20_paragraph">This allows hostname-based communication between nodes.</text:p>
      <text:h text:style-name="Heading_20_2" text:outline-level="2"><text:bookmark-start text:name="disable-firewall-temporary"/>Disable Firewall (Temporary)<text:bookmark-end text:name="disable-firewall-temporary"/></text:h>
      <text:p text:style-name="First_20_paragraph">For initial setup and testing:</text:p>
      <text:p text:style-name="Preformatted_20_Text">
<text:span text:style-name="FunctionTok">sudo</text:span><text:span text:style-name="NormalTok"><text:s text:c="1"/>systemctl disable </text:span><text:span text:style-name="AttributeTok">--now</text:span><text:span text:style-name="NormalTok"><text:s text:c="1"/>firewalld</text:span>
</text:p>
      <text:p text:style-name="First_20_paragraph">NOTE:</text:p>
      <text:p text:style-name="Text_20_body">Firewall rules can be configured properly later after cluster setup is complete.</text:p>
      <text:h text:style-name="Heading_20_2" text:outline-level="2"><text:bookmark-start text:name="selinux-configuration"/>SELinux Configuration<text:bookmark-end text:name="selinux-configuration"/></text:h>
      <text:p text:style-name="First_20_paragraph">Check status:</text:p>
      <text:p text:style-name="Preformatted_20_Text">
<text:span text:style-name="ExtensionTok">getenforce</text:span>
</text:p>
      <text:p text:style-name="First_20_paragraph">Temporarily disable enforcing:</text:p>
      <text:p text:style-name="Preformatted_20_Text">
<text:span text:style-name="FunctionTok">sudo</text:span><text:span text:style-name="NormalTok"><text:s text:c="1"/>setenforce 0</text:span>
</text:p>
      <text:p text:style-name="First_20_paragraph">Persist configuration:</text:p>
      <text:p text:style-name="Preformatted_20_Text">
<text:span text:style-name="FunctionTok">sudo</text:span><text:span text:style-name="NormalTok"><text:s text:c="1"/>vim /etc/selinux/config</text:span>
</text:p>
      <text:p text:style-name="First_20_paragraph">Modify:</text:p>
      <text:p text:style-name="P54">SELINUX=permissive</text:p>
      <text:p text:style-name="First_20_paragraph">This helps avoid permission-related issues during initial cluster setup.</text:p>
      <text:h text:style-name="Heading_20_2" text:outline-level="2"><text:bookmark-start text:name="verify-hostname"/>Verify Hostname<text:bookmark-end text:name="verify-hostname"/></text:h>
      <text:p text:style-name="Preformatted_20_Text">
<text:span text:style-name="ExtensionTok">hostnamectl</text:span>
</text:p>
      <text:p text:style-name="First_20_paragraph">Expected:</text:p>
      <text:p text:style-name="P55">Static hostname: master.local</text:p>
      <text:p text:style-name="First_20_paragraph">If hostname is not updated(showing previous), reboot the machine.</text:p>
      <text:p text:style-name="Text_20_body">At this point, the master node setup is complete and ready for cloning or further cluster configuration.</text:p>
      <text:h text:style-name="Heading_20_1" text:outline-level="1"><text:bookmark-start text:name="cloning-nodes"/>Cloning Nodes<text:bookmark-end text:name="cloning-nodes"/></text:h>
      <text:p text:style-name="First_20_paragraph">Purpose:</text:p>
      <text:list text:style-name="L19">
        <text:list-item>
          <text:p text:style-name="P56">avoid reinstalling all nodes manually</text:p>
        </text:list-item>
        <text:list-item>
          <text:p text:style-name="P56">simulate real HPC image provisioning workflow</text:p>
        </text:list-item>
      </text:list>
      <text:h text:style-name="Heading_20_2" text:outline-level="2"><text:bookmark-start text:name="create-snapshot"/>Create Snapshot<text:bookmark-end text:name="create-snapshot"/></text:h>
      <text:p text:style-name="First_20_paragraph">Power off VM:</text:p>
      <text:p text:style-name="Preformatted_20_Text">
<text:span text:style-name="FunctionTok">sudo</text:span><text:span text:style-name="NormalTok"><text:s text:c="1"/>poweroff</text:span>
</text:p>
      <text:p text:style-name="First_20_paragraph">Create snapshot in VirtualBox:</text:p>
      <text:p text:style-name="P57">clean-base-master</text:p>
      <text:h text:style-name="Heading_20_2" text:outline-level="2"><text:bookmark-start text:name="clone-nodes"/>Clone Nodes<text:bookmark-end text:name="clone-nodes"/></text:h>
      <text:p text:style-name="First_20_paragraph">Create FULL CLONES.</text:p>
      <text:p text:style-name="Text_20_body">IMPORTANT: Enable:</text:p>
      <text:p text:style-name="P58">Reinitialize the MAC address of all network cards</text:p>
      <text:h text:style-name="Heading_20_2" text:outline-level="2"><text:bookmark-start text:name="clone-names"/>Clone Names<text:bookmark-end text:name="clone-names"/></text:h>
      <table:table table:name="Table12" table:style-name="Table12">
        <table:table-column table:style-name="Table12.A"/>
        <table:table-header-rows>
          <table:table-row>
            <table:table-cell table:style-name="TableHeaderRowCell" office:value-type="string">
              <text:p text:style-name="Table_20_Heading">VM Name</text:p>
            </table:table-cell>
          </table:table-row>
        </table:table-header-rows>
        <table:table-row>
          <table:table-cell table:style-name="TableRowCell" office:value-type="string">
            <text:p text:style-name="Table_20_Contents">login</text:p>
          </table:table-cell>
        </table:table-row>
        <table:table-row>
          <table:table-cell table:style-name="TableRowCell" office:value-type="string">
            <text:p text:style-name="Table_20_Contents">compute01</text:p>
          </table:table-cell>
        </table:table-row>
        <table:table-row>
          <table:table-cell table:style-name="TableRowCell" office:value-type="string">
            <text:p text:style-name="Table_20_Contents">compute02</text:p>
          </table:table-cell>
        </table:table-row>
        <table:table-row>
          <table:table-cell table:style-name="TableRowCell" office:value-type="string">
            <text:p text:style-name="Table_20_Contents">compute03</text:p>
          </table:table-cell>
        </table:table-row>
      </table:table>
      <text:h text:style-name="Heading_20_2" text:outline-level="2"><text:bookmark-start text:name="configure-port-forwarding"/>Configure Port Forwarding<text:bookmark-end text:name="configure-port-forwarding"/></text:h>
      <text:h text:style-name="Heading_20_3" text:outline-level="3"><text:bookmark-start text:name="login-node-2"/>Login Node<text:bookmark-end text:name="login-node-2"/></text:h>
      <table:table table:name="Table13" table:style-name="Table13">
        <table:table-column table:style-name="Table13.A"/>
        <table:table-column table:style-name="Table13.B"/>
        <table:table-header-rows>
          <table:table-row>
            <table:table-cell table:style-name="TableHeaderRowCell" office:value-type="string">
              <text:p text:style-name="Table_20_Heading">Host Port</text:p>
            </table:table-cell>
            <table:table-cell table:style-name="TableHeaderRowCell" office:value-type="string">
              <text:p text:style-name="Table_20_Heading">Guest Port</text:p>
            </table:table-cell>
          </table:table-row>
        </table:table-header-rows>
        <table:table-row>
          <table:table-cell table:style-name="TableRowCell" office:value-type="string">
            <text:p text:style-name="Table_20_Contents">2222</text:p>
          </table:table-cell>
          <table:table-cell table:style-name="TableRowCell" office:value-type="string">
            <text:p text:style-name="Table_20_Contents">22</text:p>
          </table:table-cell>
        </table:table-row>
      </table:table>
      <text:h text:style-name="Heading_20_3" text:outline-level="3"><text:bookmark-start text:name="compute01"/>Compute01<text:bookmark-end text:name="compute01"/></text:h>
      <table:table table:name="Table14" table:style-name="Table14">
        <table:table-column table:style-name="Table14.A"/>
        <table:table-column table:style-name="Table14.B"/>
        <table:table-header-rows>
          <table:table-row>
            <table:table-cell table:style-name="TableHeaderRowCell" office:value-type="string">
              <text:p text:style-name="Table_20_Heading">Host Port</text:p>
            </table:table-cell>
            <table:table-cell table:style-name="TableHeaderRowCell" office:value-type="string">
              <text:p text:style-name="Table_20_Heading">Guest Port</text:p>
            </table:table-cell>
          </table:table-row>
        </table:table-header-rows>
        <table:table-row>
          <table:table-cell table:style-name="TableRowCell" office:value-type="string">
            <text:p text:style-name="Table_20_Contents">2223</text:p>
          </table:table-cell>
          <table:table-cell table:style-name="TableRowCell" office:value-type="string">
            <text:p text:style-name="Table_20_Contents">22</text:p>
          </table:table-cell>
        </table:table-row>
      </table:table>
      <text:h text:style-name="Heading_20_3" text:outline-level="3"><text:bookmark-start text:name="compute02"/>Compute02<text:bookmark-end text:name="compute02"/></text:h>
      <table:table table:name="Table15" table:style-name="Table15">
        <table:table-column table:style-name="Table15.A"/>
        <table:table-column table:style-name="Table15.B"/>
        <table:table-header-rows>
          <table:table-row>
            <table:table-cell table:style-name="TableHeaderRowCell" office:value-type="string">
              <text:p text:style-name="Table_20_Heading">Host Port</text:p>
            </table:table-cell>
            <table:table-cell table:style-name="TableHeaderRowCell" office:value-type="string">
              <text:p text:style-name="Table_20_Heading">Guest Port</text:p>
            </table:table-cell>
          </table:table-row>
        </table:table-header-rows>
        <table:table-row>
          <table:table-cell table:style-name="TableRowCell" office:value-type="string">
            <text:p text:style-name="Table_20_Contents">2224</text:p>
          </table:table-cell>
          <table:table-cell table:style-name="TableRowCell" office:value-type="string">
            <text:p text:style-name="Table_20_Contents">22</text:p>
          </table:table-cell>
        </table:table-row>
      </table:table>
      <text:h text:style-name="Heading_20_3" text:outline-level="3"><text:bookmark-start text:name="compute03"/>Compute03<text:bookmark-end text:name="compute03"/></text:h>
      <table:table table:name="Table16" table:style-name="Table16">
        <table:table-column table:style-name="Table16.A"/>
        <table:table-column table:style-name="Table16.B"/>
        <table:table-header-rows>
          <table:table-row>
            <table:table-cell table:style-name="TableHeaderRowCell" office:value-type="string">
              <text:p text:style-name="Table_20_Heading">Host Port</text:p>
            </table:table-cell>
            <table:table-cell table:style-name="TableHeaderRowCell" office:value-type="string">
              <text:p text:style-name="Table_20_Heading">Guest Port</text:p>
            </table:table-cell>
          </table:table-row>
        </table:table-header-rows>
        <table:table-row>
          <table:table-cell table:style-name="TableRowCell" office:value-type="string">
            <text:p text:style-name="Table_20_Contents">2225</text:p>
          </table:table-cell>
          <table:table-cell table:style-name="TableRowCell" office:value-type="string">
            <text:p text:style-name="Table_20_Contents">22</text:p>
          </table:table-cell>
        </table:table-row>
      </table:table>
      <text:h text:style-name="Heading_20_2" text:outline-level="2"><text:bookmark-start text:name="machine-id-regeneration"/>Machine ID Regeneration<text:bookmark-end text:name="machine-id-regeneration"/></text:h>
      <text:p text:style-name="First_20_paragraph">IMPORTANT: Each cloned Linux machine must have unique machine-id.</text:p>
      <text:h text:style-name="Heading_20_2" text:outline-level="2"><text:bookmark-start text:name="remove-existing-machine-id"/>Remove Existing Machine ID<text:bookmark-end text:name="remove-existing-machine-id"/></text:h>
      <text:p text:style-name="Preformatted_20_Text">
<text:span text:style-name="FunctionTok">sudo</text:span><text:span text:style-name="NormalTok"><text:s text:c="1"/>rm </text:span><text:span text:style-name="AttributeTok">-f</text:span><text:span text:style-name="NormalTok"><text:s text:c="1"/>/etc/machine-id</text:span>
</text:p>
      <text:h text:style-name="Heading_20_2" text:outline-level="2"><text:bookmark-start text:name="generate-new-machine-id"/>Generate New Machine ID<text:bookmark-end text:name="generate-new-machine-id"/></text:h>
      <text:p text:style-name="Preformatted_20_Text">
<text:span text:style-name="FunctionTok">sudo</text:span><text:span text:style-name="NormalTok"><text:s text:c="1"/>systemd-machine-id-setup</text:span>
</text:p>
      <text:h text:style-name="Heading_20_2" text:outline-level="2"><text:bookmark-start text:name="verify-machine-id"/>Verify Machine ID<text:bookmark-end text:name="verify-machine-id"/></text:h>
      <text:p text:style-name="Preformatted_20_Text">
<text:span text:style-name="FunctionTok">cat</text:span><text:span text:style-name="NormalTok"><text:s text:c="1"/>/etc/machine-id</text:span>
</text:p>
      <text:p text:style-name="First_20_paragraph">Ensure every node has unique machine-id.</text:p>
      <text:h text:style-name="Heading_20_2" text:outline-level="2"><text:bookmark-start text:name="configure-hostname"/>Configure Hostname<text:bookmark-end text:name="configure-hostname"/></text:h>
      <text:h text:style-name="Heading_20_3" text:outline-level="3"><text:bookmark-start text:name="login-node-3"/>Login Node<text:bookmark-end text:name="login-node-3"/></text:h>
      <text:p text:style-name="First_20_paragraph">Edit hostname:</text:p>
      <text:p text:style-name="Preformatted_20_Text">
<text:span text:style-name="FunctionTok">sudo</text:span><text:span text:style-name="NormalTok"><text:s text:c="1"/>vim /etc/hostname</text:span>
</text:p>
      <text:p text:style-name="First_20_paragraph">Set:</text:p>
      <text:p text:style-name="P59">login.local</text:p>
      <text:p text:style-name="First_20_paragraph">Apply:</text:p>
      <text:p text:style-name="Preformatted_20_Text">
<text:span text:style-name="FunctionTok">sudo</text:span><text:span text:style-name="NormalTok"><text:s text:c="1"/>hostnamectl set-hostname login.local</text:span>
</text:p>
      <text:h text:style-name="Heading_20_3" text:outline-level="3"><text:bookmark-start text:name="compute01-1"/>Compute01<text:bookmark-end text:name="compute01-1"/></text:h>
      <text:p text:style-name="First_20_paragraph">Set hostname:</text:p>
      <text:p text:style-name="P60">compute01.local</text:p>
      <text:p text:style-name="First_20_paragraph">Apply:</text:p>
      <text:p text:style-name="Preformatted_20_Text">
<text:span text:style-name="FunctionTok">sudo</text:span><text:span text:style-name="NormalTok"><text:s text:c="1"/>hostnamectl set-hostname compute01.local</text:span>
</text:p>
      <text:h text:style-name="Heading_20_3" text:outline-level="3"><text:bookmark-start text:name="compute02-1"/>Compute02<text:bookmark-end text:name="compute02-1"/></text:h>
      <text:p text:style-name="P61">compute02.local</text:p>
      <text:p text:style-name="Preformatted_20_Text">
<text:span text:style-name="FunctionTok">sudo</text:span><text:span text:style-name="NormalTok"><text:s text:c="1"/>hostnamectl set-hostname compute02.local</text:span>
</text:p>
      <text:h text:style-name="Heading_20_3" text:outline-level="3"><text:bookmark-start text:name="compute03-1"/>Compute03<text:bookmark-end text:name="compute03-1"/></text:h>
      <text:p text:style-name="P62">compute03.local</text:p>
      <text:p text:style-name="Preformatted_20_Text">
<text:span text:style-name="FunctionTok">sudo</text:span><text:span text:style-name="NormalTok"><text:s text:c="1"/>hostnamectl set-hostname compute03.local</text:span>
</text:p>
      <text:h text:style-name="Heading_20_2" text:outline-level="2"><text:bookmark-start text:name="configure-static-internal-ips"/>Configure Static Internal IPs<text:bookmark-end text:name="configure-static-internal-ips"/></text:h>
      <text:p text:style-name="First_20_paragraph">Launch:</text:p>
      <text:p text:style-name="Preformatted_20_Text">
<text:span text:style-name="FunctionTok">sudo</text:span><text:span text:style-name="NormalTok"><text:s text:c="1"/>nmtui</text:span>
</text:p>
      <text:p text:style-name="First_20_paragraph">Edit internal adapter:</text:p>
      <text:p text:style-name="P63">enp0s8</text:p>
      <text:h text:style-name="Heading_20_3" text:outline-level="3"><text:bookmark-start text:name="login-node-4"/>Login Node<text:bookmark-end text:name="login-node-4"/></text:h>
      <text:p text:style-name="P64">10.10.10.2/24</text:p>
      <text:h text:style-name="Heading_20_3" text:outline-level="3"><text:bookmark-start text:name="compute01-2"/>Compute01<text:bookmark-end text:name="compute01-2"/></text:h>
      <text:p text:style-name="P65">10.10.10.11/24</text:p>
      <text:h text:style-name="Heading_20_3" text:outline-level="3"><text:bookmark-start text:name="compute02-2"/>Compute02<text:bookmark-end text:name="compute02-2"/></text:h>
      <text:p text:style-name="P66">10.10.10.12/24</text:p>
      <text:h text:style-name="Heading_20_3" text:outline-level="3"><text:bookmark-start text:name="compute03-2"/>Compute03<text:bookmark-end text:name="compute03-2"/></text:h>
      <text:p text:style-name="P67">10.10.10.13/24</text:p>
      <text:h text:style-name="Heading_20_2" text:outline-level="2"><text:bookmark-start text:name="restart-networking-1"/>Restart Networking<text:bookmark-end text:name="restart-networking-1"/></text:h>
      <text:p text:style-name="Preformatted_20_Text">
<text:span text:style-name="FunctionTok">sudo</text:span><text:span text:style-name="NormalTok"><text:s text:c="1"/>systemctl restart NetworkManager</text:span>
</text:p>
      <text:h text:style-name="Heading_20_2" text:outline-level="2"><text:bookmark-start text:name="verify-networking-1"/>Verify Networking<text:bookmark-end text:name="verify-networking-1"/></text:h>
      <text:p text:style-name="Preformatted_20_Text">
<text:span text:style-name="ExtensionTok">ip</text:span><text:span text:style-name="NormalTok"><text:s text:c="1"/>addr</text:span>
</text:p>
      <text:h text:style-name="Heading_20_2" text:outline-level="2"><text:bookmark-start text:name="verify-routing"/>Verify Routing<text:bookmark-end text:name="verify-routing"/></text:h>
      <text:p text:style-name="Preformatted_20_Text">
<text:span text:style-name="ExtensionTok">ip</text:span><text:span text:style-name="NormalTok"><text:s text:c="1"/>route</text:span>
</text:p>
      <text:p text:style-name="First_20_paragraph">Expected:</text:p>
      <text:p text:style-name="P68">default via 10.0.2.2 dev enp0s3</text:p>
      <text:p text:style-name="P69">10.10.10.0/24 dev enp0s8</text:p>
      <text:h text:style-name="Heading_20_2" text:outline-level="2"><text:bookmark-start text:name="verify-connectivity"/>Verify Connectivity<text:bookmark-end text:name="verify-connectivity"/></text:h>
      <text:h text:style-name="Heading_20_3" text:outline-level="3"><text:bookmark-start text:name="ping-between-nodes"/>Ping Between Nodes<text:bookmark-end text:name="ping-between-nodes"/></text:h>
      <text:p text:style-name="Preformatted_20_Text">
<text:span text:style-name="FunctionTok">ping</text:span><text:span text:style-name="NormalTok"><text:s text:c="1"/>master</text:span>
</text:p>
      <text:p text:style-name="Preformatted_20_Text">
<text:span text:style-name="FunctionTok">ping</text:span><text:span text:style-name="NormalTok"><text:s text:c="1"/>login</text:span>
</text:p>
      <text:p text:style-name="Preformatted_20_Text">
<text:span text:style-name="FunctionTok">ping</text:span><text:span text:style-name="NormalTok"><text:s text:c="1"/>compute01</text:span>
</text:p>
      <text:h text:style-name="Heading_20_2" text:outline-level="2"><text:bookmark-start text:name="ssh-verification"/>SSH Verification<text:bookmark-end text:name="ssh-verification"/></text:h>
      <text:p text:style-name="First_20_paragraph">From host:</text:p>
      <text:h text:style-name="Heading_20_3" text:outline-level="3"><text:bookmark-start text:name="master"/>Master<text:bookmark-end text:name="master"/></text:h>
      <text:p text:style-name="Preformatted_20_Text">
<text:span text:style-name="FunctionTok">ssh</text:span><text:span text:style-name="NormalTok"><text:s text:c="1"/></text:span><text:span text:style-name="AttributeTok">-p</text:span><text:span text:style-name="NormalTok"><text:s text:c="1"/>2221 hpcadmin@localhost</text:span>
</text:p>
      <text:h text:style-name="Heading_20_3" text:outline-level="3"><text:bookmark-start text:name="login"/>Login<text:bookmark-end text:name="login"/></text:h>
      <text:p text:style-name="Preformatted_20_Text">
<text:span text:style-name="FunctionTok">ssh</text:span><text:span text:style-name="NormalTok"><text:s text:c="1"/></text:span><text:span text:style-name="AttributeTok">-p</text:span><text:span text:style-name="NormalTok"><text:s text:c="1"/>2222 hpcadmin@localhost</text:span>
</text:p>
      <text:h text:style-name="Heading_20_3" text:outline-level="3"><text:bookmark-start text:name="compute01-3"/>Compute01<text:bookmark-end text:name="compute01-3"/></text:h>
      <text:p text:style-name="Preformatted_20_Text">
<text:span text:style-name="FunctionTok">ssh</text:span><text:span text:style-name="NormalTok"><text:s text:c="1"/></text:span><text:span text:style-name="AttributeTok">-p</text:span><text:span text:style-name="NormalTok"><text:s text:c="1"/>2223 hpcadmin@localhost</text:span>
</text:p>
      <text:h text:style-name="Heading_20_3" text:outline-level="3"><text:bookmark-start text:name="compute02-3"/>Compute02<text:bookmark-end text:name="compute02-3"/></text:h>
      <text:p text:style-name="Preformatted_20_Text">
<text:span text:style-name="FunctionTok">ssh</text:span><text:span text:style-name="NormalTok"><text:s text:c="1"/></text:span><text:span text:style-name="AttributeTok">-p</text:span><text:span text:style-name="NormalTok"><text:s text:c="1"/>2224 hpcadmin@localhost</text:span>
</text:p>
      <text:h text:style-name="Heading_20_3" text:outline-level="3"><text:bookmark-start text:name="compute03-3"/>Compute03<text:bookmark-end text:name="compute03-3"/></text:h>
      <text:p text:style-name="Preformatted_20_Text">
<text:span text:style-name="FunctionTok">ssh</text:span><text:span text:style-name="NormalTok"><text:s text:c="1"/></text:span><text:span text:style-name="AttributeTok">-p</text:span><text:span text:style-name="NormalTok"><text:s text:c="1"/>2225 hpcadmin@localhost</text:span>
</text:p>
      <text:h text:style-name="Heading_20_1" text:outline-level="1"><text:bookmark-start text:name="shared-infrastructure-services"/>Shared Infrastructure Services<text:bookmark-end text:name="shared-infrastructure-services"/></text:h>
      <text:p text:style-name="First_20_paragraph">Goal:</text:p>
      <text:p text:style-name="Text_20_body">Transform the cluster into a realistic HPC-style shared environment.</text:p>
      <text:p text:style-name="Text_20_body">This phase includes:</text:p>
      <text:list text:style-name="L20">
        <text:list-item>
          <text:p text:style-name="P70">passwordless SSH</text:p>
        </text:list-item>
        <text:list-item>
          <text:p text:style-name="P70">shared home directories</text:p>
        </text:list-item>
        <text:list-item>
          <text:p text:style-name="P70">NFS server/client configuration</text:p>
        </text:list-item>
        <text:list-item>
          <text:p text:style-name="P70">persistent mounts</text:p>
        </text:list-item>
        <text:list-item>
          <text:p text:style-name="P70">multi-node shared filesystem verification</text:p>
        </text:list-item>
      </text:list>
      <text:p text:style-name="First_20_paragraph">By the end of this phase:</text:p>
      <text:list text:style-name="L21">
        <text:list-item>
          <text:p text:style-name="P71">all nodes share same /home</text:p>
        </text:list-item>
        <text:list-item>
          <text:p text:style-name="P71">users can access same files from all nodes</text:p>
        </text:list-item>
        <text:list-item>
          <text:p text:style-name="P71">cluster behaves like a real HPC environment</text:p>
        </text:list-item>
      </text:list>
      <text:h text:style-name="Heading_20_2" text:outline-level="2"><text:bookmark-start text:name="cluster-role-architecture"/>Cluster Role Architecture<text:bookmark-end text:name="cluster-role-architecture"/></text:h>
      <text:h text:style-name="Heading_20_3" text:outline-level="3"><text:bookmark-start text:name="master-node-2"/>Master Node<text:bookmark-end text:name="master-node-2"/></text:h>
      <text:p text:style-name="First_20_paragraph">Purpose:</text:p>
      <text:list text:style-name="L22">
        <text:list-item>
          <text:p text:style-name="P72">cluster management</text:p>
        </text:list-item>
        <text:list-item>
          <text:p text:style-name="P72">NFS server</text:p>
        </text:list-item>
        <text:list-item>
          <text:p text:style-name="P72">future Slurm controller</text:p>
        </text:list-item>
        <text:list-item>
          <text:p text:style-name="P72">future Munge authority</text:p>
        </text:list-item>
        <text:list-item>
          <text:p text:style-name="P72">future LDAP server</text:p>
        </text:list-item>
      </text:list>
      <text:p text:style-name="First_20_paragraph">Services:</text:p>
      <table:table table:name="Table17" table:style-name="Table17">
        <table:table-column table:style-name="Table17.A"/>
        <table:table-column table:style-name="Table17.B"/>
        <table:table-header-rows>
          <table:table-row>
            <table:table-cell table:style-name="TableHeaderRowCell" office:value-type="string">
              <text:p text:style-name="Table_20_Heading">Service</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nfs-server</text:p>
          </table:table-cell>
          <table:table-cell table:style-name="TableRowCell" office:value-type="string">
            <text:p text:style-name="Table_20_Contents">shared storage</text:p>
          </table:table-cell>
        </table:table-row>
        <table:table-row>
          <table:table-cell table:style-name="TableRowCell" office:value-type="string">
            <text:p text:style-name="Table_20_Contents">future slurmctld</text:p>
          </table:table-cell>
          <table:table-cell table:style-name="TableRowCell" office:value-type="string">
            <text:p text:style-name="Table_20_Contents">scheduler controller</text:p>
          </table:table-cell>
        </table:table-row>
        <table:table-row>
          <table:table-cell table:style-name="TableRowCell" office:value-type="string">
            <text:p text:style-name="Table_20_Contents">future munge</text:p>
          </table:table-cell>
          <table:table-cell table:style-name="TableRowCell" office:value-type="string">
            <text:p text:style-name="Table_20_Contents">authentication</text:p>
          </table:table-cell>
        </table:table-row>
      </table:table>
      <text:h text:style-name="Heading_20_3" text:outline-level="3"><text:bookmark-start text:name="login-node-5"/>Login Node<text:bookmark-end text:name="login-node-5"/></text:h>
      <text:p text:style-name="First_20_paragraph">Purpose:</text:p>
      <text:list text:style-name="L23">
        <text:list-item>
          <text:p text:style-name="P73">user login</text:p>
        </text:list-item>
        <text:list-item>
          <text:p text:style-name="P73">compilation</text:p>
        </text:list-item>
        <text:list-item>
          <text:p text:style-name="P73">job submission</text:p>
        </text:list-item>
      </text:list>
      <text:p text:style-name="First_20_paragraph">Users should:</text:p>
      <text:list text:style-name="L24">
        <text:list-item>
          <text:p text:style-name="P74">SSH into login node</text:p>
        </text:list-item>
        <text:list-item>
          <text:p text:style-name="P74">compile programs</text:p>
        </text:list-item>
        <text:list-item>
          <text:p text:style-name="P74">submit jobs using Slurm</text:p>
        </text:list-item>
      </text:list>
      <text:h text:style-name="Heading_20_3" text:outline-level="3"><text:bookmark-start text:name="compute-nodes-2"/>Compute Nodes<text:bookmark-end text:name="compute-nodes-2"/></text:h>
      <text:p text:style-name="First_20_paragraph">Purpose:</text:p>
      <text:list text:style-name="L25">
        <text:list-item>
          <text:p text:style-name="P75">execute jobs only</text:p>
        </text:list-item>
      </text:list>
      <text:p text:style-name="First_20_paragraph">Future services:</text:p>
      <table:table table:name="Table18" table:style-name="Table18">
        <table:table-column table:style-name="Table18.A"/>
        <table:table-column table:style-name="Table18.B"/>
        <table:table-header-rows>
          <table:table-row>
            <table:table-cell table:style-name="TableHeaderRowCell" office:value-type="string">
              <text:p text:style-name="Table_20_Heading">Service</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slurmd</text:p>
          </table:table-cell>
          <table:table-cell table:style-name="TableRowCell" office:value-type="string">
            <text:p text:style-name="Table_20_Contents">compute daemon</text:p>
          </table:table-cell>
        </table:table-row>
        <table:table-row>
          <table:table-cell table:style-name="TableRowCell" office:value-type="string">
            <text:p text:style-name="Table_20_Contents">munge</text:p>
          </table:table-cell>
          <table:table-cell table:style-name="TableRowCell" office:value-type="string">
            <text:p text:style-name="Table_20_Contents">authentication</text:p>
          </table:table-cell>
        </table:table-row>
      </table:table>
      <text:h text:style-name="Heading_20_2" text:outline-level="2"><text:bookmark-start text:name="verify-user-consistency"/>Verify User Consistency<text:bookmark-end text:name="verify-user-consistency"/></text:h>
      <text:p text:style-name="First_20_paragraph">IMPORTANT:</text:p>
      <text:p text:style-name="Text_20_body">NFS shared storage requires same UID/GID across all nodes.</text:p>
      <text:p text:style-name="Text_20_body">Verify user identity on all nodes:</text:p>
      <text:p text:style-name="Preformatted_20_Text">
<text:span text:style-name="FunctionTok">id</text:span><text:span text:style-name="NormalTok"><text:s text:c="1"/>hpcadmin</text:span>
</text:p>
      <text:p text:style-name="First_20_paragraph">Expected:</text:p>
      <text:p text:style-name="P76">uid=1000(hpcadmin) gid=1000(hpcadmin)</text:p>
      <text:p text:style-name="First_20_paragraph">All nodes must match.</text:p>
      <text:h text:style-name="Heading_20_2" text:outline-level="2"><text:bookmark-start text:name="passwordless-ssh-configuration"/>Passwordless SSH Configuration<text:bookmark-end text:name="passwordless-ssh-configuration"/></text:h>
      <text:p text:style-name="First_20_paragraph">Purpose:</text:p>
      <text:list text:style-name="L26">
        <text:list-item>
          <text:p text:style-name="P77">MPI communication</text:p>
        </text:list-item>
        <text:list-item>
          <text:p text:style-name="P77">Slurm execution</text:p>
        </text:list-item>
        <text:list-item>
          <text:p text:style-name="P77">cluster automation</text:p>
        </text:list-item>
        <text:list-item>
          <text:p text:style-name="P77">remote management</text:p>
        </text:list-item>
      </text:list>
      <text:p text:style-name="First_20_paragraph">SSH trust is generated ONLY from login node.</text:p>
      <text:p text:style-name="Text_20_body">This mimics real HPC architecture:</text:p>
      <text:p text:style-name="P78">User -&gt; Login Node -&gt; Compute Nodes</text:p>
      <text:h text:style-name="Heading_20_2" text:outline-level="2"><text:bookmark-start text:name="generate-ssh-key-on-login-node"/>Generate SSH Key on Login Node<text:bookmark-end text:name="generate-ssh-key-on-login-node"/></text:h>
      <text:p text:style-name="First_20_paragraph">SSH into login node from host:</text:p>
      <text:p text:style-name="Preformatted_20_Text">
<text:span text:style-name="FunctionTok">ssh</text:span><text:span text:style-name="NormalTok"><text:s text:c="1"/></text:span><text:span text:style-name="AttributeTok">-p</text:span><text:span text:style-name="NormalTok"><text:s text:c="1"/>2222 hpcadmin@localhost</text:span>
</text:p>
      <text:p text:style-name="First_20_paragraph">Generate SSH key:</text:p>
      <text:p text:style-name="Preformatted_20_Text">
<text:span text:style-name="FunctionTok">ssh-keygen</text:span>
</text:p>
      <text:p text:style-name="First_20_paragraph">Press Enter for all prompts.</text:p>
      <text:p text:style-name="Text_20_body">Generated files:</text:p>
      <text:p text:style-name="P79">~/.ssh/id_rsa</text:p>
      <text:p text:style-name="P80">~/.ssh/id_rsa.pub</text:p>
      <text:h text:style-name="Heading_20_2" text:outline-level="2"><text:bookmark-start text:name="copy-ssh-keys-to-cluster-nodes"/>Copy SSH Keys to Cluster Nodes<text:bookmark-end text:name="copy-ssh-keys-to-cluster-nodes"/></text:h>
      <text:h text:style-name="Heading_20_3" text:outline-level="3"><text:bookmark-start text:name="master-1"/>Master<text:bookmark-end text:name="master-1"/></text:h>
      <text:p text:style-name="Preformatted_20_Text">
<text:span text:style-name="ExtensionTok">ssh-copy-id</text:span><text:span text:style-name="NormalTok"><text:s text:c="1"/>hpcadmin@master</text:span>
</text:p>
      <text:h text:style-name="Heading_20_3" text:outline-level="3"><text:bookmark-start text:name="compute01-4"/>Compute01<text:bookmark-end text:name="compute01-4"/></text:h>
      <text:p text:style-name="Preformatted_20_Text">
<text:span text:style-name="ExtensionTok">ssh-copy-id</text:span><text:span text:style-name="NormalTok"><text:s text:c="1"/>hpcadmin@compute01</text:span>
</text:p>
      <text:h text:style-name="Heading_20_3" text:outline-level="3"><text:bookmark-start text:name="compute02-4"/>Compute02<text:bookmark-end text:name="compute02-4"/></text:h>
      <text:p text:style-name="Preformatted_20_Text">
<text:span text:style-name="ExtensionTok">ssh-copy-id</text:span><text:span text:style-name="NormalTok"><text:s text:c="1"/>hpcadmin@compute02</text:span>
</text:p>
      <text:h text:style-name="Heading_20_3" text:outline-level="3"><text:bookmark-start text:name="compute03-4"/>Compute03<text:bookmark-end text:name="compute03-4"/></text:h>
      <text:p text:style-name="Preformatted_20_Text">
<text:span text:style-name="ExtensionTok">ssh-copy-id</text:span><text:span text:style-name="NormalTok"><text:s text:c="1"/>hpcadmin@compute03</text:span>
</text:p>
      <text:h text:style-name="Heading_20_2" text:outline-level="2"><text:bookmark-start text:name="verify-passwordless-ssh"/>Verify Passwordless SSH<text:bookmark-end text:name="verify-passwordless-ssh"/></text:h>
      <text:h text:style-name="Heading_20_3" text:outline-level="3"><text:bookmark-start text:name="test-master"/>Test Master<text:bookmark-end text:name="test-master"/></text:h>
      <text:p text:style-name="Preformatted_20_Text">
<text:span text:style-name="FunctionTok">ssh</text:span><text:span text:style-name="NormalTok"><text:s text:c="1"/>master hostname</text:span>
</text:p>
      <text:p text:style-name="First_20_paragraph">Expected:</text:p>
      <text:p text:style-name="P81">master.local</text:p>
      <text:h text:style-name="Heading_20_3" text:outline-level="3"><text:bookmark-start text:name="test-compute01"/>Test Compute01<text:bookmark-end text:name="test-compute01"/></text:h>
      <text:p text:style-name="Preformatted_20_Text">
<text:span text:style-name="FunctionTok">ssh</text:span><text:span text:style-name="NormalTok"><text:s text:c="1"/>compute01 hostname</text:span>
</text:p>
      <text:p text:style-name="First_20_paragraph">Expected:</text:p>
      <text:p text:style-name="P82">compute01.local</text:p>
      <text:h text:style-name="Heading_20_3" text:outline-level="3"><text:bookmark-start text:name="test-compute02"/>Test Compute02<text:bookmark-end text:name="test-compute02"/></text:h>
      <text:p text:style-name="Preformatted_20_Text">
<text:span text:style-name="FunctionTok">ssh</text:span><text:span text:style-name="NormalTok"><text:s text:c="1"/>compute02 hostname</text:span>
</text:p>
      <text:h text:style-name="Heading_20_3" text:outline-level="3"><text:bookmark-start text:name="test-compute03"/>Test Compute03<text:bookmark-end text:name="test-compute03"/></text:h>
      <text:p text:style-name="Preformatted_20_Text">
<text:span text:style-name="FunctionTok">ssh</text:span><text:span text:style-name="NormalTok"><text:s text:c="1"/>compute03 hostname</text:span>
</text:p>
      <text:p text:style-name="First_20_paragraph">No password prompts should appear.</text:p>
      <text:h text:style-name="Heading_20_2" text:outline-level="2"><text:bookmark-start text:name="hpc-concept-why-passwordless-ssh-matters"/>HPC Concept — Why Passwordless SSH Matters<text:bookmark-end text:name="hpc-concept-why-passwordless-ssh-matters"/></text:h>
      <text:p text:style-name="First_20_paragraph">Passwordless SSH becomes essential for:</text:p>
      <table:table table:name="Table19" table:style-name="Table19">
        <table:table-column table:style-name="Table19.A"/>
        <table:table-column table:style-name="Table19.B"/>
        <table:table-header-rows>
          <table:table-row>
            <table:table-cell table:style-name="TableHeaderRowCell" office:value-type="string">
              <text:p text:style-name="Table_20_Heading">Feature</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MPI</text:p>
          </table:table-cell>
          <table:table-cell table:style-name="TableRowCell" office:value-type="string">
            <text:p text:style-name="Table_20_Contents">remote process launch</text:p>
          </table:table-cell>
        </table:table-row>
        <table:table-row>
          <table:table-cell table:style-name="TableRowCell" office:value-type="string">
            <text:p text:style-name="Table_20_Contents">Slurm</text:p>
          </table:table-cell>
          <table:table-cell table:style-name="TableRowCell" office:value-type="string">
            <text:p text:style-name="Table_20_Contents">distributed execution</text:p>
          </table:table-cell>
        </table:table-row>
        <table:table-row>
          <table:table-cell table:style-name="TableRowCell" office:value-type="string">
            <text:p text:style-name="Table_20_Contents">automation</text:p>
          </table:table-cell>
          <table:table-cell table:style-name="TableRowCell" office:value-type="string">
            <text:p text:style-name="Table_20_Contents">orchestration</text:p>
          </table:table-cell>
        </table:table-row>
        <table:table-row>
          <table:table-cell table:style-name="TableRowCell" office:value-type="string">
            <text:p text:style-name="Table_20_Contents">monitoring</text:p>
          </table:table-cell>
          <table:table-cell table:style-name="TableRowCell" office:value-type="string">
            <text:p text:style-name="Table_20_Contents">remote administration</text:p>
          </table:table-cell>
        </table:table-row>
      </table:table>
      <text:h text:style-name="Heading_20_2" text:outline-level="2"><text:bookmark-start text:name="nfs-shared-storage-setup"/>NFS Shared Storage Setup<text:bookmark-end text:name="nfs-shared-storage-setup"/></text:h>
      <text:p text:style-name="First_20_paragraph">Purpose:</text:p>
      <text:p text:style-name="Text_20_body">Provide shared home directories across all cluster nodes.</text:p>
      <text:p text:style-name="Text_20_body">This is a core HPC architecture requirement.</text:p>
      <text:p text:style-name="Text_20_body">Without shared storage:</text:p>
      <text:list text:style-name="L27">
        <text:list-item>
          <text:p text:style-name="P83">source code differs per node</text:p>
        </text:list-item>
        <text:list-item>
          <text:p text:style-name="P83">binaries differ</text:p>
        </text:list-item>
        <text:list-item>
          <text:p text:style-name="P83">scripts unavailable across nodes</text:p>
        </text:list-item>
        <text:list-item>
          <text:p text:style-name="P83">MPI execution becomes difficult</text:p>
        </text:list-item>
      </text:list>
      <text:p text:style-name="First_20_paragraph">Real HPC systems commonly use:</text:p>
      <text:list text:style-name="L28">
        <text:list-item>
          <text:p text:style-name="P84">NFS</text:p>
        </text:list-item>
        <text:list-item>
          <text:p text:style-name="P84">Lustre</text:p>
        </text:list-item>
        <text:list-item>
          <text:p text:style-name="P84">BeeGFS</text:p>
        </text:list-item>
        <text:list-item>
          <text:p text:style-name="P84">GPFS</text:p>
        </text:list-item>
      </text:list>
      <text:p text:style-name="First_20_paragraph">This lab begins with NFS.</text:p>
      <text:h text:style-name="Heading_20_2" text:outline-level="2"><text:bookmark-start text:name="install-nfs-packages"/>Install NFS Packages<text:bookmark-end text:name="install-nfs-packages"/></text:h>
      <text:p text:style-name="First_20_paragraph">Install on ALL nodes:</text:p>
      <text:p text:style-name="Preformatted_20_Text">
<text:span text:style-name="FunctionTok">sudo</text:span><text:span text:style-name="NormalTok"><text:s text:c="1"/>dnf install </text:span><text:span text:style-name="AttributeTok">-y</text:span><text:span text:style-name="NormalTok"><text:s text:c="1"/>nfs-utils</text:span>
</text:p>
      <text:h text:style-name="Heading_20_2" text:outline-level="2"><text:bookmark-start text:name="configure-nfs-server-on-master"/>Configure NFS Server on Master<text:bookmark-end text:name="configure-nfs-server-on-master"/></text:h>
      <text:p text:style-name="First_20_paragraph">SSH into master node.</text:p>
      <text:h text:style-name="Heading_20_2" text:outline-level="2"><text:bookmark-start text:name="enable-nfs-services"/>Enable NFS Services<text:bookmark-end text:name="enable-nfs-services"/></text:h>
      <text:p text:style-name="Preformatted_20_Text">
<text:span text:style-name="FunctionTok">sudo</text:span><text:span text:style-name="NormalTok"><text:s text:c="1"/>systemctl enable </text:span><text:span text:style-name="AttributeTok">--now</text:span><text:span text:style-name="NormalTok"><text:s text:c="1"/>nfs-server</text:span>
</text:p>
      <text:p text:style-name="First_20_paragraph">Verify:</text:p>
      <text:p text:style-name="Preformatted_20_Text">
<text:span text:style-name="ExtensionTok">systemctl</text:span><text:span text:style-name="NormalTok"><text:s text:c="1"/>status nfs-server</text:span>
</text:p>
      <text:p text:style-name="First_20_paragraph">Expected:</text:p>
      <text:p text:style-name="P85">active (running)</text:p>
      <text:h text:style-name="Heading_20_2" text:outline-level="2"><text:bookmark-start text:name="configure-nfs-exports"/>Configure NFS Exports<text:bookmark-end text:name="configure-nfs-exports"/></text:h>
      <text:p text:style-name="First_20_paragraph">Edit exports file:</text:p>
      <text:p text:style-name="Preformatted_20_Text">
<text:span text:style-name="FunctionTok">sudo</text:span><text:span text:style-name="NormalTok"><text:s text:c="1"/>vim /etc/exports</text:span>
</text:p>
      <text:p text:style-name="First_20_paragraph">Add:</text:p>
      <text:p text:style-name="P86">/home 10.10.10.0/24(rw,sync,no_root_squash)</text:p>
      <text:h text:style-name="Heading_20_2" text:outline-level="2"><text:bookmark-start text:name="export-option-explanation"/>Export Option Explanation<text:bookmark-end text:name="export-option-explanation"/></text:h>
      <table:table table:name="Table20" table:style-name="Table20">
        <table:table-column table:style-name="Table20.A"/>
        <table:table-column table:style-name="Table20.B"/>
        <table:table-header-rows>
          <table:table-row>
            <table:table-cell table:style-name="TableHeaderRowCell" office:value-type="string">
              <text:p text:style-name="Table_20_Heading">Option</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rw</text:p>
          </table:table-cell>
          <table:table-cell table:style-name="TableRowCell" office:value-type="string">
            <text:p text:style-name="Table_20_Contents">read/write access</text:p>
          </table:table-cell>
        </table:table-row>
        <table:table-row>
          <table:table-cell table:style-name="TableRowCell" office:value-type="string">
            <text:p text:style-name="Table_20_Contents">sync</text:p>
          </table:table-cell>
          <table:table-cell table:style-name="TableRowCell" office:value-type="string">
            <text:p text:style-name="Table_20_Contents">synchronous writes</text:p>
          </table:table-cell>
        </table:table-row>
        <table:table-row>
          <table:table-cell table:style-name="TableRowCell" office:value-type="string">
            <text:p text:style-name="Table_20_Contents">no<text:span text:style-name="T2">rootsquash</text:span></text:p>
          </table:table-cell>
          <table:table-cell table:style-name="TableRowCell" office:value-type="string">
            <text:p text:style-name="Table_20_Contents">preserve root privileges</text:p>
          </table:table-cell>
        </table:table-row>
      </table:table>
      <text:h text:style-name="Heading_20_2" text:outline-level="2"><text:bookmark-start text:name="apply-exports"/>Apply Exports<text:bookmark-end text:name="apply-exports"/></text:h>
      <text:p text:style-name="Preformatted_20_Text">
<text:span text:style-name="FunctionTok">sudo</text:span><text:span text:style-name="NormalTok"><text:s text:c="1"/>exportfs </text:span><text:span text:style-name="AttributeTok">-rav</text:span>
</text:p>
      <text:h text:style-name="Heading_20_2" text:outline-level="2"><text:bookmark-start text:name="verify-exports"/>Verify Exports<text:bookmark-end text:name="verify-exports"/></text:h>
      <text:p text:style-name="Preformatted_20_Text">
<text:span text:style-name="FunctionTok">sudo</text:span><text:span text:style-name="NormalTok"><text:s text:c="1"/>exportfs </text:span><text:span text:style-name="AttributeTok">-v</text:span>
</text:p>
      <text:p text:style-name="First_20_paragraph">Expected export:</text:p>
      <text:p text:style-name="P87">/home 10.10.10.0/24(...)</text:p>
      <text:h text:style-name="Heading_20_2" text:outline-level="2"><text:bookmark-start text:name="configure-nfs-clients"/>Configure NFS Clients<text:bookmark-end text:name="configure-nfs-clients"/></text:h>
      <text:p text:style-name="First_20_paragraph">Perform on:</text:p>
      <text:list text:style-name="L29">
        <text:list-item>
          <text:p text:style-name="P88">login</text:p>
        </text:list-item>
        <text:list-item>
          <text:p text:style-name="P88">compute01</text:p>
        </text:list-item>
        <text:list-item>
          <text:p text:style-name="P88">compute02</text:p>
        </text:list-item>
        <text:list-item>
          <text:p text:style-name="P88">compute03</text:p>
        </text:list-item>
      </text:list>
      <text:h text:style-name="Heading_20_2" text:outline-level="2"><text:bookmark-start text:name="backup-existing-home-directory"/>Backup Existing Home Directory<text:bookmark-end text:name="backup-existing-home-directory"/></text:h>
      <text:p text:style-name="Preformatted_20_Text">
<text:span text:style-name="FunctionTok">sudo</text:span><text:span text:style-name="NormalTok"><text:s text:c="1"/>mv /home /home.local</text:span>
</text:p>
      <text:p text:style-name="First_20_paragraph">Purpose:</text:p>
      <text:p text:style-name="Text_20_body">Preserve original local home directory.</text:p>
      <text:h text:style-name="Heading_20_2" text:outline-level="2"><text:bookmark-start text:name="create-new-mount-point"/>Create New Mount Point<text:bookmark-end text:name="create-new-mount-point"/></text:h>
      <text:p text:style-name="Preformatted_20_Text">
<text:span text:style-name="FunctionTok">sudo</text:span><text:span text:style-name="NormalTok"><text:s text:c="1"/>mkdir /home</text:span>
</text:p>
      <text:h text:style-name="Heading_20_2" text:outline-level="2"><text:bookmark-start text:name="mount-shared-nfs-home"/>Mount Shared NFS Home<text:bookmark-end text:name="mount-shared-nfs-home"/></text:h>
      <text:p text:style-name="Preformatted_20_Text">
<text:span text:style-name="FunctionTok">sudo</text:span><text:span text:style-name="NormalTok"><text:s text:c="1"/>mount master:/home /home</text:span>
</text:p>
      <text:h text:style-name="Heading_20_2" text:outline-level="2"><text:bookmark-start text:name="verify-mount"/>Verify Mount<text:bookmark-end text:name="verify-mount"/></text:h>
      <text:p text:style-name="Preformatted_20_Text">
<text:span text:style-name="FunctionTok">df</text:span><text:span text:style-name="NormalTok"><text:s text:c="1"/></text:span><text:span text:style-name="AttributeTok">-h</text:span>
</text:p>
      <text:p text:style-name="First_20_paragraph">Expected:</text:p>
      <text:p text:style-name="P89">master:/home</text:p>
      <text:p text:style-name="First_20_paragraph">mounted on:</text:p>
      <text:p text:style-name="P90">/home</text:p>
      <text:h text:style-name="Heading_20_2" text:outline-level="2"><text:bookmark-start text:name="verify-shared-filesystem"/>Verify Shared Filesystem<text:bookmark-end text:name="verify-shared-filesystem"/></text:h>
      <text:p text:style-name="First_20_paragraph">From login node:</text:p>
      <text:p text:style-name="Preformatted_20_Text">
<text:span text:style-name="FunctionTok">touch</text:span><text:span text:style-name="NormalTok"><text:s text:c="1"/>~/shared_test</text:span>
</text:p>
      <text:p text:style-name="First_20_paragraph">From compute01:</text:p>
      <text:p text:style-name="Preformatted_20_Text">
<text:span text:style-name="FunctionTok">ls</text:span><text:span text:style-name="NormalTok"><text:s text:c="1"/>~</text:span>
</text:p>
      <text:p text:style-name="First_20_paragraph">Expected:</text:p>
      <text:p text:style-name="P91">shared_test</text:p>
      <text:p text:style-name="First_20_paragraph">This confirms successful shared filesystem operation.</text:p>
      <text:h text:style-name="Heading_20_2" text:outline-level="2"><text:bookmark-start text:name="configure-persistent-nfs-mounts"/>Configure Persistent NFS Mounts<text:bookmark-end text:name="configure-persistent-nfs-mounts"/></text:h>
      <text:p text:style-name="First_20_paragraph">Without this configuration:</text:p>
      <text:list text:style-name="L30">
        <text:list-item>
          <text:p text:style-name="P92">NFS mount disappears after reboot</text:p>
        </text:list-item>
      </text:list>
      <text:h text:style-name="Heading_20_2" text:outline-level="2"><text:bookmark-start text:name="configure-etcfstab"/>Configure /etc/fstab<text:bookmark-end text:name="configure-etcfstab"/></text:h>
      <text:p text:style-name="First_20_paragraph">On ALL client nodes:</text:p>
      <text:p text:style-name="Preformatted_20_Text">
<text:span text:style-name="FunctionTok">sudo</text:span><text:span text:style-name="NormalTok"><text:s text:c="1"/>vim /etc/fstab</text:span>
</text:p>
      <text:p text:style-name="First_20_paragraph">Add:</text:p>
      <text:p text:style-name="P93">master:/home <text:s text:c="2"/>/home <text:s text:c="2"/>nfs <text:s text:c="2"/>defaults <text:s text:c="2"/>0 0</text:p>
      <text:h text:style-name="Heading_20_2" text:outline-level="2"><text:bookmark-start text:name="verify-fstab-before-reboot"/>Verify fstab Before Reboot<text:bookmark-end text:name="verify-fstab-before-reboot"/></text:h>
      <text:p text:style-name="First_20_paragraph">IMPORTANT:</text:p>
      <text:p text:style-name="Text_20_body">Always validate fstab before rebooting.</text:p>
      <text:p text:style-name="Text_20_body">Run:</text:p>
      <text:p text:style-name="Preformatted_20_Text">
<text:span text:style-name="FunctionTok">sudo</text:span><text:span text:style-name="NormalTok"><text:s text:c="1"/>mount </text:span><text:span text:style-name="AttributeTok">-a</text:span>
</text:p>
      <text:p text:style-name="First_20_paragraph">If no errors appear:</text:p>
      <text:list text:style-name="L31">
        <text:list-item>
          <text:p text:style-name="P94">fstab configuration is correct</text:p>
        </text:list-item>
      </text:list>
      <text:h text:style-name="Heading_20_2" text:outline-level="2"><text:bookmark-start text:name="reboot-validation-procedure"/>Reboot Validation Procedure<text:bookmark-end text:name="reboot-validation-procedure"/></text:h>
      <text:p text:style-name="First_20_paragraph">Purpose:</text:p>
      <text:p text:style-name="Text_20_body">Validate persistent cluster infrastructure after reboot.</text:p>
      <text:p text:style-name="Text_20_body">This is important real-world HPC administration practice.</text:p>
      <text:h text:style-name="Heading_20_2" text:outline-level="2"><text:bookmark-start text:name="reboot-order"/>Reboot Order<text:bookmark-end text:name="reboot-order"/></text:h>
      <text:h text:style-name="Heading_20_3" text:outline-level="3"><text:bookmark-start text:name="reboot-master-first"/>Reboot Master First<text:bookmark-end text:name="reboot-master-first"/></text:h>
      <text:p text:style-name="Preformatted_20_Text">
<text:span text:style-name="FunctionTok">sudo</text:span><text:span text:style-name="NormalTok"><text:s text:c="1"/>reboot</text:span>
</text:p>
      <text:p text:style-name="First_20_paragraph">Wait until:</text:p>
      <text:list text:style-name="L32">
        <text:list-item>
          <text:p text:style-name="P95">SSH becomes available</text:p>
        </text:list-item>
        <text:list-item>
          <text:p text:style-name="P95">NFS server active</text:p>
        </text:list-item>
      </text:list>
      <text:p text:style-name="First_20_paragraph">Verify:</text:p>
      <text:p text:style-name="Preformatted_20_Text">
<text:span text:style-name="ExtensionTok">systemctl</text:span><text:span text:style-name="NormalTok"><text:s text:c="1"/>status nfs-server</text:span>
</text:p>
      <text:h text:style-name="Heading_20_3" text:outline-level="3"><text:bookmark-start text:name="reboot-login-node"/>Reboot Login Node<text:bookmark-end text:name="reboot-login-node"/></text:h>
      <text:p text:style-name="Preformatted_20_Text">
<text:span text:style-name="FunctionTok">sudo</text:span><text:span text:style-name="NormalTok"><text:s text:c="1"/>reboot</text:span>
</text:p>
      <text:h text:style-name="Heading_20_3" text:outline-level="3"><text:bookmark-start text:name="reboot-compute-nodes"/>Reboot Compute Nodes<text:bookmark-end text:name="reboot-compute-nodes"/></text:h>
      <text:p text:style-name="Preformatted_20_Text">
<text:span text:style-name="FunctionTok">sudo</text:span><text:span text:style-name="NormalTok"><text:s text:c="1"/>reboot</text:span>
</text:p>
      <text:p text:style-name="First_20_paragraph">Perform for:</text:p>
      <text:list text:style-name="L33">
        <text:list-item>
          <text:p text:style-name="P96">compute01</text:p>
        </text:list-item>
        <text:list-item>
          <text:p text:style-name="P96">compute02</text:p>
        </text:list-item>
        <text:list-item>
          <text:p text:style-name="P96">compute03</text:p>
        </text:list-item>
      </text:list>
      <text:h text:style-name="Heading_20_2" text:outline-level="2"><text:bookmark-start text:name="verify-persistent-mounts-after-reboot"/>Verify Persistent Mounts After Reboot<text:bookmark-end text:name="verify-persistent-mounts-after-reboot"/></text:h>
      <text:p text:style-name="First_20_paragraph">On login node:</text:p>
      <text:p text:style-name="Preformatted_20_Text">
<text:span text:style-name="FunctionTok">df</text:span><text:span text:style-name="NormalTok"><text:s text:c="1"/></text:span><text:span text:style-name="AttributeTok">-h</text:span>
</text:p>
      <text:p text:style-name="First_20_paragraph">Expected:</text:p>
      <text:p text:style-name="P97">master:/home</text:p>
      <text:p text:style-name="First_20_paragraph">mounted automatically.</text:p>
      <text:h text:style-name="Heading_20_2" text:outline-level="2"><text:bookmark-start text:name="verify-active-nfs-mount"/>Verify Active NFS Mount<text:bookmark-end text:name="verify-active-nfs-mount"/></text:h>
      <text:p text:style-name="Preformatted_20_Text">
<text:span text:style-name="FunctionTok">mount</text:span><text:span text:style-name="NormalTok"><text:s text:c="1"/></text:span><text:span text:style-name="KeywordTok">|</text:span><text:span text:style-name="NormalTok"><text:s text:c="1"/></text:span><text:span text:style-name="FunctionTok">grep</text:span><text:span text:style-name="NormalTok"><text:s text:c="1"/>home</text:span>
</text:p>
      <text:p text:style-name="First_20_paragraph">Expected:</text:p>
      <text:p text:style-name="P98">master:/home on /home type nfs</text:p>
      <text:h text:style-name="Heading_20_2" text:outline-level="2"><text:bookmark-start text:name="verify-shared-files-after-reboot"/>Verify Shared Files After Reboot<text:bookmark-end text:name="verify-shared-files-after-reboot"/></text:h>
      <text:p text:style-name="Preformatted_20_Text">
<text:span text:style-name="FunctionTok">ls</text:span><text:span text:style-name="NormalTok"><text:s text:c="1"/>~</text:span>
</text:p>
      <text:p text:style-name="First_20_paragraph">Expected:</text:p>
      <text:list text:style-name="L34">
        <text:list-item>
          <text:p text:style-name="P99">previously created shared files still visible</text:p>
        </text:list-item>
      </text:list>
      <text:h text:style-name="Heading_20_1" text:outline-level="1"><text:bookmark-start text:name="munge-authentication-slurm-scheduler"/>Munge Authentication + Slurm Scheduler<text:bookmark-end text:name="munge-authentication-slurm-scheduler"/></text:h>
      <text:p text:style-name="First_20_paragraph">Goal:</text:p>
      <text:p text:style-name="Text_20_body">Transform the cluster into a scheduler-managed HPC environment.</text:p>
      <text:p text:style-name="Text_20_body">This phase includes:</text:p>
      <text:list text:style-name="L35">
        <text:list-item>
          <text:p text:style-name="P100">Munge authentication</text:p>
        </text:list-item>
        <text:list-item>
          <text:p text:style-name="P100">Slurm controller setup</text:p>
        </text:list-item>
        <text:list-item>
          <text:p text:style-name="P100">Compute node daemon setup</text:p>
        </text:list-item>
        <text:list-item>
          <text:p text:style-name="P100">Scheduler configuration</text:p>
        </text:list-item>
        <text:list-item>
          <text:p text:style-name="P100">Partition creation</text:p>
        </text:list-item>
        <text:list-item>
          <text:p text:style-name="P100">Multi-node execution</text:p>
        </text:list-item>
        <text:list-item>
          <text:p text:style-name="P100">Resource allocation testing</text:p>
        </text:list-item>
      </text:list>
      <text:p text:style-name="First_20_paragraph">By the end of this phase:</text:p>
      <text:list text:style-name="L36">
        <text:list-item>
          <text:p text:style-name="P101">cluster nodes authenticate securely</text:p>
        </text:list-item>
        <text:list-item>
          <text:p text:style-name="P101">Slurm manages compute resources</text:p>
        </text:list-item>
        <text:list-item>
          <text:p text:style-name="P101">jobs execute across nodes</text:p>
        </text:list-item>
        <text:list-item>
          <text:p text:style-name="P101">scheduler topology becomes operational</text:p>
        </text:list-item>
      </text:list>
      <text:h text:style-name="Heading_20_2" text:outline-level="2"><text:bookmark-start text:name="hpc-scheduler-architecture"/>HPC Scheduler Architecture<text:bookmark-end text:name="hpc-scheduler-architecture"/></text:h>
      <text:h text:style-name="Heading_20_3" text:outline-level="3"><text:bookmark-start text:name="master-node-3"/>Master Node<text:bookmark-end text:name="master-node-3"/></text:h>
      <text:p text:style-name="First_20_paragraph">Purpose:</text:p>
      <text:list text:style-name="L37">
        <text:list-item>
          <text:p text:style-name="P102">Slurm controller</text:p>
        </text:list-item>
        <text:list-item>
          <text:p text:style-name="P102">cluster scheduler</text:p>
        </text:list-item>
        <text:list-item>
          <text:p text:style-name="P102">resource manager</text:p>
        </text:list-item>
        <text:list-item>
          <text:p text:style-name="P102">Munge authority</text:p>
        </text:list-item>
      </text:list>
      <text:p text:style-name="First_20_paragraph">Services:</text:p>
      <table:table table:name="Table21" table:style-name="Table21">
        <table:table-column table:style-name="Table21.A"/>
        <table:table-column table:style-name="Table21.B"/>
        <table:table-header-rows>
          <table:table-row>
            <table:table-cell table:style-name="TableHeaderRowCell" office:value-type="string">
              <text:p text:style-name="Table_20_Heading">Service</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munged</text:p>
          </table:table-cell>
          <table:table-cell table:style-name="TableRowCell" office:value-type="string">
            <text:p text:style-name="Table_20_Contents">cluster authentication</text:p>
          </table:table-cell>
        </table:table-row>
        <table:table-row>
          <table:table-cell table:style-name="TableRowCell" office:value-type="string">
            <text:p text:style-name="Table_20_Contents">slurmctld</text:p>
          </table:table-cell>
          <table:table-cell table:style-name="TableRowCell" office:value-type="string">
            <text:p text:style-name="Table_20_Contents">scheduler controller</text:p>
          </table:table-cell>
        </table:table-row>
      </table:table>
      <text:h text:style-name="Heading_20_3" text:outline-level="3"><text:bookmark-start text:name="login-node-6"/>Login Node<text:bookmark-end text:name="login-node-6"/></text:h>
      <text:p text:style-name="First_20_paragraph">Purpose:</text:p>
      <text:list text:style-name="L38">
        <text:list-item>
          <text:p text:style-name="P103">user login</text:p>
        </text:list-item>
        <text:list-item>
          <text:p text:style-name="P103">compilation</text:p>
        </text:list-item>
        <text:list-item>
          <text:p text:style-name="P103">job submission</text:p>
        </text:list-item>
      </text:list>
      <text:p text:style-name="First_20_paragraph">Users should:</text:p>
      <text:list text:style-name="L39">
        <text:list-item>
          <text:p text:style-name="P104">login here</text:p>
        </text:list-item>
        <text:list-item>
          <text:p text:style-name="P104">compile here</text:p>
        </text:list-item>
        <text:list-item>
          <text:p text:style-name="P104">submit jobs here</text:p>
        </text:list-item>
      </text:list>
      <text:h text:style-name="Heading_20_3" text:outline-level="3"><text:bookmark-start text:name="compute-nodes-3"/>Compute Nodes<text:bookmark-end text:name="compute-nodes-3"/></text:h>
      <text:p text:style-name="First_20_paragraph">Purpose:</text:p>
      <text:list text:style-name="L40">
        <text:list-item>
          <text:p text:style-name="P105">execute jobs</text:p>
        </text:list-item>
      </text:list>
      <text:p text:style-name="First_20_paragraph">Services:</text:p>
      <table:table table:name="Table22" table:style-name="Table22">
        <table:table-column table:style-name="Table22.A"/>
        <table:table-column table:style-name="Table22.B"/>
        <table:table-header-rows>
          <table:table-row>
            <table:table-cell table:style-name="TableHeaderRowCell" office:value-type="string">
              <text:p text:style-name="Table_20_Heading">Service</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munged</text:p>
          </table:table-cell>
          <table:table-cell table:style-name="TableRowCell" office:value-type="string">
            <text:p text:style-name="Table_20_Contents">authentication</text:p>
          </table:table-cell>
        </table:table-row>
        <table:table-row>
          <table:table-cell table:style-name="TableRowCell" office:value-type="string">
            <text:p text:style-name="Table_20_Contents">slurmd</text:p>
          </table:table-cell>
          <table:table-cell table:style-name="TableRowCell" office:value-type="string">
            <text:p text:style-name="Table_20_Contents">compute execution daemon</text:p>
          </table:table-cell>
        </table:table-row>
      </table:table>
      <text:h text:style-name="Heading_20_2" text:outline-level="2"><text:bookmark-start text:name="important-rocky-linux-10-issue"/>IMPORTANT Rocky Linux 10 Issue<text:bookmark-end text:name="important-rocky-linux-10-issue"/></text:h>
      <text:p text:style-name="First_20_paragraph">Originally the cluster was created using:</text:p>
      <text:p text:style-name="P106">Rocky Linux 10</text:p>
      <text:p text:style-name="First_20_paragraph">Problem encountered:</text:p>
      <text:p text:style-name="P107">No match for argument: slurm</text:p>
      <text:p text:style-name="First_20_paragraph">Reason:</text:p>
      <text:list text:style-name="L41">
        <text:list-item>
          <text:p text:style-name="P108">Rocky Linux 10 HPC ecosystem still immature</text:p>
        </text:list-item>
        <text:list-item>
          <text:p text:style-name="P108">Slurm packages unavailable in standard repos</text:p>
        </text:list-item>
        <text:list-item>
          <text:p text:style-name="P108">OpenHPC EL10 support incomplete</text:p>
        </text:list-item>
      </text:list>
      <text:p text:style-name="First_20_paragraph">Resolution:</text:p>
      <text:list text:style-name="L42">
        <text:list-item>
          <text:p text:style-name="P109">cluster rebuilt using Rocky Linux 9 Minimal</text:p>
        </text:list-item>
      </text:list>
      <text:p text:style-name="First_20_paragraph">Important HPC lesson:</text:p>
      <text:p text:style-name="Text_20_body">Production HPC clusters usually avoid bleeding-edge enterprise releases because:</text:p>
      <text:list text:style-name="L43">
        <text:list-item>
          <text:p text:style-name="P110">scheduler ecosystems lag behind</text:p>
        </text:list-item>
        <text:list-item>
          <text:p text:style-name="P110">HPC repos may not exist</text:p>
        </text:list-item>
        <text:list-item>
          <text:p text:style-name="P110">compatibility becomes unstable</text:p>
        </text:list-item>
      </text:list>
      <text:h text:style-name="Heading_20_2" text:outline-level="2"><text:bookmark-start text:name="install-epel-repository"/>Install EPEL Repository<text:bookmark-end text:name="install-epel-repository"/></text:h>
      <text:p text:style-name="First_20_paragraph">Install on ALL nodes:</text:p>
      <text:p text:style-name="Preformatted_20_Text">
<text:span text:style-name="FunctionTok">sudo</text:span><text:span text:style-name="NormalTok"><text:s text:c="1"/>dnf install </text:span><text:span text:style-name="AttributeTok">-y</text:span><text:span text:style-name="NormalTok"><text:s text:c="1"/>epel-release</text:span>
</text:p>
      <text:h text:style-name="Heading_20_2" text:outline-level="2"><text:bookmark-start text:name="enable-crb-repository"/>Enable CRB Repository<text:bookmark-end text:name="enable-crb-repository"/></text:h>
      <text:p text:style-name="First_20_paragraph">Required on Rocky Linux 9 and 10.</text:p>
      <text:p text:style-name="Text_20_body">Install on ALL nodes:</text:p>
      <text:p text:style-name="Preformatted_20_Text">
<text:span text:style-name="FunctionTok">sudo</text:span><text:span text:style-name="NormalTok"><text:s text:c="1"/>crb enable</text:span>
</text:p>
      <text:h text:style-name="Heading_20_2" text:outline-level="2"><text:bookmark-start text:name="install-munge-slurm-packages"/>Install Munge + Slurm Packages<text:bookmark-end text:name="install-munge-slurm-packages"/></text:h>
      <text:p text:style-name="First_20_paragraph">Install on ALL nodes:</text:p>
      <text:p text:style-name="Preformatted_20_Text">
<text:span text:style-name="FunctionTok">sudo</text:span><text:span text:style-name="NormalTok"><text:s text:c="1"/>dnf install </text:span><text:span text:style-name="AttributeTok">-y</text:span><text:span text:style-name="NormalTok"><text:s text:c="1"/></text:span><text:span text:style-name="DataTypeTok">\</text:span>
</text:p>
      <text:p text:style-name="Preformatted_20_Text">
<text:span text:style-name="NormalTok">munge munge-libs </text:span><text:span text:style-name="DataTypeTok">\</text:span>
</text:p>
      <text:p text:style-name="Preformatted_20_Text">
<text:span text:style-name="NormalTok">slurm slurm-slurmd slurm-slurmctld</text:span>
</text:p>
      <text:h text:style-name="Heading_20_2" text:outline-level="2"><text:bookmark-start text:name="verify-installed-packages"/>Verify Installed Packages<text:bookmark-end text:name="verify-installed-packages"/></text:h>
      <text:h text:style-name="Heading_20_3" text:outline-level="3"><text:bookmark-start text:name="verify-munge"/>Verify Munge<text:bookmark-end text:name="verify-munge"/></text:h>
      <text:p text:style-name="Preformatted_20_Text">
<text:span text:style-name="ExtensionTok">rpm</text:span><text:span text:style-name="NormalTok"><text:s text:c="1"/></text:span><text:span text:style-name="AttributeTok">-qa</text:span><text:span text:style-name="NormalTok"><text:s text:c="1"/></text:span><text:span text:style-name="KeywordTok">|</text:span><text:span text:style-name="NormalTok"><text:s text:c="1"/></text:span><text:span text:style-name="FunctionTok">grep</text:span><text:span text:style-name="NormalTok"><text:s text:c="1"/>munge</text:span>
</text:p>
      <text:p text:style-name="First_20_paragraph">Expected:</text:p>
      <text:p text:style-name="P111">munge</text:p>
      <text:p text:style-name="P112">munge-libs</text:p>
      <text:h text:style-name="Heading_20_3" text:outline-level="3"><text:bookmark-start text:name="verify-slurm"/>Verify Slurm<text:bookmark-end text:name="verify-slurm"/></text:h>
      <text:p text:style-name="Preformatted_20_Text">
<text:span text:style-name="ExtensionTok">rpm</text:span><text:span text:style-name="NormalTok"><text:s text:c="1"/></text:span><text:span text:style-name="AttributeTok">-qa</text:span><text:span text:style-name="NormalTok"><text:s text:c="1"/></text:span><text:span text:style-name="KeywordTok">|</text:span><text:span text:style-name="NormalTok"><text:s text:c="1"/></text:span><text:span text:style-name="FunctionTok">grep</text:span><text:span text:style-name="NormalTok"><text:s text:c="1"/>slurm</text:span>
</text:p>
      <text:p text:style-name="First_20_paragraph">Expected:</text:p>
      <text:p text:style-name="P113">slurm</text:p>
      <text:p text:style-name="P114">slurm-slurmd</text:p>
      <text:p text:style-name="P115">slurm-slurmctld</text:p>
      <text:h text:style-name="Heading_20_2" text:outline-level="2"><text:bookmark-start text:name="verify-system-users"/>Verify System Users<text:bookmark-end text:name="verify-system-users"/></text:h>
      <text:h text:style-name="Heading_20_3" text:outline-level="3"><text:bookmark-start text:name="verify-munge-user"/>Verify Munge User<text:bookmark-end text:name="verify-munge-user"/></text:h>
      <text:p text:style-name="Preformatted_20_Text">
<text:span text:style-name="FunctionTok">id</text:span><text:span text:style-name="NormalTok"><text:s text:c="1"/>munge</text:span>
</text:p>
      <text:h text:style-name="Heading_20_3" text:outline-level="3"><text:bookmark-start text:name="verify-slurm-user"/>Verify Slurm User<text:bookmark-end text:name="verify-slurm-user"/></text:h>
      <text:p text:style-name="Preformatted_20_Text">
<text:span text:style-name="FunctionTok">id</text:span><text:span text:style-name="NormalTok"><text:s text:c="1"/>slurm</text:span>
</text:p>
      <text:h text:style-name="Heading_20_2" text:outline-level="2"><text:bookmark-start text:name="important-issue-encountered-missing-slurm-user"/>IMPORTANT Issue Encountered — Missing slurm User<text:bookmark-end text:name="important-issue-encountered-missing-slurm-user"/></text:h>
      <text:p text:style-name="First_20_paragraph">Problem:</text:p>
      <text:p text:style-name="P116">id: 'slurm': no such user</text:p>
      <text:p text:style-name="First_20_paragraph">Reason:</text:p>
      <text:p text:style-name="Text_20_body">Some Slurm packages on Rocky Linux do not automatically create the slurm user.</text:p>
      <text:p text:style-name="Text_20_body">Resolution:</text:p>
      <text:p text:style-name="Text_20_body">Create manually on ALL nodes.</text:p>
      <text:h text:style-name="Heading_20_2" text:outline-level="2"><text:bookmark-start text:name="create-slurm-group"/>Create Slurm Group<text:bookmark-end text:name="create-slurm-group"/></text:h>
      <text:p text:style-name="Preformatted_20_Text">
<text:span text:style-name="FunctionTok">sudo</text:span><text:span text:style-name="NormalTok"><text:s text:c="1"/>groupadd slurm</text:span>
</text:p>
      <text:h text:style-name="Heading_20_2" text:outline-level="2"><text:bookmark-start text:name="create-slurm-user"/>Create Slurm User<text:bookmark-end text:name="create-slurm-user"/></text:h>
      <text:p text:style-name="Preformatted_20_Text">
<text:span text:style-name="FunctionTok">sudo</text:span><text:span text:style-name="NormalTok"><text:s text:c="1"/>useradd </text:span><text:span text:style-name="AttributeTok">-r</text:span><text:span text:style-name="NormalTok"><text:s text:c="1"/></text:span><text:span text:style-name="AttributeTok">-g</text:span><text:span text:style-name="NormalTok"><text:s text:c="1"/>slurm </text:span><text:span text:style-name="AttributeTok">-s</text:span><text:span text:style-name="NormalTok"><text:s text:c="1"/>/sbin/nologin slurm</text:span>
</text:p>
      <text:p text:style-name="First_20_paragraph">Explanation:</text:p>
      <table:table table:name="Table23" table:style-name="Table23">
        <table:table-column table:style-name="Table23.A"/>
        <table:table-column table:style-name="Table23.B"/>
        <table:table-header-rows>
          <table:table-row>
            <table:table-cell table:style-name="TableHeaderRowCell" office:value-type="string">
              <text:p text:style-name="Table_20_Heading">Option</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r</text:p>
          </table:table-cell>
          <table:table-cell table:style-name="TableRowCell" office:value-type="string">
            <text:p text:style-name="Table_20_Contents">system account</text:p>
          </table:table-cell>
        </table:table-row>
        <table:table-row>
          <table:table-cell table:style-name="TableRowCell" office:value-type="string">
            <text:p text:style-name="Table_20_Contents">-g slurm</text:p>
          </table:table-cell>
          <table:table-cell table:style-name="TableRowCell" office:value-type="string">
            <text:p text:style-name="Table_20_Contents">primary group</text:p>
          </table:table-cell>
        </table:table-row>
        <table:table-row>
          <table:table-cell table:style-name="TableRowCell" office:value-type="string">
            <text:p text:style-name="Table_20_Contents">-s /sbin/nologin</text:p>
          </table:table-cell>
          <table:table-cell table:style-name="TableRowCell" office:value-type="string">
            <text:p text:style-name="Table_20_Contents">disable shell login</text:p>
          </table:table-cell>
        </table:table-row>
      </table:table>
      <text:h text:style-name="Heading_20_2" text:outline-level="2"><text:bookmark-start text:name="verify-slurm-user-1"/>Verify Slurm User<text:bookmark-end text:name="verify-slurm-user-1"/></text:h>
      <text:p text:style-name="Preformatted_20_Text">
<text:span text:style-name="FunctionTok">id</text:span><text:span text:style-name="NormalTok"><text:s text:c="1"/>slurm</text:span>
</text:p>
      <text:p text:style-name="First_20_paragraph">Expected:</text:p>
      <text:p text:style-name="P117">uid=...</text:p>
      <text:p text:style-name="P118">gid=...</text:p>
      <text:h text:style-name="Heading_20_2" text:outline-level="2"><text:bookmark-start text:name="important-hpc-security-concept"/>IMPORTANT HPC Security Concept<text:bookmark-end text:name="important-hpc-security-concept"/></text:h>
      <text:p text:style-name="First_20_paragraph">Cluster daemons should not run permanently as root.</text:p>
      <text:p text:style-name="Text_20_body">Therefore:</text:p>
      <text:list text:style-name="L44">
        <text:list-item>
          <text:p text:style-name="P119">Munge runs as munge user</text:p>
        </text:list-item>
        <text:list-item>
          <text:p text:style-name="P119">Slurm runs as slurm user</text:p>
        </text:list-item>
      </text:list>
      <text:p text:style-name="First_20_paragraph">This is standard enterprise daemon security practice.</text:p>
      <text:h text:style-name="Heading_20_2" text:outline-level="2"><text:bookmark-start text:name="configure-munge-authentication"/>Configure Munge Authentication<text:bookmark-end text:name="configure-munge-authentication"/></text:h>
      <text:p text:style-name="First_20_paragraph">Purpose:</text:p>
      <text:p text:style-name="Text_20_body">Create secure trust relationship between all cluster nodes.</text:p>
      <text:p text:style-name="Text_20_body">IMPORTANT:</text:p>
      <text:p text:style-name="Text_20_body">All nodes MUST use the same:</text:p>
      <text:p text:style-name="P120">/etc/munge/munge.key</text:p>
      <text:p text:style-name="First_20_paragraph">This key acts as the cluster-wide shared secret.</text:p>
      <text:h text:style-name="Heading_20_2" text:outline-level="2"><text:bookmark-start text:name="generate-munge-key-on-master"/>Generate Munge Key on Master<text:bookmark-end text:name="generate-munge-key-on-master"/></text:h>
      <text:p text:style-name="First_20_paragraph">ONLY on master node:</text:p>
      <text:p text:style-name="Preformatted_20_Text">
<text:span text:style-name="FunctionTok">sudo</text:span><text:span text:style-name="NormalTok"><text:s text:c="1"/>/usr/sbin/create-munge-key</text:span>
</text:p>
      <text:h text:style-name="Heading_20_2" text:outline-level="2"><text:bookmark-start text:name="verify-munge-key"/>Verify Munge Key<text:bookmark-end text:name="verify-munge-key"/></text:h>
      <text:p text:style-name="Preformatted_20_Text">
<text:span text:style-name="FunctionTok">ls</text:span><text:span text:style-name="NormalTok"><text:s text:c="1"/></text:span><text:span text:style-name="AttributeTok">-l</text:span><text:span text:style-name="NormalTok"><text:s text:c="1"/>/etc/munge/munge.key</text:span>
</text:p>
      <text:p text:style-name="First_20_paragraph">Expected:</text:p>
      <text:p text:style-name="P121">-rw-------</text:p>
      <text:p text:style-name="First_20_paragraph">owned by:</text:p>
      <text:p text:style-name="P122">munge munge</text:p>
      <text:h text:style-name="Heading_20_2" text:outline-level="2"><text:bookmark-start text:name="important-mistake-encountered-munge-key-generated-on-all-nodes"/>IMPORTANT Mistake Encountered — Munge Key Generated on All Nodes<text:bookmark-end text:name="important-mistake-encountered-munge-key-generated-on-all-nodes"/></text:h>
      <text:p text:style-name="First_20_paragraph">Problem:</text:p>
      <text:p text:style-name="Text_20_body">Munge key accidentally generated independently on all nodes.</text:p>
      <text:p text:style-name="Text_20_body">Result:</text:p>
      <text:p text:style-name="Text_20_body">Nodes could not authenticate each other.</text:p>
      <text:p text:style-name="Text_20_body">Important HPC lesson:</text:p>
      <text:p text:style-name="Text_20_body">Munge works using a:</text:p>
      <text:p text:style-name="P123">shared trust model</text:p>
      <text:p text:style-name="First_20_paragraph">All nodes MUST share identical munge.key.</text:p>
      <text:h text:style-name="Heading_20_2" text:outline-level="2"><text:bookmark-start text:name="correct-munge-key-distribution"/>Correct Munge Key Distribution<text:bookmark-end text:name="correct-munge-key-distribution"/></text:h>
      <text:h text:style-name="Heading_20_3" text:outline-level="3"><text:bookmark-start text:name="copy-key-temporarily"/>Copy Key Temporarily<text:bookmark-end text:name="copy-key-temporarily"/></text:h>
      <text:p text:style-name="First_20_paragraph">On master:</text:p>
      <text:p text:style-name="Preformatted_20_Text">
<text:span text:style-name="FunctionTok">sudo</text:span><text:span text:style-name="NormalTok"><text:s text:c="1"/>cp /etc/munge/munge.key /tmp/</text:span>
</text:p>
      <text:h text:style-name="Heading_20_3" text:outline-level="3"><text:bookmark-start text:name="temporary-permission-adjustment"/>Temporary Permission Adjustment<text:bookmark-end text:name="temporary-permission-adjustment"/></text:h>
      <text:p text:style-name="Preformatted_20_Text">
<text:span text:style-name="FunctionTok">sudo</text:span><text:span text:style-name="NormalTok"><text:s text:c="1"/>chmod 644 /tmp/munge.key</text:span>
</text:p>
      <text:p text:style-name="First_20_paragraph">Purpose:</text:p>
      <text:p text:style-name="Text_20_body">Allow normal user SCP transfer.</text:p>
      <text:h text:style-name="Heading_20_2" text:outline-level="2"><text:bookmark-start text:name="important-ssh-root-login-issue"/>IMPORTANT SSH Root Login Issue<text:bookmark-end text:name="important-ssh-root-login-issue"/></text:h>
      <text:p text:style-name="First_20_paragraph">Problem encountered:</text:p>
      <text:p text:style-name="P124">Permission denied (publickey,gssapi-keyex,gssapi-with-mic,password)</text:p>
      <text:p text:style-name="First_20_paragraph">Reason:</text:p>
      <text:p text:style-name="Text_20_body">Using:</text:p>
      <text:p text:style-name="Preformatted_20_Text">
<text:span text:style-name="FunctionTok">sudo</text:span><text:span text:style-name="NormalTok"><text:s text:c="1"/>scp ...</text:span>
</text:p>
      <text:p text:style-name="First_20_paragraph">attempted root SSH login.</text:p>
      <text:p text:style-name="Text_20_body">Rocky Linux disables direct root SSH login by default.</text:p>
      <text:p text:style-name="Text_20_body">Resolution:</text:p>
      <text:p text:style-name="Text_20_body">Use normal user SCP.</text:p>
      <text:h text:style-name="Heading_20_2" text:outline-level="2"><text:bookmark-start text:name="copy-munge-key-to-login-node"/>Copy Munge Key to Login Node<text:bookmark-end text:name="copy-munge-key-to-login-node"/></text:h>
      <text:p text:style-name="Preformatted_20_Text">
<text:span text:style-name="FunctionTok">scp</text:span><text:span text:style-name="NormalTok"><text:s text:c="1"/>/tmp/munge.key login:/tmp/</text:span>
</text:p>
      <text:h text:style-name="Heading_20_2" text:outline-level="2"><text:bookmark-start text:name="copy-munge-key-to-compute01"/>Copy Munge Key to Compute01<text:bookmark-end text:name="copy-munge-key-to-compute01"/></text:h>
      <text:p text:style-name="Preformatted_20_Text">
<text:span text:style-name="FunctionTok">scp</text:span><text:span text:style-name="NormalTok"><text:s text:c="1"/>/tmp/munge.key compute01:/tmp/</text:span>
</text:p>
      <text:h text:style-name="Heading_20_2" text:outline-level="2"><text:bookmark-start text:name="copy-munge-key-to-compute02"/>Copy Munge Key to Compute02<text:bookmark-end text:name="copy-munge-key-to-compute02"/></text:h>
      <text:p text:style-name="Preformatted_20_Text">
<text:span text:style-name="FunctionTok">scp</text:span><text:span text:style-name="NormalTok"><text:s text:c="1"/>/tmp/munge.key compute02:/tmp/</text:span>
</text:p>
      <text:h text:style-name="Heading_20_2" text:outline-level="2"><text:bookmark-start text:name="copy-munge-key-to-compute03"/>Copy Munge Key to Compute03<text:bookmark-end text:name="copy-munge-key-to-compute03"/></text:h>
      <text:p text:style-name="Preformatted_20_Text">
<text:span text:style-name="FunctionTok">scp</text:span><text:span text:style-name="NormalTok"><text:s text:c="1"/>/tmp/munge.key compute03:/tmp/</text:span>
</text:p>
      <text:h text:style-name="Heading_20_2" text:outline-level="2"><text:bookmark-start text:name="remove-temporary-key-copy"/>Remove Temporary Key Copy<text:bookmark-end text:name="remove-temporary-key-copy"/></text:h>
      <text:p text:style-name="First_20_paragraph">On master:</text:p>
      <text:p text:style-name="Preformatted_20_Text">
<text:span text:style-name="FunctionTok">sudo</text:span><text:span text:style-name="NormalTok"><text:s text:c="1"/>rm </text:span><text:span text:style-name="AttributeTok">-f</text:span><text:span text:style-name="NormalTok"><text:s text:c="1"/>/tmp/munge.key</text:span>
</text:p>
      <text:h text:style-name="Heading_20_2" text:outline-level="2"><text:bookmark-start text:name="install-munge-key-on-client-nodes"/>Install Munge Key on Client Nodes<text:bookmark-end text:name="install-munge-key-on-client-nodes"/></text:h>
      <text:p text:style-name="First_20_paragraph">Perform on:</text:p>
      <text:list text:style-name="L45">
        <text:list-item>
          <text:p text:style-name="P125">login</text:p>
        </text:list-item>
        <text:list-item>
          <text:p text:style-name="P125">compute01</text:p>
        </text:list-item>
        <text:list-item>
          <text:p text:style-name="P125">compute02</text:p>
        </text:list-item>
        <text:list-item>
          <text:p text:style-name="P125">compute03</text:p>
        </text:list-item>
      </text:list>
      <text:h text:style-name="Heading_20_2" text:outline-level="2"><text:bookmark-start text:name="stop-munge-service"/>Stop Munge Service<text:bookmark-end text:name="stop-munge-service"/></text:h>
      <text:p text:style-name="Preformatted_20_Text">
<text:span text:style-name="FunctionTok">sudo</text:span><text:span text:style-name="NormalTok"><text:s text:c="1"/>systemctl stop munge</text:span>
</text:p>
      <text:h text:style-name="Heading_20_2" text:outline-level="2"><text:bookmark-start text:name="install-key"/>Install Key<text:bookmark-end text:name="install-key"/></text:h>
      <text:p text:style-name="Preformatted_20_Text">
<text:span text:style-name="FunctionTok">sudo</text:span><text:span text:style-name="NormalTok"><text:s text:c="1"/>mv /tmp/munge.key /etc/munge/</text:span>
</text:p>
      <text:h text:style-name="Heading_20_2" text:outline-level="2"><text:bookmark-start text:name="fix-ownership"/>Fix Ownership<text:bookmark-end text:name="fix-ownership"/></text:h>
      <text:p text:style-name="Preformatted_20_Text">
<text:span text:style-name="FunctionTok">sudo</text:span><text:span text:style-name="NormalTok"><text:s text:c="1"/>chown munge:munge /etc/munge/munge.key</text:span>
</text:p>
      <text:h text:style-name="Heading_20_2" text:outline-level="2"><text:bookmark-start text:name="fix-permissions"/>Fix Permissions<text:bookmark-end text:name="fix-permissions"/></text:h>
      <text:p text:style-name="Preformatted_20_Text">
<text:span text:style-name="FunctionTok">sudo</text:span><text:span text:style-name="NormalTok"><text:s text:c="1"/>chmod 400 /etc/munge/munge.key</text:span>
</text:p>
      <text:h text:style-name="Heading_20_2" text:outline-level="2"><text:bookmark-start text:name="start-munge"/>Start Munge<text:bookmark-end text:name="start-munge"/></text:h>
      <text:p text:style-name="First_20_paragraph">On ALL nodes:</text:p>
      <text:p text:style-name="Preformatted_20_Text">
<text:span text:style-name="FunctionTok">sudo</text:span><text:span text:style-name="NormalTok"><text:s text:c="1"/>systemctl enable </text:span><text:span text:style-name="AttributeTok">--now</text:span><text:span text:style-name="NormalTok"><text:s text:c="1"/>munge</text:span>
</text:p>
      <text:h text:style-name="Heading_20_2" text:outline-level="2"><text:bookmark-start text:name="important-issue-encountered-munge-not-running-on-master"/>IMPORTANT Issue Encountered — Munge Not Running on Master<text:bookmark-end text:name="important-issue-encountered-munge-not-running-on-master"/></text:h>
      <text:p text:style-name="First_20_paragraph">Problem:</text:p>
      <text:p text:style-name="P126">munge: Error: Failed to access "/var/run/munge/munge.socket.2"</text:p>
      <text:p text:style-name="First_20_paragraph">Reason:</text:p>
      <text:p text:style-name="Text_20_body">Munge service never started on master.</text:p>
      <text:p text:style-name="Text_20_body">Resolution:</text:p>
      <text:p text:style-name="Preformatted_20_Text">
<text:span text:style-name="FunctionTok">sudo</text:span><text:span text:style-name="NormalTok"><text:s text:c="1"/>systemctl enable </text:span><text:span text:style-name="AttributeTok">--now</text:span><text:span text:style-name="NormalTok"><text:s text:c="1"/>munge</text:span>
</text:p>
      <text:p text:style-name="First_20_paragraph">Important lesson:</text:p>
      <text:p text:style-name="Text_20_body">Difference between:</text:p>
      <table:table table:name="Table24" table:style-name="Table24">
        <table:table-column table:style-name="Table24.A"/>
        <table:table-column table:style-name="Table24.B"/>
        <table:table-header-rows>
          <table:table-row>
            <table:table-cell table:style-name="TableHeaderRowCell" office:value-type="string">
              <text:p text:style-name="Table_20_Heading">State</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inactive</text:p>
          </table:table-cell>
          <table:table-cell table:style-name="TableRowCell" office:value-type="string">
            <text:p text:style-name="Table_20_Contents">service not started</text:p>
          </table:table-cell>
        </table:table-row>
        <table:table-row>
          <table:table-cell table:style-name="TableRowCell" office:value-type="string">
            <text:p text:style-name="Table_20_Contents">failed</text:p>
          </table:table-cell>
          <table:table-cell table:style-name="TableRowCell" office:value-type="string">
            <text:p text:style-name="Table_20_Contents">service crashed</text:p>
          </table:table-cell>
        </table:table-row>
      </table:table>
      <text:h text:style-name="Heading_20_2" text:outline-level="2"><text:bookmark-start text:name="verify-munge-service"/>Verify Munge Service<text:bookmark-end text:name="verify-munge-service"/></text:h>
      <text:p text:style-name="Preformatted_20_Text">
<text:span text:style-name="ExtensionTok">systemctl</text:span><text:span text:style-name="NormalTok"><text:s text:c="1"/>status munge</text:span>
</text:p>
      <text:p text:style-name="First_20_paragraph">Expected:</text:p>
      <text:p text:style-name="P127">active (running)</text:p>
      <text:h text:style-name="Heading_20_2" text:outline-level="2"><text:bookmark-start text:name="verify-munge-authentication"/>Verify Munge Authentication<text:bookmark-end text:name="verify-munge-authentication"/></text:h>
      <text:p text:style-name="First_20_paragraph">From master:</text:p>
      <text:p text:style-name="Preformatted_20_Text">
<text:span text:style-name="ExtensionTok">munge</text:span><text:span text:style-name="NormalTok"><text:s text:c="1"/></text:span><text:span text:style-name="AttributeTok">-n</text:span><text:span text:style-name="NormalTok"><text:s text:c="1"/></text:span><text:span text:style-name="KeywordTok">|</text:span><text:span text:style-name="NormalTok"><text:s text:c="1"/></text:span><text:span text:style-name="FunctionTok">ssh</text:span><text:span text:style-name="NormalTok"><text:s text:c="1"/>compute01 unmunge</text:span>
</text:p>
      <text:h text:style-name="Heading_20_2" text:outline-level="2"><text:bookmark-start text:name="test-compute02-1"/>Test Compute02<text:bookmark-end text:name="test-compute02-1"/></text:h>
      <text:p text:style-name="Preformatted_20_Text">
<text:span text:style-name="ExtensionTok">munge</text:span><text:span text:style-name="NormalTok"><text:s text:c="1"/></text:span><text:span text:style-name="AttributeTok">-n</text:span><text:span text:style-name="NormalTok"><text:s text:c="1"/></text:span><text:span text:style-name="KeywordTok">|</text:span><text:span text:style-name="NormalTok"><text:s text:c="1"/></text:span><text:span text:style-name="FunctionTok">ssh</text:span><text:span text:style-name="NormalTok"><text:s text:c="1"/>compute02 unmunge</text:span>
</text:p>
      <text:h text:style-name="Heading_20_2" text:outline-level="2"><text:bookmark-start text:name="test-compute03-1"/>Test Compute03<text:bookmark-end text:name="test-compute03-1"/></text:h>
      <text:p text:style-name="Preformatted_20_Text">
<text:span text:style-name="ExtensionTok">munge</text:span><text:span text:style-name="NormalTok"><text:s text:c="1"/></text:span><text:span text:style-name="AttributeTok">-n</text:span><text:span text:style-name="NormalTok"><text:s text:c="1"/></text:span><text:span text:style-name="KeywordTok">|</text:span><text:span text:style-name="NormalTok"><text:s text:c="1"/></text:span><text:span text:style-name="FunctionTok">ssh</text:span><text:span text:style-name="NormalTok"><text:s text:c="1"/>compute03 unmunge</text:span>
</text:p>
      <text:h text:style-name="Heading_20_2" text:outline-level="2"><text:bookmark-start text:name="test-login-node"/>Test Login Node<text:bookmark-end text:name="test-login-node"/></text:h>
      <text:p text:style-name="Preformatted_20_Text">
<text:span text:style-name="ExtensionTok">munge</text:span><text:span text:style-name="NormalTok"><text:s text:c="1"/></text:span><text:span text:style-name="AttributeTok">-n</text:span><text:span text:style-name="NormalTok"><text:s text:c="1"/></text:span><text:span text:style-name="KeywordTok">|</text:span><text:span text:style-name="NormalTok"><text:s text:c="1"/></text:span><text:span text:style-name="FunctionTok">ssh</text:span><text:span text:style-name="NormalTok"><text:s text:c="1"/>login unmunge</text:span>
</text:p>
      <text:p text:style-name="First_20_paragraph">Expected:</text:p>
      <text:p text:style-name="P128">STATUS: Success</text:p>
      <text:h text:style-name="Heading_20_2" text:outline-level="2"><text:bookmark-start text:name="hpc-concepts-learned"/>HPC Concepts Learned<text:bookmark-end text:name="hpc-concepts-learned"/></text:h>
      <text:p text:style-name="First_20_paragraph">Munge introduced:</text:p>
      <text:list text:style-name="L46">
        <text:list-item>
          <text:p text:style-name="P129">cluster-wide authentication</text:p>
        </text:list-item>
        <text:list-item>
          <text:p text:style-name="P129">distributed trust model</text:p>
        </text:list-item>
        <text:list-item>
          <text:p text:style-name="P129">shared secret authentication</text:p>
        </text:list-item>
        <text:list-item>
          <text:p text:style-name="P129">daemon security</text:p>
        </text:list-item>
        <text:list-item>
          <text:p text:style-name="P129">inter-node trust validation</text:p>
        </text:list-item>
      </text:list>
      <text:h text:style-name="Heading_20_2" text:outline-level="2"><text:bookmark-start text:name="configure-slurm-scheduler"/>Configure Slurm Scheduler<text:bookmark-end text:name="configure-slurm-scheduler"/></text:h>
      <text:p text:style-name="First_20_paragraph">Purpose:</text:p>
      <text:p text:style-name="Text_20_body">Enable centralized resource scheduling.</text:p>
      <text:p text:style-name="Text_20_body">IMPORTANT:</text:p>
      <text:p text:style-name="P130">/etc/slurm/slurm.conf</text:p>
      <text:p text:style-name="First_20_paragraph">must be IDENTICAL on ALL nodes.</text:p>
      <text:h text:style-name="Heading_20_2" text:outline-level="2"><text:bookmark-start text:name="important-issue-encountered-default-localhost-configuration"/>IMPORTANT Issue Encountered — Default localhost Configuration<text:bookmark-end text:name="important-issue-encountered-default-localhost-configuration"/></text:h>
      <text:p text:style-name="First_20_paragraph">Problem:</text:p>
      <text:p text:style-name="P131">sinfo</text:p>
      <text:p text:style-name="P132">-&gt; localhost</text:p>
      <text:p text:style-name="First_20_paragraph">Reason:</text:p>
      <text:p text:style-name="Text_20_body">Default example slurm.conf remained active.</text:p>
      <text:p text:style-name="Text_20_body">Resolution:</text:p>
      <text:p text:style-name="Text_20_body">Replace configuration with custom cluster topology.</text:p>
      <text:p text:style-name="Text_20_body">Important HPC lesson:</text:p>
      <text:p text:style-name="Text_20_body">Incorrect topology configuration is one of the most common Slurm admin problems.</text:p>
      <text:h text:style-name="Heading_20_2" text:outline-level="2"><text:bookmark-start text:name="create-slurm-configuration"/>Create Slurm Configuration<text:bookmark-end text:name="create-slurm-configuration"/></text:h>
      <text:p text:style-name="First_20_paragraph">On master:</text:p>
      <text:p text:style-name="Preformatted_20_Text">
<text:span text:style-name="FunctionTok">sudo</text:span><text:span text:style-name="NormalTok"><text:s text:c="1"/>vim /etc/slurm/slurm.conf</text:span>
</text:p>
      <text:p text:style-name="First_20_paragraph">Replace ENTIRE file with:</text:p>
      <text:p text:style-name="Preformatted_20_Text">
<text:span text:style-name="DataTypeTok">ClusterName</text:span><text:span text:style-name="OtherTok">=</text:span><text:span text:style-name="StringTok">hpccluster</text:span>
</text:p>
      <text:p text:style-name="Preformatted_20_Text">
<text:span text:style-name="DataTypeTok">SlurmctldHost</text:span><text:span text:style-name="OtherTok">=</text:span><text:span text:style-name="StringTok">master</text:span>
</text:p>
      <text:p text:style-name="Preformatted_20_Text">
</text:p>
      <text:p text:style-name="Preformatted_20_Text">
<text:span text:style-name="DataTypeTok">MpiDefault</text:span><text:span text:style-name="OtherTok">=</text:span><text:span text:style-name="StringTok">none</text:span>
</text:p>
      <text:p text:style-name="Preformatted_20_Text">
<text:span text:style-name="DataTypeTok">ProctrackType</text:span><text:span text:style-name="OtherTok">=</text:span><text:span text:style-name="StringTok">proctrack/cgroup</text:span>
</text:p>
      <text:p text:style-name="Preformatted_20_Text">
<text:span text:style-name="DataTypeTok">ReturnToService</text:span><text:span text:style-name="OtherTok">=</text:span><text:span text:style-name="DecValTok">2</text:span>
</text:p>
      <text:p text:style-name="Preformatted_20_Text">
</text:p>
      <text:p text:style-name="Preformatted_20_Text">
<text:span text:style-name="DataTypeTok">SlurmctldPidFile</text:span><text:span text:style-name="OtherTok">=</text:span><text:span text:style-name="StringTok">/run/slurmctld.pid</text:span>
</text:p>
      <text:p text:style-name="Preformatted_20_Text">
<text:span text:style-name="DataTypeTok">SlurmdPidFile</text:span><text:span text:style-name="OtherTok">=</text:span><text:span text:style-name="StringTok">/run/slurmd.pid</text:span>
</text:p>
      <text:p text:style-name="Preformatted_20_Text">
</text:p>
      <text:p text:style-name="Preformatted_20_Text">
<text:span text:style-name="DataTypeTok">SlurmdSpoolDir</text:span><text:span text:style-name="OtherTok">=</text:span><text:span text:style-name="StringTok">/var/spool/slurmd</text:span>
</text:p>
      <text:p text:style-name="Preformatted_20_Text">
<text:span text:style-name="DataTypeTok">StateSaveLocation</text:span><text:span text:style-name="OtherTok">=</text:span><text:span text:style-name="StringTok">/var/spool/slurmctld</text:span>
</text:p>
      <text:p text:style-name="Preformatted_20_Text">
</text:p>
      <text:p text:style-name="Preformatted_20_Text">
<text:span text:style-name="DataTypeTok">SlurmUser</text:span><text:span text:style-name="OtherTok">=</text:span><text:span text:style-name="StringTok">slurm</text:span>
</text:p>
      <text:p text:style-name="Preformatted_20_Text">
</text:p>
      <text:p text:style-name="Preformatted_20_Text">
<text:span text:style-name="DataTypeTok">SwitchType</text:span><text:span text:style-name="OtherTok">=</text:span><text:span text:style-name="StringTok">switch/none</text:span>
</text:p>
      <text:p text:style-name="Preformatted_20_Text">
<text:span text:style-name="DataTypeTok">TaskPlugin</text:span><text:span text:style-name="OtherTok">=</text:span><text:span text:style-name="StringTok">task/affinity</text:span>
</text:p>
      <text:p text:style-name="Preformatted_20_Text">
</text:p>
      <text:p text:style-name="Preformatted_20_Text">
<text:span text:style-name="DataTypeTok">SchedulerType</text:span><text:span text:style-name="OtherTok">=</text:span><text:span text:style-name="StringTok">sched/backfill</text:span>
</text:p>
      <text:p text:style-name="Preformatted_20_Text">
</text:p>
      <text:p text:style-name="Preformatted_20_Text">
<text:span text:style-name="DataTypeTok">SelectType</text:span><text:span text:style-name="OtherTok">=</text:span><text:span text:style-name="StringTok">select/cons_tres</text:span>
</text:p>
      <text:p text:style-name="Preformatted_20_Text">
<text:span text:style-name="DataTypeTok">SelectTypeParameters</text:span><text:span text:style-name="OtherTok">=</text:span><text:span text:style-name="StringTok">CR_Core</text:span>
</text:p>
      <text:p text:style-name="Preformatted_20_Text">
</text:p>
      <text:p text:style-name="Preformatted_20_Text">
<text:span text:style-name="DataTypeTok">AuthType</text:span><text:span text:style-name="OtherTok">=</text:span><text:span text:style-name="StringTok">auth/munge</text:span>
</text:p>
      <text:p text:style-name="Preformatted_20_Text">
</text:p>
      <text:p text:style-name="Preformatted_20_Text">
<text:span text:style-name="DataTypeTok">NodeName</text:span><text:span text:style-name="OtherTok">=</text:span><text:span text:style-name="StringTok">compute01 CPUs=2 State=UNKNOWN</text:span>
</text:p>
      <text:p text:style-name="Preformatted_20_Text">
<text:span text:style-name="DataTypeTok">NodeName</text:span><text:span text:style-name="OtherTok">=</text:span><text:span text:style-name="StringTok">compute02 CPUs=2 State=UNKNOWN</text:span>
</text:p>
      <text:p text:style-name="Preformatted_20_Text">
<text:span text:style-name="DataTypeTok">NodeName</text:span><text:span text:style-name="OtherTok">=</text:span><text:span text:style-name="StringTok">compute03 CPUs=2 State=UNKNOWN</text:span>
</text:p>
      <text:p text:style-name="Preformatted_20_Text">
</text:p>
      <text:p text:style-name="Preformatted_20_Text">
<text:span text:style-name="DataTypeTok">PartitionName</text:span><text:span text:style-name="OtherTok">=</text:span><text:span text:style-name="StringTok">debug Nodes=ALL Default=YES MaxTime=INFINITE State=UP</text:span>
</text:p>
      <text:h text:style-name="Heading_20_2" text:outline-level="2"><text:bookmark-start text:name="configuration-explanation"/>Configuration Explanation<text:bookmark-end text:name="configuration-explanation"/></text:h>
      <table:table table:name="Table25" table:style-name="Table25">
        <table:table-column table:style-name="Table25.A"/>
        <table:table-column table:style-name="Table25.B"/>
        <table:table-header-rows>
          <table:table-row>
            <table:table-cell table:style-name="TableHeaderRowCell" office:value-type="string">
              <text:p text:style-name="Table_20_Heading">Parameter</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ClusterName</text:p>
          </table:table-cell>
          <table:table-cell table:style-name="TableRowCell" office:value-type="string">
            <text:p text:style-name="Table_20_Contents">cluster identifier</text:p>
          </table:table-cell>
        </table:table-row>
        <table:table-row>
          <table:table-cell table:style-name="TableRowCell" office:value-type="string">
            <text:p text:style-name="Table_20_Contents">SlurmctldHost</text:p>
          </table:table-cell>
          <table:table-cell table:style-name="TableRowCell" office:value-type="string">
            <text:p text:style-name="Table_20_Contents">controller node</text:p>
          </table:table-cell>
        </table:table-row>
        <table:table-row>
          <table:table-cell table:style-name="TableRowCell" office:value-type="string">
            <text:p text:style-name="Table_20_Contents">NodeName</text:p>
          </table:table-cell>
          <table:table-cell table:style-name="TableRowCell" office:value-type="string">
            <text:p text:style-name="Table_20_Contents">compute nodes</text:p>
          </table:table-cell>
        </table:table-row>
        <table:table-row>
          <table:table-cell table:style-name="TableRowCell" office:value-type="string">
            <text:p text:style-name="Table_20_Contents">CPUs=2</text:p>
          </table:table-cell>
          <table:table-cell table:style-name="TableRowCell" office:value-type="string">
            <text:p text:style-name="Table_20_Contents">available CPUs</text:p>
          </table:table-cell>
        </table:table-row>
        <table:table-row>
          <table:table-cell table:style-name="TableRowCell" office:value-type="string">
            <text:p text:style-name="Table_20_Contents">PartitionName</text:p>
          </table:table-cell>
          <table:table-cell table:style-name="TableRowCell" office:value-type="string">
            <text:p text:style-name="Table_20_Contents">scheduler queue</text:p>
          </table:table-cell>
        </table:table-row>
      </table:table>
      <text:h text:style-name="Heading_20_2" text:outline-level="2"><text:bookmark-start text:name="create-slurm-runtime-directories"/>Create Slurm Runtime Directories<text:bookmark-end text:name="create-slurm-runtime-directories"/></text:h>
      <text:h text:style-name="Heading_20_3" text:outline-level="3"><text:bookmark-start text:name="on-master"/>On Master<text:bookmark-end text:name="on-master"/></text:h>
      <text:p text:style-name="Preformatted_20_Text">
<text:span text:style-name="FunctionTok">sudo</text:span><text:span text:style-name="NormalTok"><text:s text:c="1"/>mkdir </text:span><text:span text:style-name="AttributeTok">-p</text:span><text:span text:style-name="NormalTok"><text:s text:c="1"/>/var/spool/slurmctld</text:span>
</text:p>
      <text:p text:style-name="Preformatted_20_Text">
<text:span text:style-name="FunctionTok">sudo</text:span><text:span text:style-name="NormalTok"><text:s text:c="1"/>mkdir </text:span><text:span text:style-name="AttributeTok">-p</text:span><text:span text:style-name="NormalTok"><text:s text:c="1"/>/var/spool/slurmd</text:span>
</text:p>
      <text:h text:style-name="Heading_20_2" text:outline-level="2"><text:bookmark-start text:name="set-ownership"/>Set Ownership<text:bookmark-end text:name="set-ownership"/></text:h>
      <text:p text:style-name="Preformatted_20_Text">
<text:span text:style-name="FunctionTok">sudo</text:span><text:span text:style-name="NormalTok"><text:s text:c="1"/>chown slurm:slurm /var/spool/slurmctld</text:span>
</text:p>
      <text:p text:style-name="Preformatted_20_Text">
<text:span text:style-name="FunctionTok">sudo</text:span><text:span text:style-name="NormalTok"><text:s text:c="1"/>chown slurm:slurm /var/spool/slurmd</text:span>
</text:p>
      <text:h text:style-name="Heading_20_2" text:outline-level="2"><text:bookmark-start text:name="create-slurmd-directories-on-compute-nodes"/>Create slurmd Directories on Compute Nodes<text:bookmark-end text:name="create-slurmd-directories-on-compute-nodes"/></text:h>
      <text:h text:style-name="Heading_20_3" text:outline-level="3"><text:bookmark-start text:name="compute01-5"/>Compute01<text:bookmark-end text:name="compute01-5"/></text:h>
      <text:p text:style-name="Preformatted_20_Text">
<text:span text:style-name="FunctionTok">ssh</text:span><text:span text:style-name="NormalTok"><text:s text:c="1"/>compute01 sudo </text:span><text:span text:style-name="AttributeTok">-S</text:span><text:span text:style-name="NormalTok"><text:s text:c="1"/>mkdir </text:span><text:span text:style-name="AttributeTok">-p</text:span><text:span text:style-name="NormalTok"><text:s text:c="1"/>/var/spool/slurmd</text:span>
</text:p>
      <text:h text:style-name="Heading_20_3" text:outline-level="3"><text:bookmark-start text:name="compute02-5"/>Compute02<text:bookmark-end text:name="compute02-5"/></text:h>
      <text:p text:style-name="Preformatted_20_Text">
<text:span text:style-name="FunctionTok">ssh</text:span><text:span text:style-name="NormalTok"><text:s text:c="1"/>compute02 sudo </text:span><text:span text:style-name="AttributeTok">-S</text:span><text:span text:style-name="NormalTok"><text:s text:c="1"/>mkdir </text:span><text:span text:style-name="AttributeTok">-p</text:span><text:span text:style-name="NormalTok"><text:s text:c="1"/>/var/spool/slurmd</text:span>
</text:p>
      <text:h text:style-name="Heading_20_3" text:outline-level="3"><text:bookmark-start text:name="compute03-5"/>Compute03<text:bookmark-end text:name="compute03-5"/></text:h>
      <text:p text:style-name="Preformatted_20_Text">
<text:span text:style-name="FunctionTok">ssh</text:span><text:span text:style-name="NormalTok"><text:s text:c="1"/>compute03 sudo </text:span><text:span text:style-name="AttributeTok">-S</text:span><text:span text:style-name="NormalTok"><text:s text:c="1"/>mkdir </text:span><text:span text:style-name="AttributeTok">-p</text:span><text:span text:style-name="NormalTok"><text:s text:c="1"/>/var/spool/slurmd</text:span>
</text:p>
      <text:h text:style-name="Heading_20_2" text:outline-level="2"><text:bookmark-start text:name="important-sudo-over-ssh-issue"/>IMPORTANT sudo Over SSH Issue<text:bookmark-end text:name="important-sudo-over-ssh-issue"/></text:h>
      <text:p text:style-name="First_20_paragraph">Problem:</text:p>
      <text:p text:style-name="P133">sudo: a terminal is required to read the password</text:p>
      <text:p text:style-name="First_20_paragraph">Resolution:</text:p>
      <text:p text:style-name="Text_20_body">Use:</text:p>
      <text:p text:style-name="Preformatted_20_Text">
<text:span text:style-name="FunctionTok">sudo</text:span><text:span text:style-name="NormalTok"><text:s text:c="1"/></text:span><text:span text:style-name="AttributeTok">-S</text:span>
</text:p>
      <text:p text:style-name="First_20_paragraph">Important Linux administration concept:</text:p>
      <text:p text:style-name="Text_20_body">sudo over non-interactive SSH requires stdin password handling.</text:p>
      <text:h text:style-name="Heading_20_2" text:outline-level="2"><text:bookmark-start text:name="fix-ownership-on-compute-nodes"/>Fix Ownership on Compute Nodes<text:bookmark-end text:name="fix-ownership-on-compute-nodes"/></text:h>
      <text:h text:style-name="Heading_20_3" text:outline-level="3"><text:bookmark-start text:name="compute01-6"/>Compute01<text:bookmark-end text:name="compute01-6"/></text:h>
      <text:p text:style-name="Preformatted_20_Text">
<text:span text:style-name="FunctionTok">ssh</text:span><text:span text:style-name="NormalTok"><text:s text:c="1"/>compute01 sudo </text:span><text:span text:style-name="AttributeTok">-S</text:span><text:span text:style-name="NormalTok"><text:s text:c="1"/>chown slurm:slurm /var/spool/slurmd</text:span>
</text:p>
      <text:h text:style-name="Heading_20_3" text:outline-level="3"><text:bookmark-start text:name="compute02-6"/>Compute02<text:bookmark-end text:name="compute02-6"/></text:h>
      <text:p text:style-name="Preformatted_20_Text">
<text:span text:style-name="FunctionTok">ssh</text:span><text:span text:style-name="NormalTok"><text:s text:c="1"/>compute02 sudo </text:span><text:span text:style-name="AttributeTok">-S</text:span><text:span text:style-name="NormalTok"><text:s text:c="1"/>chown slurm:slurm /var/spool/slurmd</text:span>
</text:p>
      <text:h text:style-name="Heading_20_3" text:outline-level="3"><text:bookmark-start text:name="compute03-6"/>Compute03<text:bookmark-end text:name="compute03-6"/></text:h>
      <text:p text:style-name="Preformatted_20_Text">
<text:span text:style-name="FunctionTok">ssh</text:span><text:span text:style-name="NormalTok"><text:s text:c="1"/>compute03 sudo </text:span><text:span text:style-name="AttributeTok">-S</text:span><text:span text:style-name="NormalTok"><text:s text:c="1"/>chown slurm:slurm /var/spool/slurmd</text:span>
</text:p>
      <text:h text:style-name="Heading_20_2" text:outline-level="2"><text:bookmark-start text:name="verify-runtime-directories"/>Verify Runtime Directories<text:bookmark-end text:name="verify-runtime-directories"/></text:h>
      <text:p text:style-name="Preformatted_20_Text">
<text:span text:style-name="FunctionTok">ls</text:span><text:span text:style-name="NormalTok"><text:s text:c="1"/></text:span><text:span text:style-name="AttributeTok">-ld</text:span><text:span text:style-name="NormalTok"><text:s text:c="1"/>/var/spool/slurmctld</text:span>
</text:p>
      <text:p text:style-name="First_20_paragraph">Expected:</text:p>
      <text:p text:style-name="P134">slurm slurm</text:p>
      <text:h text:style-name="Heading_20_2" text:outline-level="2"><text:bookmark-start text:name="distribute-slurm.conf"/>Distribute slurm.conf<text:bookmark-end text:name="distribute-slurm.conf"/></text:h>
      <text:h text:style-name="Heading_20_3" text:outline-level="3"><text:bookmark-start text:name="login-1"/>Login<text:bookmark-end text:name="login-1"/></text:h>
      <text:p text:style-name="Preformatted_20_Text">
<text:span text:style-name="FunctionTok">scp</text:span><text:span text:style-name="NormalTok"><text:s text:c="1"/>/etc/slurm/slurm.conf login:/tmp/</text:span>
</text:p>
      <text:h text:style-name="Heading_20_3" text:outline-level="3"><text:bookmark-start text:name="compute01-7"/>Compute01<text:bookmark-end text:name="compute01-7"/></text:h>
      <text:p text:style-name="Preformatted_20_Text">
<text:span text:style-name="FunctionTok">scp</text:span><text:span text:style-name="NormalTok"><text:s text:c="1"/>/etc/slurm/slurm.conf compute01:/tmp/</text:span>
</text:p>
      <text:h text:style-name="Heading_20_3" text:outline-level="3"><text:bookmark-start text:name="compute02-7"/>Compute02<text:bookmark-end text:name="compute02-7"/></text:h>
      <text:p text:style-name="Preformatted_20_Text">
<text:span text:style-name="FunctionTok">scp</text:span><text:span text:style-name="NormalTok"><text:s text:c="1"/>/etc/slurm/slurm.conf compute02:/tmp/</text:span>
</text:p>
      <text:h text:style-name="Heading_20_3" text:outline-level="3"><text:bookmark-start text:name="compute03-7"/>Compute03<text:bookmark-end text:name="compute03-7"/></text:h>
      <text:p text:style-name="Preformatted_20_Text">
<text:span text:style-name="FunctionTok">scp</text:span><text:span text:style-name="NormalTok"><text:s text:c="1"/>/etc/slurm/slurm.conf compute03:/tmp/</text:span>
</text:p>
      <text:h text:style-name="Heading_20_2" text:outline-level="2"><text:bookmark-start text:name="install-configuration-on-nodes"/>Install Configuration on Nodes<text:bookmark-end text:name="install-configuration-on-nodes"/></text:h>
      <text:p text:style-name="First_20_paragraph">On ALL nodes:</text:p>
      <text:p text:style-name="Preformatted_20_Text">
<text:span text:style-name="FunctionTok">sudo</text:span><text:span text:style-name="NormalTok"><text:s text:c="1"/>mv /tmp/slurm.conf /etc/slurm/slurm.conf</text:span>
</text:p>
      <text:h text:style-name="Heading_20_2" text:outline-level="2"><text:bookmark-start text:name="start-slurm-controller"/>Start Slurm Controller<text:bookmark-end text:name="start-slurm-controller"/></text:h>
      <text:p text:style-name="First_20_paragraph">ONLY on master:</text:p>
      <text:p text:style-name="Preformatted_20_Text">
<text:span text:style-name="FunctionTok">sudo</text:span><text:span text:style-name="NormalTok"><text:s text:c="1"/>systemctl enable </text:span><text:span text:style-name="AttributeTok">--now</text:span><text:span text:style-name="NormalTok"><text:s text:c="1"/>slurmctld</text:span>
</text:p>
      <text:h text:style-name="Heading_20_2" text:outline-level="2"><text:bookmark-start text:name="verify-controller"/>Verify Controller<text:bookmark-end text:name="verify-controller"/></text:h>
      <text:p text:style-name="Preformatted_20_Text">
<text:span text:style-name="ExtensionTok">systemctl</text:span><text:span text:style-name="NormalTok"><text:s text:c="1"/>status slurmctld</text:span>
</text:p>
      <text:p text:style-name="First_20_paragraph">Expected:</text:p>
      <text:p text:style-name="P135">active (running)</text:p>
      <text:h text:style-name="Heading_20_2" text:outline-level="2"><text:bookmark-start text:name="start-slurmd-on-compute-nodes"/>Start slurmd on Compute Nodes<text:bookmark-end text:name="start-slurmd-on-compute-nodes"/></text:h>
      <text:p text:style-name="First_20_paragraph">On:</text:p>
      <text:list text:style-name="L47">
        <text:list-item>
          <text:p text:style-name="P136">compute01</text:p>
        </text:list-item>
        <text:list-item>
          <text:p text:style-name="P136">compute02</text:p>
        </text:list-item>
        <text:list-item>
          <text:p text:style-name="P136">compute03</text:p>
        </text:list-item>
      </text:list>
      <text:p text:style-name="Preformatted_20_Text">
<text:span text:style-name="FunctionTok">sudo</text:span><text:span text:style-name="NormalTok"><text:s text:c="1"/>systemctl enable </text:span><text:span text:style-name="AttributeTok">--now</text:span><text:span text:style-name="NormalTok"><text:s text:c="1"/>slurmd</text:span>
</text:p>
      <text:h text:style-name="Heading_20_2" text:outline-level="2"><text:bookmark-start text:name="verify-slurmd"/>Verify slurmd<text:bookmark-end text:name="verify-slurmd"/></text:h>
      <text:p text:style-name="Preformatted_20_Text">
<text:span text:style-name="ExtensionTok">systemctl</text:span><text:span text:style-name="NormalTok"><text:s text:c="1"/>status slurmd</text:span>
</text:p>
      <text:p text:style-name="First_20_paragraph">Expected:</text:p>
      <text:p text:style-name="P137">active (running)</text:p>
      <text:h text:style-name="Heading_20_2" text:outline-level="2"><text:bookmark-start text:name="reconfigure-slurm"/>Reconfigure Slurm<text:bookmark-end text:name="reconfigure-slurm"/></text:h>
      <text:p text:style-name="First_20_paragraph">On master:</text:p>
      <text:p text:style-name="Preformatted_20_Text">
<text:span text:style-name="FunctionTok">sudo</text:span><text:span text:style-name="NormalTok"><text:s text:c="1"/>scontrol reconfigure</text:span>
</text:p>
      <text:h text:style-name="Heading_20_2" text:outline-level="2"><text:bookmark-start text:name="important-issue-encountered-nodes-in-drain-state"/>IMPORTANT Issue Encountered — Nodes in DRAIN State<text:bookmark-end text:name="important-issue-encountered-nodes-in-drain-state"/></text:h>
      <text:p text:style-name="First_20_paragraph">Problem:</text:p>
      <text:p text:style-name="Text_20_body">Nodes entered:</text:p>
      <text:p text:style-name="P138">DRAIN</text:p>
      <text:p text:style-name="First_20_paragraph">after CPU topology changes.</text:p>
      <text:p text:style-name="Text_20_body">Reason:</text:p>
      <text:p text:style-name="Text_20_body">Slurm detected mismatch between:</text:p>
      <text:list text:style-name="L48">
        <text:list-item>
          <text:p text:style-name="P139">configured CPUs</text:p>
        </text:list-item>
        <text:list-item>
          <text:p text:style-name="P139">detected hardware topology</text:p>
        </text:list-item>
      </text:list>
      <text:p text:style-name="First_20_paragraph">Resolution:</text:p>
      <text:p text:style-name="Text_20_body">Clear stale slurmd state.</text:p>
      <text:h text:style-name="Heading_20_2" text:outline-level="2"><text:bookmark-start text:name="stop-slurmd"/>Stop slurmd<text:bookmark-end text:name="stop-slurmd"/></text:h>
      <text:p text:style-name="First_20_paragraph">On compute nodes:</text:p>
      <text:p text:style-name="Preformatted_20_Text">
<text:span text:style-name="FunctionTok">sudo</text:span><text:span text:style-name="NormalTok"><text:s text:c="1"/>systemctl stop slurmd</text:span>
</text:p>
      <text:h text:style-name="Heading_20_2" text:outline-level="2"><text:bookmark-start text:name="remove-old-state"/>Remove Old State<text:bookmark-end text:name="remove-old-state"/></text:h>
      <text:p text:style-name="Preformatted_20_Text">
<text:span text:style-name="FunctionTok">sudo</text:span><text:span text:style-name="NormalTok"><text:s text:c="1"/>rm </text:span><text:span text:style-name="AttributeTok">-rf</text:span><text:span text:style-name="NormalTok"><text:s text:c="1"/>/var/spool/slurmd/</text:span><text:span text:style-name="PreprocessorTok">*</text:span>
</text:p>
      <text:h text:style-name="Heading_20_2" text:outline-level="2"><text:bookmark-start text:name="restart-slurmd"/>Restart slurmd<text:bookmark-end text:name="restart-slurmd"/></text:h>
      <text:p text:style-name="Preformatted_20_Text">
<text:span text:style-name="FunctionTok">sudo</text:span><text:span text:style-name="NormalTok"><text:s text:c="1"/>systemctl start slurmd</text:span>
</text:p>
      <text:h text:style-name="Heading_20_2" text:outline-level="2"><text:bookmark-start text:name="resume-nodes"/>Resume Nodes<text:bookmark-end text:name="resume-nodes"/></text:h>
      <text:p text:style-name="First_20_paragraph">On master:</text:p>
      <text:p text:style-name="Preformatted_20_Text">
<text:span text:style-name="FunctionTok">sudo</text:span><text:span text:style-name="NormalTok"><text:s text:c="1"/>scontrol update NodeName=compute01 State=RESUME</text:span>
</text:p>
      <text:p text:style-name="Preformatted_20_Text">
<text:span text:style-name="FunctionTok">sudo</text:span><text:span text:style-name="NormalTok"><text:s text:c="1"/>scontrol update NodeName=compute02 State=RESUME</text:span>
</text:p>
      <text:p text:style-name="Preformatted_20_Text">
<text:span text:style-name="FunctionTok">sudo</text:span><text:span text:style-name="NormalTok"><text:s text:c="1"/>scontrol update NodeName=compute03 State=RESUME</text:span>
</text:p>
      <text:h text:style-name="Heading_20_2" text:outline-level="2"><text:bookmark-start text:name="verify-cluster-status"/>Verify Cluster Status<text:bookmark-end text:name="verify-cluster-status"/></text:h>
      <text:p text:style-name="Preformatted_20_Text">
<text:span text:style-name="ExtensionTok">sinfo</text:span>
</text:p>
      <text:p text:style-name="First_20_paragraph">Expected:</text:p>
      <text:p text:style-name="P140">PARTITION AVAIL TIMELIMIT NODES STATE NODELIST</text:p>
      <text:p text:style-name="P141">debug* up infinite 3 idle compute[01-03]</text:p>
      <text:h text:style-name="Heading_20_2" text:outline-level="2"><text:bookmark-start text:name="verify-node-details"/>Verify Node Details<text:bookmark-end text:name="verify-node-details"/></text:h>
      <text:p text:style-name="Preformatted_20_Text">
<text:span text:style-name="ExtensionTok">scontrol</text:span><text:span text:style-name="NormalTok"><text:s text:c="1"/>show nodes</text:span>
</text:p>
      <text:p text:style-name="First_20_paragraph">This displays:</text:p>
      <text:list text:style-name="L49">
        <text:list-item>
          <text:p text:style-name="P142">CPU information</text:p>
        </text:list-item>
        <text:list-item>
          <text:p text:style-name="P142">memory</text:p>
        </text:list-item>
        <text:list-item>
          <text:p text:style-name="P142">node states</text:p>
        </text:list-item>
        <text:list-item>
          <text:p text:style-name="P142">scheduler topology</text:p>
        </text:list-item>
        <text:list-item>
          <text:p text:style-name="P142">resource allocation</text:p>
        </text:list-item>
      </text:list>
      <text:h text:style-name="Heading_20_2" text:outline-level="2"><text:bookmark-start text:name="test-slurm-execution"/>Test Slurm Execution<text:bookmark-end text:name="test-slurm-execution"/></text:h>
      <text:h text:style-name="Heading_20_3" text:outline-level="3"><text:bookmark-start text:name="single-node-test"/>Single Node Test<text:bookmark-end text:name="single-node-test"/></text:h>
      <text:p text:style-name="First_20_paragraph">From login node:</text:p>
      <text:p text:style-name="Preformatted_20_Text">
<text:span text:style-name="ExtensionTok">srun</text:span><text:span text:style-name="NormalTok"><text:s text:c="1"/>hostname</text:span>
</text:p>
      <text:p text:style-name="First_20_paragraph">Expected:</text:p>
      <text:p text:style-name="P143">compute01.local</text:p>
      <text:h text:style-name="Heading_20_2" text:outline-level="2"><text:bookmark-start text:name="multi-node-execution"/>Multi-node Execution<text:bookmark-end text:name="multi-node-execution"/></text:h>
      <text:p text:style-name="Preformatted_20_Text">
<text:span text:style-name="ExtensionTok">srun</text:span><text:span text:style-name="NormalTok"><text:s text:c="1"/></text:span><text:span text:style-name="AttributeTok">-N</text:span><text:span text:style-name="NormalTok"><text:s text:c="1"/>3 hostname</text:span>
</text:p>
      <text:p text:style-name="First_20_paragraph">Expected:</text:p>
      <text:p text:style-name="P144">compute01.local</text:p>
      <text:p text:style-name="P145">compute02.local</text:p>
      <text:p text:style-name="P146">compute03.local</text:p>
      <text:h text:style-name="Heading_20_2" text:outline-level="2"><text:bookmark-start text:name="multi-task-multi-node-execution"/>Multi-task Multi-node Execution<text:bookmark-end text:name="multi-task-multi-node-execution"/></text:h>
      <text:p text:style-name="Preformatted_20_Text">
<text:span text:style-name="ExtensionTok">srun</text:span><text:span text:style-name="NormalTok"><text:s text:c="1"/></text:span><text:span text:style-name="AttributeTok">-N</text:span><text:span text:style-name="NormalTok"><text:s text:c="1"/>3 </text:span><text:span text:style-name="AttributeTok">-n</text:span><text:span text:style-name="NormalTok"><text:s text:c="1"/>6 hostname</text:span>
</text:p>
      <text:p text:style-name="First_20_paragraph">This verifies:</text:p>
      <text:list text:style-name="L50">
        <text:list-item>
          <text:p text:style-name="P147">task distribution</text:p>
        </text:list-item>
        <text:list-item>
          <text:p text:style-name="P147">multi-node scheduling</text:p>
        </text:list-item>
        <text:list-item>
          <text:p text:style-name="P147">CPU allocation</text:p>
        </text:list-item>
      </text:list>
      <text:h text:style-name="Heading_20_2" text:outline-level="2"><text:bookmark-start text:name="multi-core-single-node-execution"/>Multi-core Single-node Execution<text:bookmark-end text:name="multi-core-single-node-execution"/></text:h>
      <text:p text:style-name="Preformatted_20_Text">
<text:span text:style-name="ExtensionTok">srun</text:span><text:span text:style-name="NormalTok"><text:s text:c="1"/></text:span><text:span text:style-name="AttributeTok">-N</text:span><text:span text:style-name="NormalTok"><text:s text:c="1"/>1 </text:span><text:span text:style-name="AttributeTok">-n</text:span><text:span text:style-name="NormalTok"><text:s text:c="1"/>2 hostname</text:span>
</text:p>
      <text:p text:style-name="First_20_paragraph">Expected:</text:p>
      <text:p text:style-name="P148">compute01.local</text:p>
      <text:p text:style-name="P149">compute01.local</text:p>
      <text:h text:style-name="Heading_20_2" text:outline-level="2"><text:bookmark-start text:name="important-slurm-scheduling-concept"/>IMPORTANT Slurm Scheduling Concept<text:bookmark-end text:name="important-slurm-scheduling-concept"/></text:h>
      <text:p text:style-name="First_20_paragraph">Earlier:</text:p>
      <text:p text:style-name="Preformatted_20_Text">
<text:span text:style-name="ExtensionTok">srun</text:span><text:span text:style-name="NormalTok"><text:s text:c="1"/></text:span><text:span text:style-name="AttributeTok">-N</text:span><text:span text:style-name="NormalTok"><text:s text:c="1"/>1 </text:span><text:span text:style-name="AttributeTok">-n</text:span><text:span text:style-name="NormalTok"><text:s text:c="1"/>2 hostname</text:span>
</text:p>
      <text:p text:style-name="First_20_paragraph">failed because nodes initially had:</text:p>
      <text:p text:style-name="P150">CPUs=1</text:p>
      <text:p text:style-name="First_20_paragraph">After increasing VM CPUs and updating slurm.conf:</text:p>
      <text:p text:style-name="P151">CPUs=2</text:p>
      <text:p text:style-name="First_20_paragraph">the scheduler successfully allocated 2 tasks on a single node.</text:p>
      <text:p text:style-name="Text_20_body">Important HPC lesson:</text:p>
      <text:p text:style-name="Text_20_body">Slurm strictly enforces:</text:p>
      <text:list text:style-name="L51">
        <text:list-item>
          <text:p text:style-name="P152">CPU limits</text:p>
        </text:list-item>
        <text:list-item>
          <text:p text:style-name="P152">task allocation</text:p>
        </text:list-item>
        <text:list-item>
          <text:p text:style-name="P152">topology constraints</text:p>
        </text:list-item>
        <text:list-item>
          <text:p text:style-name="P152">resource consistency</text:p>
        </text:list-item>
      </text:list>
      <text:h text:style-name="Heading_20_1" text:outline-level="1"><text:bookmark-start text:name="shared-software-filesystem-apps"/>Shared Software Filesystem (/apps)<text:bookmark-end text:name="shared-software-filesystem-apps"/></text:h>
      <text:p text:style-name="First_20_paragraph">Goal:</text:p>
      <text:p text:style-name="Text_20_body">Create a dedicated shared software filesystem for:</text:p>
      <text:list text:style-name="L52">
        <text:list-item>
          <text:p text:style-name="P153">Spack</text:p>
        </text:list-item>
        <text:list-item>
          <text:p text:style-name="P153">compilers</text:p>
        </text:list-item>
        <text:list-item>
          <text:p text:style-name="P153">MPI stacks</text:p>
        </text:list-item>
        <text:list-item>
          <text:p text:style-name="P153">scientific applications</text:p>
        </text:list-item>
        <text:list-item>
          <text:p text:style-name="P153">modulefiles</text:p>
        </text:list-item>
        <text:list-item>
          <text:p text:style-name="P153">HPC software hierarchy</text:p>
        </text:list-item>
      </text:list>
      <text:p text:style-name="First_20_paragraph">This phase transitions the cluster from:</text:p>
      <text:p text:style-name="P154">basic scheduler infrastructure</text:p>
      <text:p text:style-name="First_20_paragraph">to:</text:p>
      <text:p text:style-name="P155">realistic HPC software environment</text:p>
      <text:h text:style-name="Heading_20_2" text:outline-level="2"><text:bookmark-start text:name="why-separate-apps-filesystem"/>Why Separate /apps Filesystem?<text:bookmark-end text:name="why-separate-apps-filesystem"/></text:h>
      <text:p text:style-name="First_20_paragraph">Initially:</text:p>
      <text:list text:style-name="L53">
        <text:list-item>
          <text:p text:style-name="P156">each VM had a 30 GB local disk</text:p>
        </text:list-item>
        <text:list-item>
          <text:p text:style-name="P156">/home was exported from master over NFS</text:p>
        </text:list-item>
      </text:list>
      <text:p text:style-name="First_20_paragraph">Concern encountered:</text:p>
      <text:p text:style-name="P157">Shared /home only had ~30 GB available.</text:p>
      <text:p text:style-name="P158">Spack and HPC software stacks can become very large.</text:p>
      <text:p text:style-name="First_20_paragraph">Important HPC storage concept:</text:p>
      <text:p text:style-name="Text_20_body">Real HPC clusters usually separate:</text:p>
      <table:table table:name="Table26" table:style-name="Table26">
        <table:table-column table:style-name="Table26.A"/>
        <table:table-column table:style-name="Table26.B"/>
        <table:table-header-rows>
          <table:table-row>
            <table:table-cell table:style-name="TableHeaderRowCell" office:value-type="string">
              <text:p text:style-name="Table_20_Heading">Filesystem</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home</text:p>
          </table:table-cell>
          <table:table-cell table:style-name="TableRowCell" office:value-type="string">
            <text:p text:style-name="Table_20_Contents">user files</text:p>
          </table:table-cell>
        </table:table-row>
        <table:table-row>
          <table:table-cell table:style-name="TableRowCell" office:value-type="string">
            <text:p text:style-name="Table_20_Contents">/apps</text:p>
          </table:table-cell>
          <table:table-cell table:style-name="TableRowCell" office:value-type="string">
            <text:p text:style-name="Table_20_Contents">software stack</text:p>
          </table:table-cell>
        </table:table-row>
        <table:table-row>
          <table:table-cell table:style-name="TableRowCell" office:value-type="string">
            <text:p text:style-name="Table_20_Contents">/scratch</text:p>
          </table:table-cell>
          <table:table-cell table:style-name="TableRowCell" office:value-type="string">
            <text:p text:style-name="Table_20_Contents">temporary runtime data</text:p>
          </table:table-cell>
        </table:table-row>
        <table:table-row>
          <table:table-cell table:style-name="TableRowCell" office:value-type="string">
            <text:p text:style-name="Table_20_Contents">/archive</text:p>
          </table:table-cell>
          <table:table-cell table:style-name="TableRowCell" office:value-type="string">
            <text:p text:style-name="Table_20_Contents">long-term storage</text:p>
          </table:table-cell>
        </table:table-row>
      </table:table>
      <text:p text:style-name="First_20_paragraph">Therefore a dedicated:</text:p>
      <text:p text:style-name="P159">/apps</text:p>
      <text:p text:style-name="First_20_paragraph">filesystem was created.</text:p>
      <text:p text:style-name="Text_20_body">This is significantly closer to real HPC architecture.</text:p>
      <text:h text:style-name="Heading_20_2" text:outline-level="2"><text:bookmark-start text:name="important-storage-architecture-concept"/>IMPORTANT Storage Architecture Concept<text:bookmark-end text:name="important-storage-architecture-concept"/></text:h>
      <text:p text:style-name="First_20_paragraph">Each VM still has its own independent local storage.</text:p>
      <text:p text:style-name="Text_20_body">Example:</text:p>
      <table:table table:name="Table27" table:style-name="Table27">
        <table:table-column table:style-name="Table27.A"/>
        <table:table-column table:style-name="Table27.B"/>
        <table:table-header-rows>
          <table:table-row>
            <table:table-cell table:style-name="TableHeaderRowCell" office:value-type="string">
              <text:p text:style-name="Table_20_Heading">Node</text:p>
            </table:table-cell>
            <table:table-cell table:style-name="TableHeaderRowCell" office:value-type="string">
              <text:p text:style-name="Table_20_Heading">Local Disk</text:p>
            </table:table-cell>
          </table:table-row>
        </table:table-header-rows>
        <table:table-row>
          <table:table-cell table:style-name="TableRowCell" office:value-type="string">
            <text:p text:style-name="Table_20_Contents">master</text:p>
          </table:table-cell>
          <table:table-cell table:style-name="TableRowCell" office:value-type="string">
            <text:p text:style-name="Table_20_Contents">30 GB</text:p>
          </table:table-cell>
        </table:table-row>
        <table:table-row>
          <table:table-cell table:style-name="TableRowCell" office:value-type="string">
            <text:p text:style-name="Table_20_Contents">login</text:p>
          </table:table-cell>
          <table:table-cell table:style-name="TableRowCell" office:value-type="string">
            <text:p text:style-name="Table_20_Contents">30 GB</text:p>
          </table:table-cell>
        </table:table-row>
        <table:table-row>
          <table:table-cell table:style-name="TableRowCell" office:value-type="string">
            <text:p text:style-name="Table_20_Contents">compute01</text:p>
          </table:table-cell>
          <table:table-cell table:style-name="TableRowCell" office:value-type="string">
            <text:p text:style-name="Table_20_Contents">30 GB</text:p>
          </table:table-cell>
        </table:table-row>
        <table:table-row>
          <table:table-cell table:style-name="TableRowCell" office:value-type="string">
            <text:p text:style-name="Table_20_Contents">compute02</text:p>
          </table:table-cell>
          <table:table-cell table:style-name="TableRowCell" office:value-type="string">
            <text:p text:style-name="Table_20_Contents">30 GB</text:p>
          </table:table-cell>
        </table:table-row>
        <table:table-row>
          <table:table-cell table:style-name="TableRowCell" office:value-type="string">
            <text:p text:style-name="Table_20_Contents">compute03</text:p>
          </table:table-cell>
          <table:table-cell table:style-name="TableRowCell" office:value-type="string">
            <text:p text:style-name="Table_20_Contents">30 GB</text:p>
          </table:table-cell>
        </table:table-row>
      </table:table>
      <text:p text:style-name="First_20_paragraph">When:</text:p>
      <text:p text:style-name="P160">master:/home</text:p>
      <text:p text:style-name="First_20_paragraph">was mounted via NFS:</text:p>
      <text:list text:style-name="L54">
        <text:list-item>
          <text:p text:style-name="P161">compute node local /home became hidden</text:p>
        </text:list-item>
        <text:list-item>
          <text:p text:style-name="P161">but local disks still exist</text:p>
        </text:list-item>
      </text:list>
      <text:p text:style-name="First_20_paragraph">Only the exported filesystem becomes shared.</text:p>
      <text:p text:style-name="Text_20_body">Therefore:</text:p>
      <text:p text:style-name="P162">/apps</text:p>
      <text:p text:style-name="First_20_paragraph">was created as a dedicated shared software layer.</text:p>
      <text:h text:style-name="Heading_20_2" text:outline-level="2"><text:bookmark-start text:name="add-new-virtual-disk-to-master"/>Add New Virtual Disk to Master<text:bookmark-end text:name="add-new-virtual-disk-to-master"/></text:h>
      <text:p text:style-name="First_20_paragraph">A second virtual disk was attached ONLY to:</text:p>
      <text:p text:style-name="P163">master</text:p>
      <text:p text:style-name="First_20_paragraph">Purpose:</text:p>
      <text:list text:style-name="L55">
        <text:list-item>
          <text:p text:style-name="P164">centralized software storage</text:p>
        </text:list-item>
        <text:list-item>
          <text:p text:style-name="P164">shared application filesystem</text:p>
        </text:list-item>
        <text:list-item>
          <text:p text:style-name="P164">Spack software stack</text:p>
        </text:list-item>
      </text:list>
      <text:p text:style-name="First_20_paragraph">Disk size selected:</text:p>
      <text:p text:style-name="P165">60 GB</text:p>
      <text:p text:style-name="First_20_paragraph">Disk type:</text:p>
      <text:p text:style-name="P166">VDI (Dynamically Allocated)</text:p>
      <text:h text:style-name="Heading_20_2" text:outline-level="2"><text:bookmark-start text:name="verify-new-disk-detection"/>Verify New Disk Detection<text:bookmark-end text:name="verify-new-disk-detection"/></text:h>
      <text:p text:style-name="First_20_paragraph">After booting master:</text:p>
      <text:p text:style-name="Preformatted_20_Text">
<text:span text:style-name="ExtensionTok">lsblk</text:span>
</text:p>
      <text:p text:style-name="First_20_paragraph">Expected:</text:p>
      <text:p text:style-name="P167">sda <text:s text:c="3"/>30G</text:p>
      <text:p text:style-name="P168">sdb <text:s text:c="3"/>60G</text:p>
      <text:p text:style-name="First_20_paragraph">Important:</text:p>
      <table:table table:name="Table28" table:style-name="Table28">
        <table:table-column table:style-name="Table28.A"/>
        <table:table-column table:style-name="Table28.B"/>
        <table:table-header-rows>
          <table:table-row>
            <table:table-cell table:style-name="TableHeaderRowCell" office:value-type="string">
              <text:p text:style-name="Table_20_Heading">Device</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sda</text:p>
          </table:table-cell>
          <table:table-cell table:style-name="TableRowCell" office:value-type="string">
            <text:p text:style-name="Table_20_Contents">OS disk</text:p>
          </table:table-cell>
        </table:table-row>
        <table:table-row>
          <table:table-cell table:style-name="TableRowCell" office:value-type="string">
            <text:p text:style-name="Table_20_Contents">sdb</text:p>
          </table:table-cell>
          <table:table-cell table:style-name="TableRowCell" office:value-type="string">
            <text:p text:style-name="Table_20_Contents">New apps disk</text:p>
          </table:table-cell>
        </table:table-row>
      </table:table>
      <text:p text:style-name="First_20_paragraph">Only:</text:p>
      <text:p text:style-name="P169">sdb</text:p>
      <text:p text:style-name="First_20_paragraph">was modified.</text:p>
      <text:h text:style-name="Heading_20_2" text:outline-level="2"><text:bookmark-start text:name="create-gpt-partition-table"/>Create GPT Partition Table<text:bookmark-end text:name="create-gpt-partition-table"/></text:h>
      <text:p text:style-name="Preformatted_20_Text">
<text:span text:style-name="FunctionTok">sudo</text:span><text:span text:style-name="NormalTok"><text:s text:c="1"/>fdisk /dev/sdb</text:span>
</text:p>
      <text:p text:style-name="First_20_paragraph">Inside fdisk:</text:p>
      <text:p text:style-name="Text_20_body">Create GPT label:</text:p>
      <text:p text:style-name="P170">g</text:p>
      <text:p text:style-name="First_20_paragraph">Create partition:</text:p>
      <text:p text:style-name="P171">n</text:p>
      <text:p text:style-name="First_20_paragraph">Accept defaults.</text:p>
      <text:p text:style-name="Text_20_body">Write changes:</text:p>
      <text:p text:style-name="P172">w</text:p>
      <text:h text:style-name="Heading_20_2" text:outline-level="2"><text:bookmark-start text:name="verify-partition"/>Verify Partition<text:bookmark-end text:name="verify-partition"/></text:h>
      <text:p text:style-name="Preformatted_20_Text">
<text:span text:style-name="ExtensionTok">lsblk</text:span>
</text:p>
      <text:p text:style-name="First_20_paragraph">Expected:</text:p>
      <text:p text:style-name="P173">sdb</text:p>
      <text:p text:style-name="P174">└── sdb1</text:p>
      <text:h text:style-name="Heading_20_2" text:outline-level="2"><text:bookmark-start text:name="create-xfs-filesystem"/>Create XFS Filesystem<text:bookmark-end text:name="create-xfs-filesystem"/></text:h>
      <text:p text:style-name="Preformatted_20_Text">
<text:span text:style-name="FunctionTok">sudo</text:span><text:span text:style-name="NormalTok"><text:s text:c="1"/>mkfs.xfs /dev/sdb1</text:span>
</text:p>
      <text:p text:style-name="First_20_paragraph">Why XFS?</text:p>
      <text:list text:style-name="L56">
        <text:list-item>
          <text:p text:style-name="P175">default enterprise filesystem</text:p>
        </text:list-item>
        <text:list-item>
          <text:p text:style-name="P175">highly scalable</text:p>
        </text:list-item>
        <text:list-item>
          <text:p text:style-name="P175">excellent for large filesystems</text:p>
        </text:list-item>
        <text:list-item>
          <text:p text:style-name="P175">commonly used in HPC</text:p>
        </text:list-item>
      </text:list>
      <text:h text:style-name="Heading_20_2" text:outline-level="2"><text:bookmark-start text:name="create-mount-point"/>Create Mount Point<text:bookmark-end text:name="create-mount-point"/></text:h>
      <text:p text:style-name="Preformatted_20_Text">
<text:span text:style-name="FunctionTok">sudo</text:span><text:span text:style-name="NormalTok"><text:s text:c="1"/>mkdir </text:span><text:span text:style-name="AttributeTok">-p</text:span><text:span text:style-name="NormalTok"><text:s text:c="1"/>/apps</text:span>
</text:p>
      <text:h text:style-name="Heading_20_2" text:outline-level="2"><text:bookmark-start text:name="get-filesystem-uuid"/>Get Filesystem UUID<text:bookmark-end text:name="get-filesystem-uuid"/></text:h>
      <text:p text:style-name="Preformatted_20_Text">
<text:span text:style-name="FunctionTok">sudo</text:span><text:span text:style-name="NormalTok"><text:s text:c="1"/>blkid /dev/sdb1</text:span>
</text:p>
      <text:p text:style-name="First_20_paragraph">Example:</text:p>
      <text:p text:style-name="P176">UUID="xxxxxxxx-xxxx-xxxx"</text:p>
      <text:h text:style-name="Heading_20_2" text:outline-level="2"><text:bookmark-start text:name="configure-persistent-mount"/>Configure Persistent Mount<text:bookmark-end text:name="configure-persistent-mount"/></text:h>
      <text:p text:style-name="First_20_paragraph">Edit:</text:p>
      <text:p text:style-name="Preformatted_20_Text">
<text:span text:style-name="FunctionTok">sudo</text:span><text:span text:style-name="NormalTok"><text:s text:c="1"/>vim /etc/fstab</text:span>
</text:p>
      <text:p text:style-name="First_20_paragraph">Add:</text:p>
      <text:p text:style-name="P177">UUID=YOUR_UUID_HERE <text:s text:c="2"/>/apps <text:s text:c="2"/>xfs <text:s text:c="2"/>defaults <text:s text:c="2"/>0 0</text:p>
      <text:p text:style-name="First_20_paragraph">Important Linux administration concept:</text:p>
      <text:p text:style-name="Text_20_body">UUIDs are preferred over:</text:p>
      <text:p text:style-name="P178">/dev/sdb1</text:p>
      <text:p text:style-name="First_20_paragraph">because device names can change after reboot.</text:p>
      <text:h text:style-name="Heading_20_2" text:outline-level="2"><text:bookmark-start text:name="mount-filesystem"/>Mount Filesystem<text:bookmark-end text:name="mount-filesystem"/></text:h>
      <text:p text:style-name="Preformatted_20_Text">
<text:span text:style-name="FunctionTok">sudo</text:span><text:span text:style-name="NormalTok"><text:s text:c="1"/>mount </text:span><text:span text:style-name="AttributeTok">-a</text:span>
</text:p>
      <text:h text:style-name="Heading_20_2" text:outline-level="2"><text:bookmark-start text:name="verify-mount-1"/>Verify Mount<text:bookmark-end text:name="verify-mount-1"/></text:h>
      <text:p text:style-name="Preformatted_20_Text">
<text:span text:style-name="FunctionTok">df</text:span><text:span text:style-name="NormalTok"><text:s text:c="1"/></text:span><text:span text:style-name="AttributeTok">-h</text:span>
</text:p>
      <text:p text:style-name="First_20_paragraph">Expected:</text:p>
      <text:p text:style-name="P179">/apps</text:p>
      <text:p text:style-name="First_20_paragraph">mounted with approximately:</text:p>
      <text:p text:style-name="P180">60 GB</text:p>
      <text:h text:style-name="Heading_20_2" text:outline-level="2"><text:bookmark-start text:name="configure-ownership"/>Configure Ownership<text:bookmark-end text:name="configure-ownership"/></text:h>
      <text:p text:style-name="Preformatted_20_Text">
<text:span text:style-name="FunctionTok">sudo</text:span><text:span text:style-name="NormalTok"><text:s text:c="1"/>chown hpcadmin:hpcadmin /apps</text:span>
</text:p>
      <text:h text:style-name="Heading_20_2" text:outline-level="2"><text:bookmark-start text:name="create-shared-hpc-software-hierarchy"/>Create Shared HPC Software Hierarchy<text:bookmark-end text:name="create-shared-hpc-software-hierarchy"/></text:h>
      <text:p text:style-name="Preformatted_20_Text">
<text:span text:style-name="FunctionTok">mkdir</text:span><text:span text:style-name="NormalTok"><text:s text:c="1"/></text:span><text:span text:style-name="AttributeTok">-p</text:span><text:span text:style-name="NormalTok"><text:s text:c="1"/>/apps/</text:span><text:span text:style-name="DataTypeTok">{spack</text:span><text:span text:style-name="OperatorTok">,</text:span><text:span text:style-name="DataTypeTok">modulefiles</text:span><text:span text:style-name="OperatorTok">,</text:span><text:span text:style-name="DataTypeTok">software</text:span><text:span text:style-name="OperatorTok">,</text:span><text:span text:style-name="DataTypeTok">sources}</text:span>
</text:p>
      <text:p text:style-name="First_20_paragraph">Resulting structure:</text:p>
      <text:p text:style-name="P181">/apps</text:p>
      <text:p text:style-name="P182">├── spack</text:p>
      <text:p text:style-name="P183">├── modulefiles</text:p>
      <text:p text:style-name="P184">├── software</text:p>
      <text:p text:style-name="P185">└── sources</text:p>
      <text:h text:style-name="Heading_20_2" text:outline-level="2"><text:bookmark-start text:name="hpc-software-hierarchy-concept"/>HPC Software Hierarchy Concept<text:bookmark-end text:name="hpc-software-hierarchy-concept"/></text:h>
      <text:p text:style-name="First_20_paragraph">Purpose of directories:</text:p>
      <table:table table:name="Table29" table:style-name="Table29">
        <table:table-column table:style-name="Table29.A"/>
        <table:table-column table:style-name="Table29.B"/>
        <table:table-header-rows>
          <table:table-row>
            <table:table-cell table:style-name="TableHeaderRowCell" office:value-type="string">
              <text:p text:style-name="Table_20_Heading">Directory</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spack</text:p>
          </table:table-cell>
          <table:table-cell table:style-name="TableRowCell" office:value-type="string">
            <text:p text:style-name="Table_20_Contents">Spack package manager</text:p>
          </table:table-cell>
        </table:table-row>
        <table:table-row>
          <table:table-cell table:style-name="TableRowCell" office:value-type="string">
            <text:p text:style-name="Table_20_Contents">modulefiles</text:p>
          </table:table-cell>
          <table:table-cell table:style-name="TableRowCell" office:value-type="string">
            <text:p text:style-name="Table_20_Contents">custom modulefiles</text:p>
          </table:table-cell>
        </table:table-row>
        <table:table-row>
          <table:table-cell table:style-name="TableRowCell" office:value-type="string">
            <text:p text:style-name="Table_20_Contents">software</text:p>
          </table:table-cell>
          <table:table-cell table:style-name="TableRowCell" office:value-type="string">
            <text:p text:style-name="Table_20_Contents">installed software</text:p>
          </table:table-cell>
        </table:table-row>
        <table:table-row>
          <table:table-cell table:style-name="TableRowCell" office:value-type="string">
            <text:p text:style-name="Table_20_Contents">sources</text:p>
          </table:table-cell>
          <table:table-cell table:style-name="TableRowCell" office:value-type="string">
            <text:p text:style-name="Table_20_Contents">downloaded sources</text:p>
          </table:table-cell>
        </table:table-row>
      </table:table>
      <text:p text:style-name="First_20_paragraph">This is similar to production HPC software layouts.</text:p>
      <text:h text:style-name="Heading_20_2" text:outline-level="2"><text:bookmark-start text:name="export-apps-via-nfs"/>Export /apps via NFS<text:bookmark-end text:name="export-apps-via-nfs"/></text:h>
      <text:p text:style-name="First_20_paragraph">Edit exports file:</text:p>
      <text:p text:style-name="Preformatted_20_Text">
<text:span text:style-name="FunctionTok">sudo</text:span><text:span text:style-name="NormalTok"><text:s text:c="1"/>vim /etc/exports</text:span>
</text:p>
      <text:p text:style-name="First_20_paragraph">Add:</text:p>
      <text:p text:style-name="P186">/apps 10.10.10.0/24(rw,sync,no_root_squash)</text:p>
      <text:h text:style-name="Heading_20_2" text:outline-level="2"><text:bookmark-start text:name="apply-nfs-exports"/>Apply NFS Exports<text:bookmark-end text:name="apply-nfs-exports"/></text:h>
      <text:p text:style-name="Preformatted_20_Text">
<text:span text:style-name="FunctionTok">sudo</text:span><text:span text:style-name="NormalTok"><text:s text:c="1"/>exportfs </text:span><text:span text:style-name="AttributeTok">-rav</text:span>
</text:p>
      <text:h text:style-name="Heading_20_2" text:outline-level="2"><text:bookmark-start text:name="verify-exports-1"/>Verify Exports<text:bookmark-end text:name="verify-exports-1"/></text:h>
      <text:p text:style-name="Preformatted_20_Text">
<text:span text:style-name="ExtensionTok">showmount</text:span><text:span text:style-name="NormalTok"><text:s text:c="1"/></text:span><text:span text:style-name="AttributeTok">-e</text:span><text:span text:style-name="NormalTok"><text:s text:c="1"/>localhost</text:span>
</text:p>
      <text:p text:style-name="First_20_paragraph">Expected:</text:p>
      <text:p text:style-name="P187">/apps</text:p>
      <text:p text:style-name="P188">/home</text:p>
      <text:h text:style-name="Heading_20_2" text:outline-level="2"><text:bookmark-start text:name="create-mount-points-on-client-nodes"/>Create Mount Points on Client Nodes<text:bookmark-end text:name="create-mount-points-on-client-nodes"/></text:h>
      <text:p text:style-name="First_20_paragraph">On:</text:p>
      <text:list text:style-name="L57">
        <text:list-item>
          <text:p text:style-name="P189">login</text:p>
        </text:list-item>
        <text:list-item>
          <text:p text:style-name="P189">compute01</text:p>
        </text:list-item>
        <text:list-item>
          <text:p text:style-name="P189">compute02</text:p>
        </text:list-item>
        <text:list-item>
          <text:p text:style-name="P189">compute03</text:p>
        </text:list-item>
      </text:list>
      <text:p text:style-name="First_20_paragraph">Create:</text:p>
      <text:p text:style-name="Preformatted_20_Text">
<text:span text:style-name="FunctionTok">sudo</text:span><text:span text:style-name="NormalTok"><text:s text:c="1"/>mkdir </text:span><text:span text:style-name="AttributeTok">-p</text:span><text:span text:style-name="NormalTok"><text:s text:c="1"/>/apps</text:span>
</text:p>
      <text:h text:style-name="Heading_20_2" text:outline-level="2"><text:bookmark-start text:name="configure-persistent-nfs-mounts-1"/>Configure Persistent NFS Mounts<text:bookmark-end text:name="configure-persistent-nfs-mounts-1"/></text:h>
      <text:p text:style-name="First_20_paragraph">Edit:</text:p>
      <text:p text:style-name="Preformatted_20_Text">
<text:span text:style-name="FunctionTok">sudo</text:span><text:span text:style-name="NormalTok"><text:s text:c="1"/>vim /etc/fstab</text:span>
</text:p>
      <text:p text:style-name="First_20_paragraph">Add:</text:p>
      <text:p text:style-name="P190">master:/apps <text:s text:c="2"/>/apps <text:s text:c="2"/>nfs <text:s text:c="2"/>defaults,_netdev <text:s text:c="2"/>0 0</text:p>
      <text:h text:style-name="Heading_20_2" text:outline-level="2"><text:bookmark-start text:name="mount-shared-apps-filesystem"/>Mount Shared /apps Filesystem<text:bookmark-end text:name="mount-shared-apps-filesystem"/></text:h>
      <text:p text:style-name="Preformatted_20_Text">
<text:span text:style-name="FunctionTok">sudo</text:span><text:span text:style-name="NormalTok"><text:s text:c="1"/>mount </text:span><text:span text:style-name="AttributeTok">-a</text:span>
</text:p>
      <text:h text:style-name="Heading_20_2" text:outline-level="2"><text:bookmark-start text:name="verify-shared-mount"/>Verify Shared Mount<text:bookmark-end text:name="verify-shared-mount"/></text:h>
      <text:p text:style-name="Preformatted_20_Text">
<text:span text:style-name="FunctionTok">df</text:span><text:span text:style-name="NormalTok"><text:s text:c="1"/></text:span><text:span text:style-name="AttributeTok">-h</text:span>
</text:p>
      <text:p text:style-name="First_20_paragraph">Expected:</text:p>
      <text:p text:style-name="P191">master:/apps</text:p>
      <text:p text:style-name="First_20_paragraph">mounted on all nodes.</text:p>
      <text:h text:style-name="Heading_20_2" text:outline-level="2"><text:bookmark-start text:name="verify-shared-filesystem-functionality"/>Verify Shared Filesystem Functionality<text:bookmark-end text:name="verify-shared-filesystem-functionality"/></text:h>
      <text:p text:style-name="First_20_paragraph">On master:</text:p>
      <text:p text:style-name="Preformatted_20_Text">
<text:span text:style-name="FunctionTok">touch</text:span><text:span text:style-name="NormalTok"><text:s text:c="1"/>/apps/testfile</text:span>
</text:p>
      <text:p text:style-name="First_20_paragraph">On compute node:</text:p>
      <text:p text:style-name="Preformatted_20_Text">
<text:span text:style-name="FunctionTok">ls</text:span><text:span text:style-name="NormalTok"><text:s text:c="1"/>/apps</text:span>
</text:p>
      <text:p text:style-name="First_20_paragraph">Expected:</text:p>
      <text:p text:style-name="P192">testfile</text:p>
      <text:p text:style-name="First_20_paragraph">This verifies:</text:p>
      <text:list text:style-name="L58">
        <text:list-item>
          <text:p text:style-name="P193">shared software filesystem</text:p>
        </text:list-item>
        <text:list-item>
          <text:p text:style-name="P193">NFS functionality</text:p>
        </text:list-item>
        <text:list-item>
          <text:p text:style-name="P193">cluster-wide software visibility</text:p>
        </text:list-item>
      </text:list>
      <text:h text:style-name="Heading_20_2" text:outline-level="2"><text:bookmark-start text:name="hpc-architecture-after-apps-setup"/>HPC Architecture After /apps Setup<text:bookmark-end text:name="hpc-architecture-after-apps-setup"/></text:h>
      <text:p text:style-name="First_20_paragraph">Current cluster storage architecture:</text:p>
      <table:table table:name="Table30" table:style-name="Table30">
        <table:table-column table:style-name="Table30.A"/>
        <table:table-column table:style-name="Table30.B"/>
        <table:table-header-rows>
          <table:table-row>
            <table:table-cell table:style-name="TableHeaderRowCell" office:value-type="string">
              <text:p text:style-name="Table_20_Heading">Filesystem</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home</text:p>
          </table:table-cell>
          <table:table-cell table:style-name="TableRowCell" office:value-type="string">
            <text:p text:style-name="Table_20_Contents">user files</text:p>
          </table:table-cell>
        </table:table-row>
        <table:table-row>
          <table:table-cell table:style-name="TableRowCell" office:value-type="string">
            <text:p text:style-name="Table_20_Contents">/apps</text:p>
          </table:table-cell>
          <table:table-cell table:style-name="TableRowCell" office:value-type="string">
            <text:p text:style-name="Table_20_Contents">software stack</text:p>
          </table:table-cell>
        </table:table-row>
        <table:table-row>
          <table:table-cell table:style-name="TableRowCell" office:value-type="string">
            <text:p text:style-name="Table_20_Contents">local disks</text:p>
          </table:table-cell>
          <table:table-cell table:style-name="TableRowCell" office:value-type="string">
            <text:p text:style-name="Table_20_Contents">local runtime storage</text:p>
          </table:table-cell>
        </table:table-row>
      </table:table>
      <text:p text:style-name="First_20_paragraph">This resembles real HPC environments significantly more closely.</text:p>
      <text:h text:style-name="Heading_20_1" text:outline-level="1"><text:bookmark-start text:name="spack-software-stack-mpi-runtime-validation"/>Spack Software Stack + MPI Runtime Validation<text:bookmark-end text:name="spack-software-stack-mpi-runtime-validation"/></text:h>
      <text:p text:style-name="First_20_paragraph">Goal:</text:p>
      <text:p text:style-name="Text_20_body">Create centralized HPC software stack using:</text:p>
      <text:list text:style-name="L59">
        <text:list-item>
          <text:p text:style-name="P194">Spack</text:p>
        </text:list-item>
        <text:list-item>
          <text:p text:style-name="P194">shared software filesystem</text:p>
        </text:list-item>
        <text:list-item>
          <text:p text:style-name="P194">shared compilers</text:p>
        </text:list-item>
        <text:list-item>
          <text:p text:style-name="P194">shared MPI stack</text:p>
        </text:list-item>
        <text:list-item>
          <text:p text:style-name="P194">scheduler-aware runtime execution</text:p>
        </text:list-item>
      </text:list>
      <text:p text:style-name="First_20_paragraph">This phase validates:</text:p>
      <text:list text:style-name="L60">
        <text:list-item>
          <text:p text:style-name="P195">software distribution</text:p>
        </text:list-item>
        <text:list-item>
          <text:p text:style-name="P195">multinode execution</text:p>
        </text:list-item>
        <text:list-item>
          <text:p text:style-name="P195">Slurm integration</text:p>
        </text:list-item>
        <text:list-item>
          <text:p text:style-name="P195">MPI runtime functionality</text:p>
        </text:list-item>
      </text:list>
      <text:p text:style-name="First_20_paragraph">After completing this section you will be able to:</text:p>
      <text:list text:style-name="L61">
        <text:list-item>
          <text:p text:style-name="P196">install HPC software using Spack</text:p>
        </text:list-item>
        <text:list-item>
          <text:p text:style-name="P196">manage multiple compiler versions</text:p>
        </text:list-item>
        <text:list-item>
          <text:p text:style-name="P196">manage multiple MPI versions</text:p>
        </text:list-item>
        <text:list-item>
          <text:p text:style-name="P196">load software dynamically</text:p>
        </text:list-item>
        <text:list-item>
          <text:p text:style-name="P196">compile MPI applications</text:p>
        </text:list-item>
        <text:list-item>
          <text:p text:style-name="P196">execute distributed jobs using Slurm</text:p>
        </text:list-item>
        <text:list-item>
          <text:p text:style-name="P196">monitor and debug jobs</text:p>
        </text:list-item>
        <text:list-item>
          <text:p text:style-name="P196">understand performance metrics</text:p>
        </text:list-item>
      </text:list>
      <text:h text:style-name="Heading_20_2" text:outline-level="2"><text:bookmark-start text:name="important-hpc-software-stack-concept"/>IMPORTANT HPC Software Stack Concept<text:bookmark-end text:name="important-hpc-software-stack-concept"/></text:h>
      <text:p text:style-name="First_20_paragraph">Instead of:</text:p>
      <text:p text:style-name="P197">dnf install openmpi</text:p>
      <text:p text:style-name="First_20_paragraph">a centralized HPC software stack was created.</text:p>
      <text:p text:style-name="Text_20_body">Benefits:</text:p>
      <text:list text:style-name="L62">
        <text:list-item>
          <text:p text:style-name="P198">software installed once</text:p>
        </text:list-item>
        <text:list-item>
          <text:p text:style-name="P198">accessible cluster-wide</text:p>
        </text:list-item>
        <text:list-item>
          <text:p text:style-name="P198">compiler hierarchy support</text:p>
        </text:list-item>
        <text:list-item>
          <text:p text:style-name="P198">reproducible builds</text:p>
        </text:list-item>
        <text:list-item>
          <text:p text:style-name="P198">module-based software environments</text:p>
        </text:list-item>
        <text:list-item>
          <text:p text:style-name="P198">centralized software management</text:p>
        </text:list-item>
      </text:list>
      <text:p text:style-name="First_20_paragraph">This approach is significantly closer to real HPC centers.</text:p>
      <text:p text:style-name="Text_20_body">In production HPC environments:</text:p>
      <text:list text:style-name="L63">
        <text:list-item>
          <text:p text:style-name="P199">operating system packages are separated</text:p>
        </text:list-item>
        <text:list-item>
          <text:p text:style-name="P199">scientific software stack is separated</text:p>
        </text:list-item>
        <text:list-item>
          <text:p text:style-name="P199">compiler stacks are separated</text:p>
        </text:list-item>
        <text:list-item>
          <text:p text:style-name="P199">MPI stacks are separated</text:p>
        </text:list-item>
      </text:list>
      <text:p text:style-name="First_20_paragraph">This separation improves:</text:p>
      <text:list text:style-name="L64">
        <text:list-item>
          <text:p text:style-name="P200">portability</text:p>
        </text:list-item>
        <text:list-item>
          <text:p text:style-name="P200">reproducibility</text:p>
        </text:list-item>
        <text:list-item>
          <text:p text:style-name="P200">scalability</text:p>
        </text:list-item>
        <text:list-item>
          <text:p text:style-name="P200">maintenance</text:p>
        </text:list-item>
      </text:list>
      <text:h text:style-name="Heading_20_2" text:outline-level="2"><text:bookmark-start text:name="important-shared-filesystem-concept"/>IMPORTANT Shared Filesystem Concept<text:bookmark-end text:name="important-shared-filesystem-concept"/></text:h>
      <text:p text:style-name="First_20_paragraph">The cluster uses:</text:p>
      <text:p text:style-name="P201">/apps</text:p>
      <text:p text:style-name="First_20_paragraph">as shared application storage.</text:p>
      <text:p text:style-name="Text_20_body">Because:</text:p>
      <text:p text:style-name="P202">/apps</text:p>
      <text:p text:style-name="First_20_paragraph">is mounted cluster-wide through NFS:</text:p>
      <text:list text:style-name="L65">
        <text:list-item>
          <text:p text:style-name="P203">software installed once becomes visible everywhere</text:p>
        </text:list-item>
        <text:list-item>
          <text:p text:style-name="P203">compute nodes automatically access installed software</text:p>
        </text:list-item>
        <text:list-item>
          <text:p text:style-name="P203">users share common software stack</text:p>
        </text:list-item>
        <text:list-item>
          <text:p text:style-name="P203">recompilation is unnecessary on compute nodes</text:p>
        </text:list-item>
      </text:list>
      <text:p text:style-name="First_20_paragraph">This is one of the MOST important HPC architecture concepts.</text:p>
      <text:h text:style-name="Heading_20_2" text:outline-level="2"><text:bookmark-start text:name="install-development-tools"/>Install Development Tools<text:bookmark-end text:name="install-development-tools"/></text:h>
      <text:p text:style-name="First_20_paragraph">Installed manually on ALL nodes:</text:p>
      <text:p text:style-name="Preformatted_20_Text">
<text:span text:style-name="FunctionTok">sudo</text:span><text:span text:style-name="NormalTok"><text:s text:c="1"/>dnf groupinstall </text:span><text:span text:style-name="AttributeTok">-y</text:span><text:span text:style-name="NormalTok"><text:s text:c="1"/></text:span><text:span text:style-name="StringTok">"Development Tools"</text:span>
</text:p>
      <text:p text:style-name="First_20_paragraph">Purpose:</text:p>
      <text:p text:style-name="Text_20_body">Provides:</text:p>
      <text:list text:style-name="L66">
        <text:list-item>
          <text:p text:style-name="P204">gcc</text:p>
        </text:list-item>
        <text:list-item>
          <text:p text:style-name="P204">g++</text:p>
        </text:list-item>
        <text:list-item>
          <text:p text:style-name="P204">gfortran</text:p>
        </text:list-item>
        <text:list-item>
          <text:p text:style-name="P204">make</text:p>
        </text:list-item>
        <text:list-item>
          <text:p text:style-name="P204">linker tools</text:p>
        </text:list-item>
        <text:list-item>
          <text:p text:style-name="P204">build utilities</text:p>
        </text:list-item>
        <text:list-item>
          <text:p text:style-name="P204">development environment</text:p>
        </text:list-item>
      </text:list>
      <text:p text:style-name="First_20_paragraph">Important note:</text:p>
      <text:p text:style-name="P205">System compilers are still required even when using Spack.</text:p>
      <text:p text:style-name="First_20_paragraph">Reason:</text:p>
      <text:p text:style-name="Text_20_body">Spack builds software from source code and therefore still requires:</text:p>
      <text:list text:style-name="L67">
        <text:list-item>
          <text:p text:style-name="P206">assembler</text:p>
        </text:list-item>
        <text:list-item>
          <text:p text:style-name="P206">linker</text:p>
        </text:list-item>
        <text:list-item>
          <text:p text:style-name="P206">basic compiler toolchain</text:p>
        </text:list-item>
      </text:list>
      <text:h text:style-name="Heading_20_2" text:outline-level="2"><text:bookmark-start text:name="move-into-shared-application-filesystem"/>Move into Shared Application Filesystem<text:bookmark-end text:name="move-into-shared-application-filesystem"/></text:h>
      <text:p text:style-name="First_20_paragraph">Run on:</text:p>
      <text:p text:style-name="P207">master</text:p>
      <text:p text:style-name="First_20_paragraph">Move into shared applications directory:</text:p>
      <text:p text:style-name="Preformatted_20_Text">
<text:span text:style-name="BuiltInTok">cd</text:span><text:span text:style-name="NormalTok"><text:s text:c="1"/>/apps</text:span>
</text:p>
      <text:p text:style-name="First_20_paragraph">Verify:</text:p>
      <text:p text:style-name="Preformatted_20_Text">
<text:span text:style-name="BuiltInTok">pwd</text:span>
</text:p>
      <text:p text:style-name="First_20_paragraph">Expected:</text:p>
      <text:p text:style-name="P208">/apps</text:p>
      <text:h text:style-name="Heading_20_2" text:outline-level="2"><text:bookmark-start text:name="clone-spack-into-shared-filesystem"/>Clone Spack into Shared Filesystem<text:bookmark-end text:name="clone-spack-into-shared-filesystem"/></text:h>
      <text:p text:style-name="First_20_paragraph">Clone Spack:</text:p>
      <text:p text:style-name="Preformatted_20_Text">
<text:span text:style-name="FunctionTok">git</text:span><text:span text:style-name="NormalTok"><text:s text:c="1"/>clone https://github.com/spack/spack.git</text:span>
</text:p>
      <text:p text:style-name="First_20_paragraph">Expected:</text:p>
      <text:p text:style-name="P209">/apps/spack</text:p>
      <text:p text:style-name="First_20_paragraph">This creates centralized package manager installation.</text:p>
      <text:h text:style-name="Heading_20_2" text:outline-level="2"><text:bookmark-start text:name="enter-spack-directory"/>Enter Spack Directory<text:bookmark-end text:name="enter-spack-directory"/></text:h>
      <text:p text:style-name="Preformatted_20_Text">
<text:span text:style-name="BuiltInTok">cd</text:span><text:span text:style-name="NormalTok"><text:s text:c="1"/>spack</text:span>
</text:p>
      <text:p text:style-name="First_20_paragraph">Verify:</text:p>
      <text:p text:style-name="Preformatted_20_Text">
<text:span text:style-name="BuiltInTok">pwd</text:span>
</text:p>
      <text:p text:style-name="First_20_paragraph">Expected:</text:p>
      <text:p text:style-name="P210">/apps/spack</text:p>
      <text:h text:style-name="Heading_20_2" text:outline-level="2"><text:bookmark-start text:name="initialize-spack-environment"/>Initialize Spack Environment<text:bookmark-end text:name="initialize-spack-environment"/></text:h>
      <text:p text:style-name="First_20_paragraph">Initialize Spack:</text:p>
      <text:p text:style-name="Preformatted_20_Text">
<text:span text:style-name="BuiltInTok">source</text:span><text:span text:style-name="NormalTok"><text:s text:c="1"/>share/spack/setup-env.sh</text:span>
</text:p>
      <text:p text:style-name="First_20_paragraph">Purpose:</text:p>
      <text:p text:style-name="Text_20_body">Adds:</text:p>
      <text:list text:style-name="L68">
        <text:list-item>
          <text:p text:style-name="P211">spack command</text:p>
        </text:list-item>
        <text:list-item>
          <text:p text:style-name="P211">shell integration</text:p>
        </text:list-item>
        <text:list-item>
          <text:p text:style-name="P211">environment variables</text:p>
        </text:list-item>
        <text:list-item>
          <text:p text:style-name="P211">package management environment</text:p>
        </text:list-item>
      </text:list>
      <text:p text:style-name="First_20_paragraph">to current shell session.</text:p>
      <text:p text:style-name="Text_20_body">Without initialization:</text:p>
      <text:list text:style-name="L69">
        <text:list-item>
          <text:p text:style-name="P212">spack command will not work</text:p>
        </text:list-item>
        <text:list-item>
          <text:p text:style-name="P212">spack load will fail</text:p>
        </text:list-item>
        <text:list-item>
          <text:p text:style-name="P212">software environments will not activate</text:p>
        </text:list-item>
      </text:list>
      <text:h text:style-name="Heading_20_2" text:outline-level="2"><text:bookmark-start text:name="important-shell-environment-concept"/>IMPORTANT Shell Environment Concept<text:bookmark-end text:name="important-shell-environment-concept"/></text:h>
      <text:p text:style-name="P213">source</text:p>
      <text:p text:style-name="First_20_paragraph">does NOT execute script normally.</text:p>
      <text:p text:style-name="Text_20_body">Instead:</text:p>
      <text:p text:style-name="P214">it modifies current shell environment</text:p>
      <text:p text:style-name="First_20_paragraph">This is extremely important in:</text:p>
      <text:list text:style-name="L70">
        <text:list-item>
          <text:p text:style-name="P215">Spack</text:p>
        </text:list-item>
        <text:list-item>
          <text:p text:style-name="P215">modules</text:p>
        </text:list-item>
        <text:list-item>
          <text:p text:style-name="P215">MPI environments</text:p>
        </text:list-item>
        <text:list-item>
          <text:p text:style-name="P215">compiler environments</text:p>
        </text:list-item>
      </text:list>
      <text:h text:style-name="Heading_20_2" text:outline-level="2"><text:bookmark-start text:name="make-spack-permanent"/>Make Spack Permanent<text:bookmark-end text:name="make-spack-permanent"/></text:h>
      <text:p text:style-name="First_20_paragraph">To avoid sourcing manually every session:</text:p>
      <text:p text:style-name="Text_20_body">Edit:</text:p>
      <text:p text:style-name="Preformatted_20_Text">
<text:span text:style-name="ExtensionTok">vim</text:span><text:span text:style-name="NormalTok"><text:s text:c="1"/>~/.bashrc</text:span>
</text:p>
      <text:p text:style-name="First_20_paragraph">Add:</text:p>
      <text:p text:style-name="Preformatted_20_Text">
<text:span text:style-name="BuiltInTok">source</text:span><text:span text:style-name="NormalTok"><text:s text:c="1"/>/apps/spack/share/spack/setup-env.sh</text:span>
</text:p>
      <text:p text:style-name="First_20_paragraph">Reload shell:</text:p>
      <text:p text:style-name="Preformatted_20_Text">
<text:span text:style-name="BuiltInTok">source</text:span><text:span text:style-name="NormalTok"><text:s text:c="1"/>~/.bashrc</text:span>
</text:p>
      <text:p text:style-name="First_20_paragraph">Verify:</text:p>
      <text:p text:style-name="Preformatted_20_Text">
<text:span text:style-name="ExtensionTok">spack</text:span><text:span text:style-name="NormalTok"><text:s text:c="1"/></text:span><text:span text:style-name="AttributeTok">--version</text:span>
</text:p>
      <text:p text:style-name="First_20_paragraph">Expected:</text:p>
      <text:list text:style-name="L71">
        <text:list-item>
          <text:p text:style-name="P216">Spack version information</text:p>
        </text:list-item>
      </text:list>
      <text:h text:style-name="Heading_20_2" text:outline-level="2"><text:bookmark-start text:name="clone-additional-spack-repository"/>Clone Additional Spack Repository<text:bookmark-end text:name="clone-additional-spack-repository"/></text:h>
      <text:p text:style-name="First_20_paragraph">Clone repository:</text:p>
      <text:p text:style-name="Preformatted_20_Text">
<text:span text:style-name="FunctionTok">git</text:span><text:span text:style-name="NormalTok"><text:s text:c="1"/>clone https://github.com/spack/spack-packages.git</text:span>
</text:p>
      <text:p text:style-name="First_20_paragraph">Purpose:</text:p>
      <text:p text:style-name="Text_20_body">Adds additional package definitions.</text:p>
      <text:h text:style-name="Heading_20_2" text:outline-level="2"><text:bookmark-start text:name="configure-spack-repository"/>Configure Spack Repository<text:bookmark-end text:name="configure-spack-repository"/></text:h>
      <text:p text:style-name="Preformatted_20_Text">
<text:span text:style-name="ExtensionTok">spack</text:span><text:span text:style-name="NormalTok"><text:s text:c="1"/>repo set </text:span><text:span text:style-name="AttributeTok">--destination</text:span><text:span text:style-name="NormalTok"><text:s text:c="1"/></text:span><text:span text:style-name="StringTok">"</text:span><text:span text:style-name="VariableTok">$(</text:span><text:span text:style-name="BuiltInTok">pwd</text:span><text:span text:style-name="VariableTok">)</text:span><text:span text:style-name="StringTok">/spack-packages"</text:span><text:span text:style-name="NormalTok"><text:s text:c="1"/>builtin</text:span>
</text:p>
      <text:p text:style-name="First_20_paragraph">Purpose:</text:p>
      <text:p text:style-name="Text_20_body">Configure additional repository support.</text:p>
      <text:p text:style-name="Text_20_body">This allows:</text:p>
      <text:list text:style-name="L72">
        <text:list-item>
          <text:p text:style-name="P217">package metadata</text:p>
        </text:list-item>
        <text:list-item>
          <text:p text:style-name="P217">package recipes</text:p>
        </text:list-item>
        <text:list-item>
          <text:p text:style-name="P217">software definitions</text:p>
        </text:list-item>
      </text:list>
      <text:p text:style-name="First_20_paragraph">to become visible to Spack.</text:p>
      <text:h text:style-name="Heading_20_2" text:outline-level="2"><text:bookmark-start text:name="verify-spack-functionality"/>Verify Spack Functionality<text:bookmark-end text:name="verify-spack-functionality"/></text:h>
      <text:p text:style-name="Preformatted_20_Text">
<text:span text:style-name="ExtensionTok">spack</text:span><text:span text:style-name="NormalTok"><text:s text:c="1"/>info gcc</text:span>
</text:p>
      <text:p text:style-name="First_20_paragraph">Expected:</text:p>
      <text:p text:style-name="Text_20_body">Detailed GCC package information.</text:p>
      <text:p text:style-name="Text_20_body">This verifies:</text:p>
      <text:list text:style-name="L73">
        <text:list-item>
          <text:p text:style-name="P218">Spack environment working</text:p>
        </text:list-item>
        <text:list-item>
          <text:p text:style-name="P218">package repository functional</text:p>
        </text:list-item>
        <text:list-item>
          <text:p text:style-name="P218">package metadata accessible</text:p>
        </text:list-item>
      </text:list>
      <text:h text:style-name="Heading_20_2" text:outline-level="2"><text:bookmark-start text:name="important-hpc-software-stack-concept-1"/>IMPORTANT HPC Software Stack Concept<text:bookmark-end text:name="important-hpc-software-stack-concept-1"/></text:h>
      <text:p text:style-name="First_20_paragraph">Spack operates as:</text:p>
      <text:p text:style-name="P219">source-based HPC package manager</text:p>
      <text:p text:style-name="First_20_paragraph">Unlike:</text:p>
      <table:table table:name="Table31" table:style-name="Table31">
        <table:table-column table:style-name="Table31.A"/>
        <table:table-column table:style-name="Table31.B"/>
        <table:table-header-rows>
          <table:table-row>
            <table:table-cell table:style-name="TableHeaderRowCell" office:value-type="string">
              <text:p text:style-name="Table_20_Heading">Package Manager</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dnf</text:p>
          </table:table-cell>
          <table:table-cell table:style-name="TableRowCell" office:value-type="string">
            <text:p text:style-name="Table_20_Contents">operating system</text:p>
          </table:table-cell>
        </table:table-row>
        <table:table-row>
          <table:table-cell table:style-name="TableRowCell" office:value-type="string">
            <text:p text:style-name="Table_20_Contents">Spack</text:p>
          </table:table-cell>
          <table:table-cell table:style-name="TableRowCell" office:value-type="string">
            <text:p text:style-name="Table_20_Contents">HPC software ecosystem</text:p>
          </table:table-cell>
        </table:table-row>
      </table:table>
      <text:p text:style-name="First_20_paragraph">Production HPC systems commonly separate:</text:p>
      <text:list text:style-name="L74">
        <text:list-item>
          <text:p text:style-name="P220">OS packages</text:p>
        </text:list-item>
        <text:list-item>
          <text:p text:style-name="P220">scientific software stacks</text:p>
        </text:list-item>
      </text:list>
      <text:p text:style-name="First_20_paragraph">exactly like this setup.</text:p>
      <text:h text:style-name="Heading_20_2" text:outline-level="2"><text:bookmark-start text:name="important-spack-build-concept"/>IMPORTANT Spack Build Concept<text:bookmark-end text:name="important-spack-build-concept"/></text:h>
      <text:p text:style-name="First_20_paragraph">When installing software using Spack:</text:p>
      <text:p text:style-name="P221">software is compiled from source</text:p>
      <text:p text:style-name="First_20_paragraph">Advantages:</text:p>
      <text:list text:style-name="L75">
        <text:list-item>
          <text:p text:style-name="P222">architecture optimization</text:p>
        </text:list-item>
        <text:list-item>
          <text:p text:style-name="P222">compiler flexibility</text:p>
        </text:list-item>
        <text:list-item>
          <text:p text:style-name="P222">dependency control</text:p>
        </text:list-item>
        <text:list-item>
          <text:p text:style-name="P222">reproducibility</text:p>
        </text:list-item>
        <text:list-item>
          <text:p text:style-name="P222">variant support</text:p>
        </text:list-item>
      </text:list>
      <text:p text:style-name="First_20_paragraph">Disadvantages:</text:p>
      <text:list text:style-name="L76">
        <text:list-item>
          <text:p text:style-name="P223">longer installation time</text:p>
        </text:list-item>
      </text:list>
      <text:h text:style-name="Heading_20_2" text:outline-level="2"><text:bookmark-start text:name="detect-available-compilers"/>Detect Available Compilers<text:bookmark-end text:name="detect-available-compilers"/></text:h>
      <text:p text:style-name="First_20_paragraph">Before installing software:</text:p>
      <text:p text:style-name="Preformatted_20_Text">
<text:span text:style-name="ExtensionTok">spack</text:span><text:span text:style-name="NormalTok"><text:s text:c="1"/>compiler find</text:span>
</text:p>
      <text:p text:style-name="First_20_paragraph">Purpose:</text:p>
      <text:p text:style-name="Text_20_body">Detect system compilers available for building software.</text:p>
      <text:p text:style-name="Text_20_body">Verify detected compilers:</text:p>
      <text:p text:style-name="Preformatted_20_Text">
<text:span text:style-name="ExtensionTok">spack</text:span><text:span text:style-name="NormalTok"><text:s text:c="1"/>compilers</text:span>
</text:p>
      <text:p text:style-name="First_20_paragraph">Expected:</text:p>
      <text:list text:style-name="L77">
        <text:list-item>
          <text:p text:style-name="P224">compiler list</text:p>
        </text:list-item>
      </text:list>
      <text:h text:style-name="Heading_20_2" text:outline-level="2"><text:bookmark-start text:name="install-gcc-using-spack"/>Install GCC Using Spack<text:bookmark-end text:name="install-gcc-using-spack"/></text:h>
      <text:p text:style-name="First_20_paragraph">Install GCC version:</text:p>
      <text:p text:style-name="Preformatted_20_Text">
<text:span text:style-name="ExtensionTok">spack</text:span><text:span text:style-name="NormalTok"><text:s text:c="1"/>install gcc@13.4.0</text:span>
</text:p>
      <text:p text:style-name="First_20_paragraph">Purpose:</text:p>
      <text:p text:style-name="Text_20_body">Create dedicated HPC compiler stack.</text:p>
      <text:p text:style-name="Text_20_body">This may take considerable time because:</text:p>
      <text:list text:style-name="L78">
        <text:list-item>
          <text:p text:style-name="P225">GCC itself is compiled from source</text:p>
        </text:list-item>
        <text:list-item>
          <text:p text:style-name="P225">dependencies are built</text:p>
        </text:list-item>
        <text:list-item>
          <text:p text:style-name="P225">optimization occurs</text:p>
        </text:list-item>
      </text:list>
      <text:h text:style-name="Heading_20_2" text:outline-level="2"><text:bookmark-start text:name="important-multiple-compiler-version-concept"/>IMPORTANT Multiple Compiler Version Concept<text:bookmark-end text:name="important-multiple-compiler-version-concept"/></text:h>
      <text:p text:style-name="First_20_paragraph">Production HPC systems frequently maintain multiple compiler versions simultaneously.</text:p>
      <text:p text:style-name="Text_20_body">Example:</text:p>
      <text:p text:style-name="P226">gcc@11</text:p>
      <text:p text:style-name="P227">gcc@12</text:p>
      <text:p text:style-name="P228">gcc@13</text:p>
      <text:p text:style-name="P229">intel</text:p>
      <text:p text:style-name="P230">nvhpc</text:p>
      <text:p text:style-name="P231">clang</text:p>
      <text:p text:style-name="First_20_paragraph">Reasons:</text:p>
      <text:list text:style-name="L79">
        <text:list-item>
          <text:p text:style-name="P232">application compatibility</text:p>
        </text:list-item>
        <text:list-item>
          <text:p text:style-name="P232">compiler ABI differences</text:p>
        </text:list-item>
        <text:list-item>
          <text:p text:style-name="P232">reproducibility</text:p>
        </text:list-item>
        <text:list-item>
          <text:p text:style-name="P232">benchmark consistency</text:p>
        </text:list-item>
      </text:list>
      <text:h text:style-name="Heading_20_2" text:outline-level="2"><text:bookmark-start text:name="verify-installed-software"/>Verify Installed Software<text:bookmark-end text:name="verify-installed-software"/></text:h>
      <text:p text:style-name="First_20_paragraph">List installed packages:</text:p>
      <text:p text:style-name="Preformatted_20_Text">
<text:span text:style-name="ExtensionTok">spack</text:span><text:span text:style-name="NormalTok"><text:s text:c="1"/>find</text:span>
</text:p>
      <text:p text:style-name="First_20_paragraph">Expected example:</text:p>
      <text:p text:style-name="P233">==&gt; 1 installed package</text:p>
      <text:p text:style-name="P234">gcc@13.4.0</text:p>
      <text:h text:style-name="Heading_20_2" text:outline-level="2"><text:bookmark-start text:name="load-installed-gcc-compiler"/>Load Installed GCC Compiler<text:bookmark-end text:name="load-installed-gcc-compiler"/></text:h>
      <text:p text:style-name="Preformatted_20_Text">
<text:span text:style-name="ExtensionTok">spack</text:span><text:span text:style-name="NormalTok"><text:s text:c="1"/>load gcc@13.4.0</text:span>
</text:p>
      <text:p text:style-name="First_20_paragraph">Purpose:</text:p>
      <text:p text:style-name="Text_20_body">Activate compiler environment.</text:p>
      <text:p text:style-name="Text_20_body">Verify compiler path:</text:p>
      <text:p text:style-name="Preformatted_20_Text">
<text:span text:style-name="FunctionTok">which</text:span><text:span text:style-name="NormalTok"><text:s text:c="1"/>gcc</text:span>
</text:p>
      <text:p text:style-name="First_20_paragraph">Expected:</text:p>
      <text:list text:style-name="L80">
        <text:list-item>
          <text:p text:style-name="P235">Spack GCC path</text:p>
        </text:list-item>
      </text:list>
      <text:p text:style-name="First_20_paragraph">Verify version:</text:p>
      <text:p text:style-name="Preformatted_20_Text">
<text:span text:style-name="FunctionTok">gcc</text:span><text:span text:style-name="NormalTok"><text:s text:c="1"/></text:span><text:span text:style-name="AttributeTok">--version</text:span>
</text:p>
      <text:p text:style-name="First_20_paragraph">Expected:</text:p>
      <text:list text:style-name="L81">
        <text:list-item>
          <text:p text:style-name="P236">GCC 13.4.0</text:p>
        </text:list-item>
      </text:list>
      <text:h text:style-name="Heading_20_2" text:outline-level="2"><text:bookmark-start text:name="important-runtime-environment-concept"/>IMPORTANT Runtime Environment Concept<text:bookmark-end text:name="important-runtime-environment-concept"/></text:h>
      <text:p text:style-name="First_20_paragraph">When software is loaded:</text:p>
      <text:list text:style-name="L82">
        <text:list-item>
          <text:p text:style-name="P237">PATH changes</text:p>
        </text:list-item>
        <text:list-item>
          <text:p text:style-name="P237">LD<text:span text:style-name="T2">LIBRARYPATH</text:span> changes</text:p>
        </text:list-item>
        <text:list-item>
          <text:p text:style-name="P237">MANPATH changes</text:p>
        </text:list-item>
      </text:list>
      <text:p text:style-name="First_20_paragraph">This allows applications to locate:</text:p>
      <text:list text:style-name="L83">
        <text:list-item>
          <text:p text:style-name="P238">executables</text:p>
        </text:list-item>
        <text:list-item>
          <text:p text:style-name="P238">shared libraries</text:p>
        </text:list-item>
        <text:list-item>
          <text:p text:style-name="P238">runtime dependencies</text:p>
        </text:list-item>
      </text:list>
      <text:p text:style-name="First_20_paragraph">automatically.</text:p>
      <text:h text:style-name="Heading_20_2" text:outline-level="2"><text:bookmark-start text:name="register-newly-installed-compiler"/>Register Newly Installed Compiler<text:bookmark-end text:name="register-newly-installed-compiler"/></text:h>
      <text:p text:style-name="First_20_paragraph">After installing GCC:</text:p>
      <text:p text:style-name="Preformatted_20_Text">
<text:span text:style-name="ExtensionTok">spack</text:span><text:span text:style-name="NormalTok"><text:s text:c="1"/>compiler find</text:span>
</text:p>
      <text:p text:style-name="First_20_paragraph">Purpose:</text:p>
      <text:p text:style-name="Text_20_body">Allow Spack to use newly installed GCC for future package builds.</text:p>
      <text:p text:style-name="Text_20_body">Verify:</text:p>
      <text:p text:style-name="Preformatted_20_Text">
<text:span text:style-name="ExtensionTok">spack</text:span><text:span text:style-name="NormalTok"><text:s text:c="1"/>compilers</text:span>
</text:p>
      <text:p text:style-name="First_20_paragraph">Expected:</text:p>
      <text:list text:style-name="L84">
        <text:list-item>
          <text:p text:style-name="P239">new GCC compiler entry</text:p>
        </text:list-item>
      </text:list>
      <text:h text:style-name="Heading_20_2" text:outline-level="2"><text:bookmark-start text:name="install-openmpi-using-spack"/>Install OpenMPI Using Spack<text:bookmark-end text:name="install-openmpi-using-spack"/></text:h>
      <text:p text:style-name="First_20_paragraph">Install MPI runtime:</text:p>
      <text:p text:style-name="Preformatted_20_Text">
<text:span text:style-name="ExtensionTok">spack</text:span><text:span text:style-name="NormalTok"><text:s text:c="1"/>install openmpi</text:span>
</text:p>
      <text:p text:style-name="First_20_paragraph">Purpose:</text:p>
      <text:p text:style-name="Text_20_body">Create shared MPI runtime stack.</text:p>
      <text:p text:style-name="Text_20_body">This installation includes:</text:p>
      <text:list text:style-name="L85">
        <text:list-item>
          <text:p text:style-name="P240">MPI runtime</text:p>
        </text:list-item>
        <text:list-item>
          <text:p text:style-name="P240">MPI compiler wrappers</text:p>
        </text:list-item>
        <text:list-item>
          <text:p text:style-name="P240">MPI libraries</text:p>
        </text:list-item>
        <text:list-item>
          <text:p text:style-name="P240">distributed runtime environment</text:p>
        </text:list-item>
      </text:list>
      <text:h text:style-name="Heading_20_2" text:outline-level="2"><text:bookmark-start text:name="important-mpi-compiler-dependency-concept"/>IMPORTANT MPI Compiler Dependency Concept<text:bookmark-end text:name="important-mpi-compiler-dependency-concept"/></text:h>
      <text:p text:style-name="First_20_paragraph">MPI stacks are tightly coupled with compiler toolchains.</text:p>
      <text:p text:style-name="Text_20_body">Example:</text:p>
      <text:p text:style-name="P241">openmpi built using gcc@13</text:p>
      <text:p text:style-name="First_20_paragraph">This is important because:</text:p>
      <text:list text:style-name="L86">
        <text:list-item>
          <text:p text:style-name="P242">ABI compatibility matters</text:p>
        </text:list-item>
        <text:list-item>
          <text:p text:style-name="P242">runtime compatibility matters</text:p>
        </text:list-item>
        <text:list-item>
          <text:p text:style-name="P242">mixed compiler environments may fail</text:p>
        </text:list-item>
      </text:list>
      <text:h text:style-name="Heading_20_2" text:outline-level="2"><text:bookmark-start text:name="verify-installed-software-tree"/>Verify Installed Software Tree<text:bookmark-end text:name="verify-installed-software-tree"/></text:h>
      <text:p text:style-name="First_20_paragraph">Show dependency tree:</text:p>
      <text:p text:style-name="Preformatted_20_Text">
<text:span text:style-name="ExtensionTok">spack</text:span><text:span text:style-name="NormalTok"><text:s text:c="1"/>find </text:span><text:span text:style-name="AttributeTok">-d</text:span>
</text:p>
      <text:p text:style-name="First_20_paragraph">Purpose:</text:p>
      <text:p text:style-name="Text_20_body">Displays:</text:p>
      <text:list text:style-name="L87">
        <text:list-item>
          <text:p text:style-name="P243">dependency hierarchy</text:p>
        </text:list-item>
        <text:list-item>
          <text:p text:style-name="P243">compiler hierarchy</text:p>
        </text:list-item>
        <text:list-item>
          <text:p text:style-name="P243">runtime dependencies</text:p>
        </text:list-item>
      </text:list>
      <text:p text:style-name="First_20_paragraph">Example:</text:p>
      <text:p text:style-name="P244">openmpi</text:p>
      <text:p text:style-name="P245"><text:s text:c="3"/>^gcc@13.4.0</text:p>
      <text:h text:style-name="Heading_20_2" text:outline-level="2"><text:bookmark-start text:name="important-spack-spec-concept"/>IMPORTANT Spack Spec Concept<text:bookmark-end text:name="important-spack-spec-concept"/></text:h>
      <text:p text:style-name="First_20_paragraph">Every Spack installation contains:</text:p>
      <text:list text:style-name="L88">
        <text:list-item>
          <text:p text:style-name="P246">package version</text:p>
        </text:list-item>
        <text:list-item>
          <text:p text:style-name="P246">compiler information</text:p>
        </text:list-item>
        <text:list-item>
          <text:p text:style-name="P246">dependency tree</text:p>
        </text:list-item>
        <text:list-item>
          <text:p text:style-name="P246">unique installation hash</text:p>
        </text:list-item>
      </text:list>
      <text:p text:style-name="First_20_paragraph">Example:</text:p>
      <text:p text:style-name="P247">openmpi@5.0.7%gcc@13.4.0</text:p>
      <text:p text:style-name="First_20_paragraph">Meaning:</text:p>
      <table:table table:name="Table32" table:style-name="Table32">
        <table:table-column table:style-name="Table32.A"/>
        <table:table-column table:style-name="Table32.B"/>
        <table:table-header-rows>
          <table:table-row>
            <table:table-cell table:style-name="TableHeaderRowCell" office:value-type="string">
              <text:p text:style-name="Table_20_Heading">Component</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openmpi</text:p>
          </table:table-cell>
          <table:table-cell table:style-name="TableRowCell" office:value-type="string">
            <text:p text:style-name="Table_20_Contents">package</text:p>
          </table:table-cell>
        </table:table-row>
        <table:table-row>
          <table:table-cell table:style-name="TableRowCell" office:value-type="string">
            <text:p text:style-name="Table_20_Contents">5.0.7</text:p>
          </table:table-cell>
          <table:table-cell table:style-name="TableRowCell" office:value-type="string">
            <text:p text:style-name="Table_20_Contents">package version</text:p>
          </table:table-cell>
        </table:table-row>
        <table:table-row>
          <table:table-cell table:style-name="TableRowCell" office:value-type="string">
            <text:p text:style-name="Table_20_Contents">gcc@13.4.0</text:p>
          </table:table-cell>
          <table:table-cell table:style-name="TableRowCell" office:value-type="string">
            <text:p text:style-name="Table_20_Contents">compiler used</text:p>
          </table:table-cell>
        </table:table-row>
      </table:table>
      <text:h text:style-name="Heading_20_2" text:outline-level="2"><text:bookmark-start text:name="important-hash-based-software-loading"/>IMPORTANT Hash-Based Software Loading<text:bookmark-end text:name="important-hash-based-software-loading"/></text:h>
      <text:p text:style-name="First_20_paragraph">Sometimes multiple builds of same version exist because of:</text:p>
      <text:list text:style-name="L89">
        <text:list-item>
          <text:p text:style-name="P248">different compilers</text:p>
        </text:list-item>
        <text:list-item>
          <text:p text:style-name="P248">different variants</text:p>
        </text:list-item>
        <text:list-item>
          <text:p text:style-name="P248">different dependencies</text:p>
        </text:list-item>
      </text:list>
      <text:p text:style-name="First_20_paragraph">Spack assigns:</text:p>
      <text:p text:style-name="P249">unique hashes</text:p>
      <text:p text:style-name="First_20_paragraph">View hashes:</text:p>
      <text:p text:style-name="Preformatted_20_Text">
<text:span text:style-name="ExtensionTok">spack</text:span><text:span text:style-name="NormalTok"><text:s text:c="1"/>find </text:span><text:span text:style-name="AttributeTok">-l</text:span>
</text:p>
      <text:p text:style-name="First_20_paragraph">Expected:</text:p>
      <text:p text:style-name="P250">abc1234 gcc@13.4.0</text:p>
      <text:p text:style-name="P251">xyz5678 openmpi@5.0.7</text:p>
      <text:p text:style-name="First_20_paragraph">Load using hash:</text:p>
      <text:p text:style-name="Preformatted_20_Text">
<text:span text:style-name="ExtensionTok">spack</text:span><text:span text:style-name="NormalTok"><text:s text:c="1"/>load /xyz5678</text:span>
</text:p>
      <text:p text:style-name="First_20_paragraph">This is extremely common in production HPC systems.</text:p>
      <text:h text:style-name="Heading_20_2" text:outline-level="2"><text:bookmark-start text:name="load-openmpi-environment"/>Load OpenMPI Environment<text:bookmark-end text:name="load-openmpi-environment"/></text:h>
      <text:p text:style-name="Preformatted_20_Text">
<text:span text:style-name="ExtensionTok">spack</text:span><text:span text:style-name="NormalTok"><text:s text:c="1"/>load openmpi</text:span>
</text:p>
      <text:p text:style-name="First_20_paragraph">Verify:</text:p>
      <text:p text:style-name="Preformatted_20_Text">
<text:span text:style-name="FunctionTok">which</text:span><text:span text:style-name="NormalTok"><text:s text:c="1"/>mpicc</text:span>
</text:p>
      <text:p text:style-name="First_20_paragraph">Expected:</text:p>
      <text:list text:style-name="L90">
        <text:list-item>
          <text:p text:style-name="P252">Spack OpenMPI wrapper path</text:p>
        </text:list-item>
      </text:list>
      <text:p text:style-name="First_20_paragraph">Verify MPI runtime:</text:p>
      <text:p text:style-name="Preformatted_20_Text">
<text:span text:style-name="ExtensionTok">mpirun</text:span><text:span text:style-name="NormalTok"><text:s text:c="1"/></text:span><text:span text:style-name="AttributeTok">--version</text:span>
</text:p>
      <text:p text:style-name="First_20_paragraph">Expected:</text:p>
      <text:list text:style-name="L91">
        <text:list-item>
          <text:p text:style-name="P253">OpenMPI version information</text:p>
        </text:list-item>
      </text:list>
      <text:h text:style-name="Heading_20_2" text:outline-level="2"><text:bookmark-start text:name="important-mpi-wrapper-concept"/>IMPORTANT MPI Wrapper Concept<text:bookmark-end text:name="important-mpi-wrapper-concept"/></text:h>
      <text:p text:style-name="P254">mpicc</text:p>
      <text:p text:style-name="First_20_paragraph">is NOT a compiler itself.</text:p>
      <text:p text:style-name="Text_20_body">It is a wrapper that automatically injects:</text:p>
      <text:list text:style-name="L92">
        <text:list-item>
          <text:p text:style-name="P255">MPI headers</text:p>
        </text:list-item>
        <text:list-item>
          <text:p text:style-name="P255">MPI libraries</text:p>
        </text:list-item>
        <text:list-item>
          <text:p text:style-name="P255">runtime linker flags</text:p>
        </text:list-item>
      </text:list>
      <text:p text:style-name="First_20_paragraph">around GCC.</text:p>
      <text:p text:style-name="Text_20_body">This is a critical HPC build concept.</text:p>
      <text:h text:style-name="Heading_20_2" text:outline-level="2"><text:bookmark-start text:name="verify-loaded-software"/>Verify Loaded Software<text:bookmark-end text:name="verify-loaded-software"/></text:h>
      <text:p text:style-name="First_20_paragraph">Display loaded packages:</text:p>
      <text:p text:style-name="Preformatted_20_Text">
<text:span text:style-name="ExtensionTok">spack</text:span><text:span text:style-name="NormalTok"><text:s text:c="1"/>find </text:span><text:span text:style-name="AttributeTok">--loaded</text:span>
</text:p>
      <text:p text:style-name="First_20_paragraph">Unload OpenMPI:</text:p>
      <text:p text:style-name="Preformatted_20_Text">
<text:span text:style-name="ExtensionTok">spack</text:span><text:span text:style-name="NormalTok"><text:s text:c="1"/>unload openmpi</text:span>
</text:p>
      <text:p text:style-name="First_20_paragraph">Unload all software:</text:p>
      <text:p text:style-name="Preformatted_20_Text">
<text:span text:style-name="ExtensionTok">spack</text:span><text:span text:style-name="NormalTok"><text:s text:c="1"/>unload </text:span><text:span text:style-name="AttributeTok">--all</text:span>
</text:p>
      <text:p text:style-name="First_20_paragraph">Verify:</text:p>
      <text:p text:style-name="Preformatted_20_Text">
<text:span text:style-name="ExtensionTok">spack</text:span><text:span text:style-name="NormalTok"><text:s text:c="1"/>find </text:span><text:span text:style-name="AttributeTok">--loaded</text:span>
</text:p>
      <text:p text:style-name="First_20_paragraph">Expected:</text:p>
      <text:list text:style-name="L93">
        <text:list-item>
          <text:p text:style-name="P256">no loaded packages</text:p>
        </text:list-item>
      </text:list>
      <text:h text:style-name="Heading_20_2" text:outline-level="2"><text:bookmark-start text:name="create-mpi-performance-validation-program"/>Create MPI Performance Validation Program<text:bookmark-end text:name="create-mpi-performance-validation-program"/></text:h>
      <text:p text:style-name="First_20_paragraph">Create source file:</text:p>
      <text:p text:style-name="Preformatted_20_Text">
<text:span text:style-name="ExtensionTok">vim</text:span><text:span text:style-name="NormalTok"><text:s text:c="1"/>mpi_sum.c</text:span>
</text:p>
      <text:p text:style-name="First_20_paragraph">Purpose:</text:p>
      <text:list text:style-name="L94">
        <text:list-item>
          <text:p text:style-name="P257">validate MPI runtime</text:p>
        </text:list-item>
        <text:list-item>
          <text:p text:style-name="P257">validate multinode execution</text:p>
        </text:list-item>
        <text:list-item>
          <text:p text:style-name="P257">validate scheduler-aware execution</text:p>
        </text:list-item>
        <text:list-item>
          <text:p text:style-name="P257">compare serial vs parallel runtime</text:p>
        </text:list-item>
        <text:list-item>
          <text:p text:style-name="P257">demonstrate reduction operations</text:p>
        </text:list-item>
        <text:list-item>
          <text:p text:style-name="P257">calculate speedup</text:p>
        </text:list-item>
        <text:list-item>
          <text:p text:style-name="P257">calculate efficiency</text:p>
        </text:list-item>
      </text:list>
      <text:p text:style-name="First_20_paragraph">Paste:</text:p>
      <text:p text:style-name="Preformatted_20_Text">
<text:span text:style-name="PreprocessorTok">#include </text:span><text:span text:style-name="ImportTok">&lt;mpi.h&gt;</text:span>
</text:p>
      <text:p text:style-name="Preformatted_20_Text">
<text:span text:style-name="PreprocessorTok">#include </text:span><text:span text:style-name="ImportTok">&lt;stdio.h&gt;</text:span>
</text:p>
      <text:p text:style-name="Preformatted_20_Text">
<text:span text:style-name="PreprocessorTok">#include </text:span><text:span text:style-name="ImportTok">&lt;stdlib.h&gt;</text:span>
</text:p>
      <text:p text:style-name="Preformatted_20_Text">
</text:p>
      <text:p text:style-name="Preformatted_20_Text">
<text:span text:style-name="PreprocessorTok">#define N </text:span><text:span text:style-name="DecValTok">1000000000</text:span>
</text:p>
      <text:p text:style-name="Preformatted_20_Text">
</text:p>
      <text:p text:style-name="Preformatted_20_Text">
<text:span text:style-name="DataTypeTok">double</text:span><text:span text:style-name="NormalTok"><text:s text:c="1"/>serial_sum</text:span><text:span text:style-name="OperatorTok">()</text:span>
</text:p>
      <text:p text:style-name="Preformatted_20_Text">
<text:span text:style-name="OperatorTok">{</text:span>
</text:p>
      <text:p text:style-name="Preformatted_20_Text">
<text:span text:style-name="NormalTok"><text:s text:c="4"/></text:span><text:span text:style-name="DataTypeTok">double</text:span><text:span text:style-name="NormalTok"><text:s text:c="1"/>sum </text:span><text:span text:style-name="OperatorTok">=</text:span><text:span text:style-name="NormalTok"><text:s text:c="1"/></text:span><text:span text:style-name="FloatTok">0.0</text:span><text:span text:style-name="OperatorTok">;</text:span>
</text:p>
      <text:p text:style-name="Preformatted_20_Text">
</text:p>
      <text:p text:style-name="Preformatted_20_Text">
<text:span text:style-name="NormalTok"><text:s text:c="4"/></text:span><text:span text:style-name="ControlFlowTok">for</text:span><text:span text:style-name="OperatorTok">(</text:span><text:span text:style-name="DataTypeTok">long</text:span><text:span text:style-name="NormalTok"><text:s text:c="1"/></text:span><text:span text:style-name="DataTypeTok">long</text:span><text:span text:style-name="NormalTok"><text:s text:c="1"/></text:span><text:span text:style-name="DataTypeTok">int</text:span><text:span text:style-name="NormalTok"><text:s text:c="1"/>i </text:span><text:span text:style-name="OperatorTok">=</text:span><text:span text:style-name="NormalTok"><text:s text:c="1"/></text:span><text:span text:style-name="DecValTok">0</text:span><text:span text:style-name="OperatorTok">;</text:span><text:span text:style-name="NormalTok"><text:s text:c="1"/>i </text:span><text:span text:style-name="OperatorTok">&lt;</text:span><text:span text:style-name="NormalTok"><text:s text:c="1"/>N</text:span><text:span text:style-name="OperatorTok">;</text:span><text:span text:style-name="NormalTok"><text:s text:c="1"/>i</text:span><text:span text:style-name="OperatorTok">++)</text:span>
</text:p>
      <text:p text:style-name="Preformatted_20_Text">
<text:span text:style-name="NormalTok"><text:s text:c="4"/></text:span><text:span text:style-name="OperatorTok">{</text:span>
</text:p>
      <text:p text:style-name="Preformatted_20_Text">
<text:span text:style-name="NormalTok"><text:s text:c="8"/>sum </text:span><text:span text:style-name="OperatorTok">+=</text:span><text:span text:style-name="NormalTok"><text:s text:c="1"/>i</text:span><text:span text:style-name="OperatorTok">;</text:span>
</text:p>
      <text:p text:style-name="Preformatted_20_Text">
<text:span text:style-name="NormalTok"><text:s text:c="4"/></text:span><text:span text:style-name="OperatorTok">}</text:span>
</text:p>
      <text:p text:style-name="Preformatted_20_Text">
</text:p>
      <text:p text:style-name="Preformatted_20_Text">
<text:span text:style-name="NormalTok"><text:s text:c="4"/></text:span><text:span text:style-name="ControlFlowTok">return</text:span><text:span text:style-name="NormalTok"><text:s text:c="1"/>sum</text:span><text:span text:style-name="OperatorTok">;</text:span>
</text:p>
      <text:p text:style-name="Preformatted_20_Text">
<text:span text:style-name="OperatorTok">}</text:span>
</text:p>
      <text:p text:style-name="Preformatted_20_Text">
</text:p>
      <text:p text:style-name="Preformatted_20_Text">
<text:span text:style-name="DataTypeTok">int</text:span><text:span text:style-name="NormalTok"><text:s text:c="1"/>main</text:span><text:span text:style-name="OperatorTok">(</text:span><text:span text:style-name="DataTypeTok">int</text:span><text:span text:style-name="NormalTok"><text:s text:c="1"/>argc</text:span><text:span text:style-name="OperatorTok">,</text:span><text:span text:style-name="NormalTok"><text:s text:c="1"/></text:span><text:span text:style-name="DataTypeTok">char</text:span><text:span text:style-name="NormalTok"><text:s text:c="1"/></text:span><text:span text:style-name="OperatorTok">*</text:span><text:span text:style-name="NormalTok">argv</text:span><text:span text:style-name="OperatorTok">[])</text:span>
</text:p>
      <text:p text:style-name="Preformatted_20_Text">
<text:span text:style-name="OperatorTok">{</text:span>
</text:p>
      <text:p text:style-name="Preformatted_20_Text">
<text:span text:style-name="NormalTok"><text:s text:c="4"/></text:span><text:span text:style-name="DataTypeTok">int</text:span><text:span text:style-name="NormalTok"><text:s text:c="1"/>rank</text:span><text:span text:style-name="OperatorTok">,</text:span><text:span text:style-name="NormalTok"><text:s text:c="1"/>size</text:span><text:span text:style-name="OperatorTok">;</text:span>
</text:p>
      <text:p text:style-name="Preformatted_20_Text">
</text:p>
      <text:p text:style-name="Preformatted_20_Text">
<text:span text:style-name="NormalTok"><text:s text:c="4"/></text:span><text:span text:style-name="DataTypeTok">long</text:span><text:span text:style-name="NormalTok"><text:s text:c="1"/></text:span><text:span text:style-name="DataTypeTok">long</text:span><text:span text:style-name="NormalTok"><text:s text:c="1"/></text:span><text:span text:style-name="DataTypeTok">int</text:span><text:span text:style-name="NormalTok"><text:s text:c="1"/>start_index</text:span><text:span text:style-name="OperatorTok">;</text:span>
</text:p>
      <text:p text:style-name="Preformatted_20_Text">
<text:span text:style-name="NormalTok"><text:s text:c="4"/></text:span><text:span text:style-name="DataTypeTok">long</text:span><text:span text:style-name="NormalTok"><text:s text:c="1"/></text:span><text:span text:style-name="DataTypeTok">long</text:span><text:span text:style-name="NormalTok"><text:s text:c="1"/></text:span><text:span text:style-name="DataTypeTok">int</text:span><text:span text:style-name="NormalTok"><text:s text:c="1"/>end_index</text:span><text:span text:style-name="OperatorTok">;</text:span>
</text:p>
      <text:p text:style-name="Preformatted_20_Text">
<text:span text:style-name="NormalTok"><text:s text:c="4"/></text:span><text:span text:style-name="DataTypeTok">long</text:span><text:span text:style-name="NormalTok"><text:s text:c="1"/></text:span><text:span text:style-name="DataTypeTok">long</text:span><text:span text:style-name="NormalTok"><text:s text:c="1"/></text:span><text:span text:style-name="DataTypeTok">int</text:span><text:span text:style-name="NormalTok"><text:s text:c="1"/>chunk</text:span><text:span text:style-name="OperatorTok">;</text:span>
</text:p>
      <text:p text:style-name="Preformatted_20_Text">
</text:p>
      <text:p text:style-name="Preformatted_20_Text">
<text:span text:style-name="NormalTok"><text:s text:c="4"/></text:span><text:span text:style-name="DataTypeTok">double</text:span><text:span text:style-name="NormalTok"><text:s text:c="1"/>local_sum </text:span><text:span text:style-name="OperatorTok">=</text:span><text:span text:style-name="NormalTok"><text:s text:c="1"/></text:span><text:span text:style-name="FloatTok">0.0</text:span><text:span text:style-name="OperatorTok">;</text:span>
</text:p>
      <text:p text:style-name="Preformatted_20_Text">
<text:span text:style-name="NormalTok"><text:s text:c="4"/></text:span><text:span text:style-name="DataTypeTok">double</text:span><text:span text:style-name="NormalTok"><text:s text:c="1"/>global_sum </text:span><text:span text:style-name="OperatorTok">=</text:span><text:span text:style-name="NormalTok"><text:s text:c="1"/></text:span><text:span text:style-name="FloatTok">0.0</text:span><text:span text:style-name="OperatorTok">;</text:span>
</text:p>
      <text:p text:style-name="Preformatted_20_Text">
</text:p>
      <text:p text:style-name="Preformatted_20_Text">
<text:span text:style-name="NormalTok"><text:s text:c="4"/></text:span><text:span text:style-name="DataTypeTok">double</text:span><text:span text:style-name="NormalTok"><text:s text:c="1"/>serial_start</text:span><text:span text:style-name="OperatorTok">;</text:span>
</text:p>
      <text:p text:style-name="Preformatted_20_Text">
<text:span text:style-name="NormalTok"><text:s text:c="4"/></text:span><text:span text:style-name="DataTypeTok">double</text:span><text:span text:style-name="NormalTok"><text:s text:c="1"/>serial_end</text:span><text:span text:style-name="OperatorTok">;</text:span>
</text:p>
      <text:p text:style-name="Preformatted_20_Text">
</text:p>
      <text:p text:style-name="Preformatted_20_Text">
<text:span text:style-name="NormalTok"><text:s text:c="4"/></text:span><text:span text:style-name="DataTypeTok">double</text:span><text:span text:style-name="NormalTok"><text:s text:c="1"/>parallel_start</text:span><text:span text:style-name="OperatorTok">;</text:span>
</text:p>
      <text:p text:style-name="Preformatted_20_Text">
<text:span text:style-name="NormalTok"><text:s text:c="4"/></text:span><text:span text:style-name="DataTypeTok">double</text:span><text:span text:style-name="NormalTok"><text:s text:c="1"/>parallel_end</text:span><text:span text:style-name="OperatorTok">;</text:span>
</text:p>
      <text:p text:style-name="Preformatted_20_Text">
</text:p>
      <text:p text:style-name="Preformatted_20_Text">
<text:span text:style-name="NormalTok"><text:s text:c="4"/>MPI_Init</text:span><text:span text:style-name="OperatorTok">(&amp;</text:span><text:span text:style-name="NormalTok">argc</text:span><text:span text:style-name="OperatorTok">,</text:span><text:span text:style-name="NormalTok"><text:s text:c="1"/></text:span><text:span text:style-name="OperatorTok">&amp;</text:span><text:span text:style-name="NormalTok">argv</text:span><text:span text:style-name="OperatorTok">);</text:span>
</text:p>
      <text:p text:style-name="Preformatted_20_Text">
</text:p>
      <text:p text:style-name="Preformatted_20_Text">
<text:span text:style-name="NormalTok"><text:s text:c="4"/>MPI_Comm_rank</text:span><text:span text:style-name="OperatorTok">(</text:span><text:span text:style-name="NormalTok">MPI_COMM_WORLD</text:span><text:span text:style-name="OperatorTok">,</text:span><text:span text:style-name="NormalTok"><text:s text:c="1"/></text:span><text:span text:style-name="OperatorTok">&amp;</text:span><text:span text:style-name="NormalTok">rank</text:span><text:span text:style-name="OperatorTok">);</text:span>
</text:p>
      <text:p text:style-name="Preformatted_20_Text">
<text:span text:style-name="NormalTok"><text:s text:c="4"/>MPI_Comm_size</text:span><text:span text:style-name="OperatorTok">(</text:span><text:span text:style-name="NormalTok">MPI_COMM_WORLD</text:span><text:span text:style-name="OperatorTok">,</text:span><text:span text:style-name="NormalTok"><text:s text:c="1"/></text:span><text:span text:style-name="OperatorTok">&amp;</text:span><text:span text:style-name="NormalTok">size</text:span><text:span text:style-name="OperatorTok">);</text:span>
</text:p>
      <text:p text:style-name="Preformatted_20_Text">
</text:p>
      <text:p text:style-name="Preformatted_20_Text">
<text:span text:style-name="NormalTok"><text:s text:c="4"/></text:span><text:span text:style-name="ControlFlowTok">if</text:span><text:span text:style-name="OperatorTok">(</text:span><text:span text:style-name="NormalTok">rank </text:span><text:span text:style-name="OperatorTok">==</text:span><text:span text:style-name="NormalTok"><text:s text:c="1"/></text:span><text:span text:style-name="DecValTok">0</text:span><text:span text:style-name="OperatorTok">)</text:span>
</text:p>
      <text:p text:style-name="Preformatted_20_Text">
<text:span text:style-name="NormalTok"><text:s text:c="4"/></text:span><text:span text:style-name="OperatorTok">{</text:span>
</text:p>
      <text:p text:style-name="Preformatted_20_Text">
<text:span text:style-name="NormalTok"><text:s text:c="8"/>serial_start </text:span><text:span text:style-name="OperatorTok">=</text:span><text:span text:style-name="NormalTok"><text:s text:c="1"/>MPI_Wtime</text:span><text:span text:style-name="OperatorTok">();</text:span>
</text:p>
      <text:p text:style-name="Preformatted_20_Text">
</text:p>
      <text:p text:style-name="Preformatted_20_Text">
<text:span text:style-name="NormalTok"><text:s text:c="8"/></text:span><text:span text:style-name="DataTypeTok">double</text:span><text:span text:style-name="NormalTok"><text:s text:c="1"/>serial_result </text:span><text:span text:style-name="OperatorTok">=</text:span><text:span text:style-name="NormalTok"><text:s text:c="1"/>serial_sum</text:span><text:span text:style-name="OperatorTok">();</text:span>
</text:p>
      <text:p text:style-name="Preformatted_20_Text">
</text:p>
      <text:p text:style-name="Preformatted_20_Text">
<text:span text:style-name="NormalTok"><text:s text:c="8"/>serial_end </text:span><text:span text:style-name="OperatorTok">=</text:span><text:span text:style-name="NormalTok"><text:s text:c="1"/>MPI_Wtime</text:span><text:span text:style-name="OperatorTok">();</text:span>
</text:p>
      <text:p text:style-name="Preformatted_20_Text">
</text:p>
      <text:p text:style-name="Preformatted_20_Text">
<text:span text:style-name="NormalTok"><text:s text:c="8"/>printf</text:span><text:span text:style-name="OperatorTok">(</text:span><text:span text:style-name="StringTok">"</text:span><text:span text:style-name="SpecialCharTok">\n</text:span><text:span text:style-name="StringTok">"</text:span><text:span text:style-name="OperatorTok">);</text:span>
</text:p>
      <text:p text:style-name="Preformatted_20_Text">
<text:span text:style-name="NormalTok"><text:s text:c="8"/>printf</text:span><text:span text:style-name="OperatorTok">(</text:span><text:span text:style-name="StringTok">"========== SERIAL COMPUTATION ==========</text:span><text:span text:style-name="SpecialCharTok">\n</text:span><text:span text:style-name="StringTok">"</text:span><text:span text:style-name="OperatorTok">);</text:span>
</text:p>
      <text:p text:style-name="Preformatted_20_Text">
<text:span text:style-name="NormalTok"><text:s text:c="8"/>printf</text:span><text:span text:style-name="OperatorTok">(</text:span><text:span text:style-name="StringTok">"Sum = </text:span><text:span text:style-name="SpecialCharTok">%.0f\n</text:span><text:span text:style-name="StringTok">"</text:span><text:span text:style-name="OperatorTok">,</text:span><text:span text:style-name="NormalTok"><text:s text:c="1"/>serial_result</text:span><text:span text:style-name="OperatorTok">);</text:span>
</text:p>
      <text:p text:style-name="Preformatted_20_Text">
<text:span text:style-name="NormalTok"><text:s text:c="8"/>printf</text:span><text:span text:style-name="OperatorTok">(</text:span><text:span text:style-name="StringTok">"Time taken = </text:span><text:span text:style-name="SpecialCharTok">%f</text:span><text:span text:style-name="StringTok"><text:s text:c="1"/>seconds</text:span><text:span text:style-name="SpecialCharTok">\n</text:span><text:span text:style-name="StringTok">"</text:span><text:span text:style-name="OperatorTok">,</text:span>
</text:p>
      <text:p text:style-name="Preformatted_20_Text">
<text:span text:style-name="NormalTok"><text:s text:c="15"/>serial_end </text:span><text:span text:style-name="OperatorTok">-</text:span><text:span text:style-name="NormalTok"><text:s text:c="1"/>serial_start</text:span><text:span text:style-name="OperatorTok">);</text:span>
</text:p>
      <text:p text:style-name="Preformatted_20_Text">
<text:span text:style-name="NormalTok"><text:s text:c="4"/></text:span><text:span text:style-name="OperatorTok">}</text:span>
</text:p>
      <text:p text:style-name="Preformatted_20_Text">
</text:p>
      <text:p text:style-name="Preformatted_20_Text">
<text:span text:style-name="NormalTok"><text:s text:c="4"/>MPI_Barrier</text:span><text:span text:style-name="OperatorTok">(</text:span><text:span text:style-name="NormalTok">MPI_COMM_WORLD</text:span><text:span text:style-name="OperatorTok">);</text:span>
</text:p>
      <text:p text:style-name="Preformatted_20_Text">
</text:p>
      <text:p text:style-name="Preformatted_20_Text">
<text:span text:style-name="NormalTok"><text:s text:c="4"/>chunk </text:span><text:span text:style-name="OperatorTok">=</text:span><text:span text:style-name="NormalTok"><text:s text:c="1"/>N </text:span><text:span text:style-name="OperatorTok">/</text:span><text:span text:style-name="NormalTok"><text:s text:c="1"/>size</text:span><text:span text:style-name="OperatorTok">;</text:span>
</text:p>
      <text:p text:style-name="Preformatted_20_Text">
</text:p>
      <text:p text:style-name="Preformatted_20_Text">
<text:span text:style-name="NormalTok"><text:s text:c="4"/>start_index </text:span><text:span text:style-name="OperatorTok">=</text:span><text:span text:style-name="NormalTok"><text:s text:c="1"/>rank </text:span><text:span text:style-name="OperatorTok">*</text:span><text:span text:style-name="NormalTok"><text:s text:c="1"/>chunk</text:span><text:span text:style-name="OperatorTok">;</text:span>
</text:p>
      <text:p text:style-name="Preformatted_20_Text">
</text:p>
      <text:p text:style-name="Preformatted_20_Text">
<text:span text:style-name="NormalTok"><text:s text:c="4"/></text:span><text:span text:style-name="ControlFlowTok">if</text:span><text:span text:style-name="OperatorTok">(</text:span><text:span text:style-name="NormalTok">rank </text:span><text:span text:style-name="OperatorTok">==</text:span><text:span text:style-name="NormalTok"><text:s text:c="1"/>size </text:span><text:span text:style-name="OperatorTok">-</text:span><text:span text:style-name="NormalTok"><text:s text:c="1"/></text:span><text:span text:style-name="DecValTok">1</text:span><text:span text:style-name="OperatorTok">)</text:span>
</text:p>
      <text:p text:style-name="Preformatted_20_Text">
<text:span text:style-name="NormalTok"><text:s text:c="8"/>end_index </text:span><text:span text:style-name="OperatorTok">=</text:span><text:span text:style-name="NormalTok"><text:s text:c="1"/>N</text:span><text:span text:style-name="OperatorTok">;</text:span>
</text:p>
      <text:p text:style-name="Preformatted_20_Text">
<text:span text:style-name="NormalTok"><text:s text:c="4"/></text:span><text:span text:style-name="ControlFlowTok">else</text:span>
</text:p>
      <text:p text:style-name="Preformatted_20_Text">
<text:span text:style-name="NormalTok"><text:s text:c="8"/>end_index </text:span><text:span text:style-name="OperatorTok">=</text:span><text:span text:style-name="NormalTok"><text:s text:c="1"/>start_index </text:span><text:span text:style-name="OperatorTok">+</text:span><text:span text:style-name="NormalTok"><text:s text:c="1"/>chunk</text:span><text:span text:style-name="OperatorTok">;</text:span>
</text:p>
      <text:p text:style-name="Preformatted_20_Text">
</text:p>
      <text:p text:style-name="Preformatted_20_Text">
<text:span text:style-name="NormalTok"><text:s text:c="4"/>parallel_start </text:span><text:span text:style-name="OperatorTok">=</text:span><text:span text:style-name="NormalTok"><text:s text:c="1"/>MPI_Wtime</text:span><text:span text:style-name="OperatorTok">();</text:span>
</text:p>
      <text:p text:style-name="Preformatted_20_Text">
</text:p>
      <text:p text:style-name="Preformatted_20_Text">
<text:span text:style-name="NormalTok"><text:s text:c="4"/></text:span><text:span text:style-name="ControlFlowTok">for</text:span><text:span text:style-name="OperatorTok">(</text:span><text:span text:style-name="DataTypeTok">long</text:span><text:span text:style-name="NormalTok"><text:s text:c="1"/></text:span><text:span text:style-name="DataTypeTok">long</text:span><text:span text:style-name="NormalTok"><text:s text:c="1"/></text:span><text:span text:style-name="DataTypeTok">int</text:span><text:span text:style-name="NormalTok"><text:s text:c="1"/>i </text:span><text:span text:style-name="OperatorTok">=</text:span><text:span text:style-name="NormalTok"><text:s text:c="1"/>start_index</text:span><text:span text:style-name="OperatorTok">;</text:span>
</text:p>
      <text:p text:style-name="Preformatted_20_Text">
<text:span text:style-name="NormalTok"><text:s text:c="8"/>i </text:span><text:span text:style-name="OperatorTok">&lt;</text:span><text:span text:style-name="NormalTok"><text:s text:c="1"/>end_index</text:span><text:span text:style-name="OperatorTok">;</text:span>
</text:p>
      <text:p text:style-name="Preformatted_20_Text">
<text:span text:style-name="NormalTok"><text:s text:c="8"/>i</text:span><text:span text:style-name="OperatorTok">++)</text:span>
</text:p>
      <text:p text:style-name="Preformatted_20_Text">
<text:span text:style-name="NormalTok"><text:s text:c="4"/></text:span><text:span text:style-name="OperatorTok">{</text:span>
</text:p>
      <text:p text:style-name="Preformatted_20_Text">
<text:span text:style-name="NormalTok"><text:s text:c="8"/>local_sum </text:span><text:span text:style-name="OperatorTok">+=</text:span><text:span text:style-name="NormalTok"><text:s text:c="1"/>i</text:span><text:span text:style-name="OperatorTok">;</text:span>
</text:p>
      <text:p text:style-name="Preformatted_20_Text">
<text:span text:style-name="NormalTok"><text:s text:c="4"/></text:span><text:span text:style-name="OperatorTok">}</text:span>
</text:p>
      <text:p text:style-name="Preformatted_20_Text">
</text:p>
      <text:p text:style-name="Preformatted_20_Text">
<text:span text:style-name="NormalTok"><text:s text:c="4"/>MPI_Reduce</text:span><text:span text:style-name="OperatorTok">(&amp;</text:span><text:span text:style-name="NormalTok">local_sum</text:span><text:span text:style-name="OperatorTok">,</text:span>
</text:p>
      <text:p text:style-name="Preformatted_20_Text">
<text:span text:style-name="NormalTok"><text:s text:c="15"/></text:span><text:span text:style-name="OperatorTok">&amp;</text:span><text:span text:style-name="NormalTok">global_sum</text:span><text:span text:style-name="OperatorTok">,</text:span>
</text:p>
      <text:p text:style-name="Preformatted_20_Text">
<text:span text:style-name="NormalTok"><text:s text:c="15"/></text:span><text:span text:style-name="DecValTok">1</text:span><text:span text:style-name="OperatorTok">,</text:span>
</text:p>
      <text:p text:style-name="Preformatted_20_Text">
<text:span text:style-name="NormalTok"><text:s text:c="15"/>MPI_DOUBLE</text:span><text:span text:style-name="OperatorTok">,</text:span>
</text:p>
      <text:p text:style-name="Preformatted_20_Text">
<text:span text:style-name="NormalTok"><text:s text:c="15"/>MPI_SUM</text:span><text:span text:style-name="OperatorTok">,</text:span>
</text:p>
      <text:p text:style-name="Preformatted_20_Text">
<text:span text:style-name="NormalTok"><text:s text:c="15"/></text:span><text:span text:style-name="DecValTok">0</text:span><text:span text:style-name="OperatorTok">,</text:span>
</text:p>
      <text:p text:style-name="Preformatted_20_Text">
<text:span text:style-name="NormalTok"><text:s text:c="15"/>MPI_COMM_WORLD</text:span><text:span text:style-name="OperatorTok">);</text:span>
</text:p>
      <text:p text:style-name="Preformatted_20_Text">
</text:p>
      <text:p text:style-name="Preformatted_20_Text">
<text:span text:style-name="NormalTok"><text:s text:c="4"/>parallel_end </text:span><text:span text:style-name="OperatorTok">=</text:span><text:span text:style-name="NormalTok"><text:s text:c="1"/>MPI_Wtime</text:span><text:span text:style-name="OperatorTok">();</text:span>
</text:p>
      <text:p text:style-name="Preformatted_20_Text">
</text:p>
      <text:p text:style-name="Preformatted_20_Text">
<text:span text:style-name="NormalTok"><text:s text:c="4"/></text:span><text:span text:style-name="ControlFlowTok">if</text:span><text:span text:style-name="OperatorTok">(</text:span><text:span text:style-name="NormalTok">rank </text:span><text:span text:style-name="OperatorTok">==</text:span><text:span text:style-name="NormalTok"><text:s text:c="1"/></text:span><text:span text:style-name="DecValTok">0</text:span><text:span text:style-name="OperatorTok">)</text:span>
</text:p>
      <text:p text:style-name="Preformatted_20_Text">
<text:span text:style-name="NormalTok"><text:s text:c="4"/></text:span><text:span text:style-name="OperatorTok">{</text:span>
</text:p>
      <text:p text:style-name="Preformatted_20_Text">
<text:span text:style-name="NormalTok"><text:s text:c="8"/></text:span><text:span text:style-name="DataTypeTok">double</text:span><text:span text:style-name="NormalTok"><text:s text:c="1"/>parallel_time </text:span><text:span text:style-name="OperatorTok">=</text:span>
</text:p>
      <text:p text:style-name="Preformatted_20_Text">
<text:span text:style-name="NormalTok"><text:s text:c="12"/>parallel_end </text:span><text:span text:style-name="OperatorTok">-</text:span><text:span text:style-name="NormalTok"><text:s text:c="1"/>parallel_start</text:span><text:span text:style-name="OperatorTok">;</text:span>
</text:p>
      <text:p text:style-name="Preformatted_20_Text">
</text:p>
      <text:p text:style-name="Preformatted_20_Text">
<text:span text:style-name="NormalTok"><text:s text:c="8"/></text:span><text:span text:style-name="DataTypeTok">double</text:span><text:span text:style-name="NormalTok"><text:s text:c="1"/>serial_time </text:span><text:span text:style-name="OperatorTok">=</text:span>
</text:p>
      <text:p text:style-name="Preformatted_20_Text">
<text:span text:style-name="NormalTok"><text:s text:c="12"/>serial_end </text:span><text:span text:style-name="OperatorTok">-</text:span><text:span text:style-name="NormalTok"><text:s text:c="1"/>serial_start</text:span><text:span text:style-name="OperatorTok">;</text:span>
</text:p>
      <text:p text:style-name="Preformatted_20_Text">
</text:p>
      <text:p text:style-name="Preformatted_20_Text">
<text:span text:style-name="NormalTok"><text:s text:c="8"/>printf</text:span><text:span text:style-name="OperatorTok">(</text:span><text:span text:style-name="StringTok">"</text:span><text:span text:style-name="SpecialCharTok">\n</text:span><text:span text:style-name="StringTok">"</text:span><text:span text:style-name="OperatorTok">);</text:span>
</text:p>
      <text:p text:style-name="Preformatted_20_Text">
<text:span text:style-name="NormalTok"><text:s text:c="8"/>printf</text:span><text:span text:style-name="OperatorTok">(</text:span><text:span text:style-name="StringTok">"========== PARALLEL COMPUTATION ==========</text:span><text:span text:style-name="SpecialCharTok">\n</text:span><text:span text:style-name="StringTok">"</text:span><text:span text:style-name="OperatorTok">);</text:span>
</text:p>
      <text:p text:style-name="Preformatted_20_Text">
<text:span text:style-name="NormalTok"><text:s text:c="8"/>printf</text:span><text:span text:style-name="OperatorTok">(</text:span><text:span text:style-name="StringTok">"Processes used = </text:span><text:span text:style-name="SpecialCharTok">%d\n</text:span><text:span text:style-name="StringTok">"</text:span><text:span text:style-name="OperatorTok">,</text:span><text:span text:style-name="NormalTok"><text:s text:c="1"/>size</text:span><text:span text:style-name="OperatorTok">);</text:span>
</text:p>
      <text:p text:style-name="Preformatted_20_Text">
<text:span text:style-name="NormalTok"><text:s text:c="8"/>printf</text:span><text:span text:style-name="OperatorTok">(</text:span><text:span text:style-name="StringTok">"Sum = </text:span><text:span text:style-name="SpecialCharTok">%.0f\n</text:span><text:span text:style-name="StringTok">"</text:span><text:span text:style-name="OperatorTok">,</text:span><text:span text:style-name="NormalTok"><text:s text:c="1"/>global_sum</text:span><text:span text:style-name="OperatorTok">);</text:span>
</text:p>
      <text:p text:style-name="Preformatted_20_Text">
<text:span text:style-name="NormalTok"><text:s text:c="8"/>printf</text:span><text:span text:style-name="OperatorTok">(</text:span><text:span text:style-name="StringTok">"Time taken = </text:span><text:span text:style-name="SpecialCharTok">%f</text:span><text:span text:style-name="StringTok"><text:s text:c="1"/>seconds</text:span><text:span text:style-name="SpecialCharTok">\n</text:span><text:span text:style-name="StringTok">"</text:span><text:span text:style-name="OperatorTok">,</text:span>
</text:p>
      <text:p text:style-name="Preformatted_20_Text">
<text:span text:style-name="NormalTok"><text:s text:c="15"/>parallel_time</text:span><text:span text:style-name="OperatorTok">);</text:span>
</text:p>
      <text:p text:style-name="Preformatted_20_Text">
</text:p>
      <text:p text:style-name="Preformatted_20_Text">
<text:span text:style-name="NormalTok"><text:s text:c="8"/>printf</text:span><text:span text:style-name="OperatorTok">(</text:span><text:span text:style-name="StringTok">"</text:span><text:span text:style-name="SpecialCharTok">\n</text:span><text:span text:style-name="StringTok">"</text:span><text:span text:style-name="OperatorTok">);</text:span>
</text:p>
      <text:p text:style-name="Preformatted_20_Text">
<text:span text:style-name="NormalTok"><text:s text:c="8"/>printf</text:span><text:span text:style-name="OperatorTok">(</text:span><text:span text:style-name="StringTok">"========== PERFORMANCE ==========</text:span><text:span text:style-name="SpecialCharTok">\n</text:span><text:span text:style-name="StringTok">"</text:span><text:span text:style-name="OperatorTok">);</text:span>
</text:p>
      <text:p text:style-name="Preformatted_20_Text">
<text:span text:style-name="NormalTok"><text:s text:c="8"/>printf</text:span><text:span text:style-name="OperatorTok">(</text:span><text:span text:style-name="StringTok">"Speedup = </text:span><text:span text:style-name="SpecialCharTok">%f\n</text:span><text:span text:style-name="StringTok">"</text:span><text:span text:style-name="OperatorTok">,</text:span>
</text:p>
      <text:p text:style-name="Preformatted_20_Text">
<text:span text:style-name="NormalTok"><text:s text:c="15"/>serial_time </text:span><text:span text:style-name="OperatorTok">/</text:span><text:span text:style-name="NormalTok"><text:s text:c="1"/>parallel_time</text:span><text:span text:style-name="OperatorTok">);</text:span>
</text:p>
      <text:p text:style-name="Preformatted_20_Text">
</text:p>
      <text:p text:style-name="Preformatted_20_Text">
<text:span text:style-name="NormalTok"><text:s text:c="8"/>printf</text:span><text:span text:style-name="OperatorTok">(</text:span><text:span text:style-name="StringTok">"Efficiency = </text:span><text:span text:style-name="SpecialCharTok">%f\n</text:span><text:span text:style-name="StringTok">"</text:span><text:span text:style-name="OperatorTok">,</text:span>
</text:p>
      <text:p text:style-name="Preformatted_20_Text">
<text:span text:style-name="NormalTok"><text:s text:c="15"/></text:span><text:span text:style-name="OperatorTok">(</text:span><text:span text:style-name="NormalTok">serial_time </text:span><text:span text:style-name="OperatorTok">/</text:span><text:span text:style-name="NormalTok"><text:s text:c="1"/>parallel_time</text:span><text:span text:style-name="OperatorTok">)</text:span><text:span text:style-name="NormalTok"><text:s text:c="1"/></text:span><text:span text:style-name="OperatorTok">/</text:span><text:span text:style-name="NormalTok"><text:s text:c="1"/>size</text:span><text:span text:style-name="OperatorTok">);</text:span>
</text:p>
      <text:p text:style-name="Preformatted_20_Text">
<text:span text:style-name="NormalTok"><text:s text:c="4"/></text:span><text:span text:style-name="OperatorTok">}</text:span>
</text:p>
      <text:p text:style-name="Preformatted_20_Text">
</text:p>
      <text:p text:style-name="Preformatted_20_Text">
<text:span text:style-name="NormalTok"><text:s text:c="4"/>MPI_Finalize</text:span><text:span text:style-name="OperatorTok">();</text:span>
</text:p>
      <text:p text:style-name="Preformatted_20_Text">
</text:p>
      <text:p text:style-name="Preformatted_20_Text">
<text:span text:style-name="NormalTok"><text:s text:c="4"/></text:span><text:span text:style-name="ControlFlowTok">return</text:span><text:span text:style-name="NormalTok"><text:s text:c="1"/></text:span><text:span text:style-name="DecValTok">0</text:span><text:span text:style-name="OperatorTok">;</text:span>
</text:p>
      <text:p text:style-name="Preformatted_20_Text">
<text:span text:style-name="OperatorTok">}</text:span>
</text:p>
      <text:h text:style-name="Heading_20_2" text:outline-level="2"><text:bookmark-start text:name="important-mpi-reduction-concept"/>IMPORTANT MPI Reduction Concept<text:bookmark-end text:name="important-mpi-reduction-concept"/></text:h>
      <text:p text:style-name="First_20_paragraph">This program uses:</text:p>
      <text:p text:style-name="P258">MPI_Reduce()</text:p>
      <text:p text:style-name="First_20_paragraph">Purpose:</text:p>
      <text:p text:style-name="Text_20_body">Combine partial sums from all MPI ranks into:</text:p>
      <text:p text:style-name="P259">single global result</text:p>
      <text:p text:style-name="First_20_paragraph">Flow:</text:p>
      <text:p text:style-name="P260">local sums</text:p>
      <text:p text:style-name="P261"><text:s text:c="4"/>↓</text:p>
      <text:p text:style-name="P262">MPI_Reduce</text:p>
      <text:p text:style-name="P263"><text:s text:c="4"/>↓</text:p>
      <text:p text:style-name="P264">global sum</text:p>
      <text:p text:style-name="First_20_paragraph">This is one of the MOST important MPI collective communication operations.</text:p>
      <text:h text:style-name="Heading_20_2" text:outline-level="2"><text:bookmark-start text:name="important-parallel-execution-concept"/>IMPORTANT Parallel Execution Concept<text:bookmark-end text:name="important-parallel-execution-concept"/></text:h>
      <text:p text:style-name="First_20_paragraph">Serial execution:</text:p>
      <text:p text:style-name="P265">single process computes entire workload</text:p>
      <text:p text:style-name="First_20_paragraph">Parallel execution:</text:p>
      <text:p text:style-name="P266">multiple MPI ranks divide workload</text:p>
      <text:p text:style-name="First_20_paragraph">Example:</text:p>
      <table:table table:name="Table33" table:style-name="Table33">
        <table:table-column table:style-name="Table33.A"/>
        <table:table-column table:style-name="Table33.B"/>
        <table:table-header-rows>
          <table:table-row>
            <table:table-cell table:style-name="TableHeaderRowCell" office:value-type="string">
              <text:p text:style-name="Table_20_Heading">Rank</text:p>
            </table:table-cell>
            <table:table-cell table:style-name="TableHeaderRowCell" office:value-type="string">
              <text:p text:style-name="Table_20_Heading">Work</text:p>
            </table:table-cell>
          </table:table-row>
        </table:table-header-rows>
        <table:table-row>
          <table:table-cell table:style-name="TableRowCell" office:value-type="string">
            <text:p text:style-name="Table_20_Contents">rank0</text:p>
          </table:table-cell>
          <table:table-cell table:style-name="TableRowCell" office:value-type="string">
            <text:p text:style-name="Table_20_Contents">0 –&gt; 25%</text:p>
          </table:table-cell>
        </table:table-row>
        <table:table-row>
          <table:table-cell table:style-name="TableRowCell" office:value-type="string">
            <text:p text:style-name="Table_20_Contents">rank1</text:p>
          </table:table-cell>
          <table:table-cell table:style-name="TableRowCell" office:value-type="string">
            <text:p text:style-name="Table_20_Contents">25% –&gt; 50%</text:p>
          </table:table-cell>
        </table:table-row>
        <table:table-row>
          <table:table-cell table:style-name="TableRowCell" office:value-type="string">
            <text:p text:style-name="Table_20_Contents">rank2</text:p>
          </table:table-cell>
          <table:table-cell table:style-name="TableRowCell" office:value-type="string">
            <text:p text:style-name="Table_20_Contents">50% –&gt; 75%</text:p>
          </table:table-cell>
        </table:table-row>
        <table:table-row>
          <table:table-cell table:style-name="TableRowCell" office:value-type="string">
            <text:p text:style-name="Table_20_Contents">rank3</text:p>
          </table:table-cell>
          <table:table-cell table:style-name="TableRowCell" office:value-type="string">
            <text:p text:style-name="Table_20_Contents">75% –&gt; 100%</text:p>
          </table:table-cell>
        </table:table-row>
      </table:table>
      <text:p text:style-name="First_20_paragraph">Advantages:</text:p>
      <text:list text:style-name="L95">
        <text:list-item>
          <text:p text:style-name="P267">reduced execution time</text:p>
        </text:list-item>
        <text:list-item>
          <text:p text:style-name="P267">distributed workload</text:p>
        </text:list-item>
        <text:list-item>
          <text:p text:style-name="P267">scalable computation</text:p>
        </text:list-item>
      </text:list>
      <text:h text:style-name="Heading_20_2" text:outline-level="2"><text:bookmark-start text:name="load-software-before-compilation"/>Load Software Before Compilation<text:bookmark-end text:name="load-software-before-compilation"/></text:h>
      <text:p text:style-name="First_20_paragraph">Initialize Spack:</text:p>
      <text:p text:style-name="Preformatted_20_Text">
<text:span text:style-name="BuiltInTok">source</text:span><text:span text:style-name="NormalTok"><text:s text:c="1"/>/apps/spack/share/spack/setup-env.sh</text:span>
</text:p>
      <text:p text:style-name="First_20_paragraph">Load compiler:</text:p>
      <text:p text:style-name="Preformatted_20_Text">
<text:span text:style-name="ExtensionTok">spack</text:span><text:span text:style-name="NormalTok"><text:s text:c="1"/>load gcc@13.4.0</text:span>
</text:p>
      <text:p text:style-name="First_20_paragraph">Load MPI runtime:</text:p>
      <text:p text:style-name="Preformatted_20_Text">
<text:span text:style-name="ExtensionTok">spack</text:span><text:span text:style-name="NormalTok"><text:s text:c="1"/>load openmpi</text:span>
</text:p>
      <text:p text:style-name="First_20_paragraph">Verify:</text:p>
      <text:p text:style-name="Preformatted_20_Text">
<text:span text:style-name="FunctionTok">which</text:span><text:span text:style-name="NormalTok"><text:s text:c="1"/>mpicc</text:span>
</text:p>
      <text:p text:style-name="First_20_paragraph">Expected:</text:p>
      <text:list text:style-name="L96">
        <text:list-item>
          <text:p text:style-name="P268">MPI compiler wrapper path</text:p>
        </text:list-item>
      </text:list>
      <text:h text:style-name="Heading_20_2" text:outline-level="2"><text:bookmark-start text:name="compile-mpi-program"/>Compile MPI Program<text:bookmark-end text:name="compile-mpi-program"/></text:h>
      <text:p text:style-name="First_20_paragraph">Compile:</text:p>
      <text:p text:style-name="Preformatted_20_Text">
<text:span text:style-name="ExtensionTok">mpicc</text:span><text:span text:style-name="NormalTok"><text:s text:c="1"/>mpi_sum.c </text:span><text:span text:style-name="AttributeTok">-o</text:span><text:span text:style-name="NormalTok"><text:s text:c="1"/>mpi_sum</text:span>
</text:p>
      <text:p text:style-name="First_20_paragraph">Verify executable:</text:p>
      <text:p text:style-name="Preformatted_20_Text">
<text:span text:style-name="FunctionTok">ls</text:span>
</text:p>
      <text:p text:style-name="First_20_paragraph">Expected:</text:p>
      <text:p text:style-name="P269">mpi_sum</text:p>
      <text:h text:style-name="Heading_20_2" text:outline-level="2"><text:bookmark-start text:name="important-mpi-compilation-concept"/>IMPORTANT MPI Compilation Concept<text:bookmark-end text:name="important-mpi-compilation-concept"/></text:h>
      <text:p text:style-name="First_20_paragraph">MPI programs are compiled using:</text:p>
      <text:p text:style-name="Preformatted_20_Text">
<text:span text:style-name="ExtensionTok">mpicc</text:span>
</text:p>
      <text:p text:style-name="First_20_paragraph">instead of:</text:p>
      <text:p text:style-name="Preformatted_20_Text">
<text:span text:style-name="FunctionTok">gcc</text:span>
</text:p>
      <text:p text:style-name="First_20_paragraph">because MPI wrapper automatically injects:</text:p>
      <text:list text:style-name="L97">
        <text:list-item>
          <text:p text:style-name="P270">MPI headers</text:p>
        </text:list-item>
        <text:list-item>
          <text:p text:style-name="P270">MPI libraries</text:p>
        </text:list-item>
        <text:list-item>
          <text:p text:style-name="P270">linker flags</text:p>
        </text:list-item>
      </text:list>
      <text:h text:style-name="Heading_20_2" text:outline-level="2"><text:bookmark-start text:name="interactive-mpi-runtime-validation"/>Interactive MPI Runtime Validation<text:bookmark-end text:name="interactive-mpi-runtime-validation"/></text:h>
      <text:p text:style-name="First_20_paragraph">Run interactively:</text:p>
      <text:p text:style-name="Preformatted_20_Text">
<text:span text:style-name="ExtensionTok">mpirun</text:span><text:span text:style-name="NormalTok"><text:s text:c="1"/></text:span><text:span text:style-name="AttributeTok">-np</text:span><text:span text:style-name="NormalTok"><text:s text:c="1"/>4 ./mpi_sum</text:span>
</text:p>
      <text:p text:style-name="First_20_paragraph">Expected:</text:p>
      <text:p text:style-name="P271">========== SERIAL COMPUTATION ==========</text:p>
      <text:p text:style-name="P272">...</text:p>
      <text:p text:style-name="P273"/>
      <text:p text:style-name="P274">========== PARALLEL COMPUTATION ==========</text:p>
      <text:p text:style-name="P275">...</text:p>
      <text:p text:style-name="P276"/>
      <text:p text:style-name="P277">========== PERFORMANCE ==========</text:p>
      <text:p text:style-name="P278">...</text:p>
      <text:p text:style-name="First_20_paragraph">This validates:</text:p>
      <text:list text:style-name="L98">
        <text:list-item>
          <text:p text:style-name="P279">MPI runtime</text:p>
        </text:list-item>
        <text:list-item>
          <text:p text:style-name="P279">MPI communication</text:p>
        </text:list-item>
        <text:list-item>
          <text:p text:style-name="P279">reduction operations</text:p>
        </text:list-item>
        <text:list-item>
          <text:p text:style-name="P279">distributed execution</text:p>
        </text:list-item>
      </text:list>
      <text:h text:style-name="Heading_20_2" text:outline-level="2"><text:bookmark-start text:name="important-shared-filesystem-advantage"/>IMPORTANT Shared Filesystem Advantage<text:bookmark-end text:name="important-shared-filesystem-advantage"/></text:h>
      <text:p text:style-name="First_20_paragraph">Because:</text:p>
      <text:list text:style-name="L99">
        <text:list-item>
          <text:p text:style-name="P280">source code</text:p>
        </text:list-item>
        <text:list-item>
          <text:p text:style-name="P280">executable</text:p>
        </text:list-item>
        <text:list-item>
          <text:p text:style-name="P280">software stack</text:p>
        </text:list-item>
      </text:list>
      <text:p text:style-name="First_20_paragraph">exist on shared filesystem:</text:p>
      <text:p text:style-name="P281">/apps</text:p>
      <text:p text:style-name="P282">or</text:p>
      <text:p text:style-name="P283">/home</text:p>
      <text:p text:style-name="First_20_paragraph">compute nodes automatically access:</text:p>
      <text:list text:style-name="L100">
        <text:list-item>
          <text:p text:style-name="P284">compiled binaries</text:p>
        </text:list-item>
        <text:list-item>
          <text:p text:style-name="P284">runtime libraries</text:p>
        </text:list-item>
        <text:list-item>
          <text:p text:style-name="P284">MPI stack</text:p>
        </text:list-item>
      </text:list>
      <text:p text:style-name="First_20_paragraph">without recompilation.</text:p>
      <text:p text:style-name="Text_20_body">This is one of the major HPC architecture advantages.</text:p>
      <text:h text:style-name="Heading_20_2" text:outline-level="2"><text:bookmark-start text:name="create-slurm-batch-script"/>Create Slurm Batch Script<text:bookmark-end text:name="create-slurm-batch-script"/></text:h>
      <text:p text:style-name="First_20_paragraph">Create batch script:</text:p>
      <text:p text:style-name="Preformatted_20_Text">
<text:span text:style-name="ExtensionTok">vim</text:span><text:span text:style-name="NormalTok"><text:s text:c="1"/>submit.sh</text:span>
</text:p>
      <text:p text:style-name="First_20_paragraph">Paste:</text:p>
      <text:p text:style-name="Preformatted_20_Text">
<text:span text:style-name="CommentTok">#!/bin/bash</text:span>
</text:p>
      <text:p text:style-name="Preformatted_20_Text">
<text:span text:style-name="CommentTok">#SBATCH -N 3</text:span>
</text:p>
      <text:p text:style-name="Preformatted_20_Text">
<text:span text:style-name="CommentTok">#SBATCH --ntasks-per-node=1</text:span>
</text:p>
      <text:p text:style-name="Preformatted_20_Text">
<text:span text:style-name="CommentTok">#SBATCH --job-name=test</text:span>
</text:p>
      <text:p text:style-name="Preformatted_20_Text">
<text:span text:style-name="CommentTok">#SBATCH --output=%J.out</text:span>
</text:p>
      <text:p text:style-name="Preformatted_20_Text">
<text:span text:style-name="CommentTok">#SBATCH --error=%J.err</text:span>
</text:p>
      <text:p text:style-name="Preformatted_20_Text">
<text:span text:style-name="CommentTok">#SBATCH --time=01:00:00</text:span>
</text:p>
      <text:p text:style-name="Preformatted_20_Text">
<text:span text:style-name="CommentTok">##SBATCH --nodelist=compute03,compute01</text:span>
</text:p>
      <text:p text:style-name="Preformatted_20_Text">
</text:p>
      <text:p text:style-name="Preformatted_20_Text">
<text:span text:style-name="BuiltInTok">source</text:span><text:span text:style-name="NormalTok"><text:s text:c="1"/>/apps/spack/share/spack/setup-env.sh</text:span>
</text:p>
      <text:p text:style-name="Preformatted_20_Text">
</text:p>
      <text:p text:style-name="Preformatted_20_Text">
<text:span text:style-name="ExtensionTok">spack</text:span><text:span text:style-name="NormalTok"><text:s text:c="1"/>load openmpi</text:span>
</text:p>
      <text:p text:style-name="Preformatted_20_Text">
</text:p>
      <text:p text:style-name="Preformatted_20_Text">
<text:span text:style-name="ExtensionTok">mpirun</text:span><text:span text:style-name="NormalTok"><text:s text:c="1"/></text:span><text:span text:style-name="AttributeTok">-np</text:span><text:span text:style-name="NormalTok"><text:s text:c="1"/></text:span><text:span text:style-name="VariableTok">$SLURM_NTASKS</text:span><text:span text:style-name="NormalTok"><text:s text:c="1"/>./</text:span><text:span text:style-name="VariableTok">$1</text:span>
</text:p>
      <text:p text:style-name="First_20_paragraph">Make executable:</text:p>
      <text:p text:style-name="Preformatted_20_Text">
<text:span text:style-name="FunctionTok">chmod</text:span><text:span text:style-name="NormalTok"><text:s text:c="1"/>+x submit.sh</text:span>
</text:p>
      <text:h text:style-name="Heading_20_2" text:outline-level="2"><text:bookmark-start text:name="important-slurm-script-explanation"/>IMPORTANT Slurm Script Explanation<text:bookmark-end text:name="important-slurm-script-explanation"/></text:h>
      <table:table table:name="Table34" table:style-name="Table34">
        <table:table-column table:style-name="Table34.A"/>
        <table:table-column table:style-name="Table34.B"/>
        <table:table-header-rows>
          <table:table-row>
            <table:table-cell table:style-name="TableHeaderRowCell" office:value-type="string">
              <text:p text:style-name="Table_20_Heading">Line</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SBATCH -N 3</text:p>
          </table:table-cell>
          <table:table-cell table:style-name="TableRowCell" office:value-type="string">
            <text:p text:style-name="Table_20_Contents">request 3 nodes</text:p>
          </table:table-cell>
        </table:table-row>
        <table:table-row>
          <table:table-cell table:style-name="TableRowCell" office:value-type="string">
            <text:p text:style-name="Table_20_Contents">–ntasks-per-node=1</text:p>
          </table:table-cell>
          <table:table-cell table:style-name="TableRowCell" office:value-type="string">
            <text:p text:style-name="Table_20_Contents">one MPI rank per node</text:p>
          </table:table-cell>
        </table:table-row>
        <table:table-row>
          <table:table-cell table:style-name="TableRowCell" office:value-type="string">
            <text:p text:style-name="Table_20_Contents">–job-name=test</text:p>
          </table:table-cell>
          <table:table-cell table:style-name="TableRowCell" office:value-type="string">
            <text:p text:style-name="Table_20_Contents">job name</text:p>
          </table:table-cell>
        </table:table-row>
        <table:table-row>
          <table:table-cell table:style-name="TableRowCell" office:value-type="string">
            <text:p text:style-name="Table_20_Contents">–output=%J.out</text:p>
          </table:table-cell>
          <table:table-cell table:style-name="TableRowCell" office:value-type="string">
            <text:p text:style-name="Table_20_Contents">stdout file</text:p>
          </table:table-cell>
        </table:table-row>
        <table:table-row>
          <table:table-cell table:style-name="TableRowCell" office:value-type="string">
            <text:p text:style-name="Table_20_Contents">–error=%J.err</text:p>
          </table:table-cell>
          <table:table-cell table:style-name="TableRowCell" office:value-type="string">
            <text:p text:style-name="Table_20_Contents">stderr file</text:p>
          </table:table-cell>
        </table:table-row>
        <table:table-row>
          <table:table-cell table:style-name="TableRowCell" office:value-type="string">
            <text:p text:style-name="Table_20_Contents">–time=01:00:00</text:p>
          </table:table-cell>
          <table:table-cell table:style-name="TableRowCell" office:value-type="string">
            <text:p text:style-name="Table_20_Contents">walltime limit</text:p>
          </table:table-cell>
        </table:table-row>
      </table:table>
      <text:h text:style-name="Heading_20_2" text:outline-level="2"><text:bookmark-start text:name="important-runtime-environment-section"/>IMPORTANT Runtime Environment Section<text:bookmark-end text:name="important-runtime-environment-section"/></text:h>
      <text:p text:style-name="First_20_paragraph">Inside batch script:</text:p>
      <text:p text:style-name="Preformatted_20_Text">
<text:span text:style-name="BuiltInTok">source</text:span><text:span text:style-name="NormalTok"><text:s text:c="1"/>/apps/spack/share/spack/setup-env.sh</text:span>
</text:p>
      <text:p text:style-name="First_20_paragraph">initializes Spack environment.</text:p>
      <text:p text:style-name="Preformatted_20_Text">
<text:span text:style-name="ExtensionTok">spack</text:span><text:span text:style-name="NormalTok"><text:s text:c="1"/>load openmpi</text:span>
</text:p>
      <text:p text:style-name="First_20_paragraph">loads MPI runtime stack.</text:p>
      <text:p text:style-name="Text_20_body">Without these:</text:p>
      <text:list text:style-name="L101">
        <text:list-item>
          <text:p text:style-name="P285">mpirun may fail</text:p>
        </text:list-item>
        <text:list-item>
          <text:p text:style-name="P285">MPI libraries may not load</text:p>
        </text:list-item>
        <text:list-item>
          <text:p text:style-name="P285">runtime linker errors may occur</text:p>
        </text:list-item>
      </text:list>
      <text:h text:style-name="Heading_20_2" text:outline-level="2"><text:bookmark-start text:name="important-slurm-runtime-variable"/>IMPORTANT Slurm Runtime Variable<text:bookmark-end text:name="important-slurm-runtime-variable"/></text:h>
      <text:p text:style-name="Preformatted_20_Text">
<text:span text:style-name="VariableTok">$SLURM_NTASKS</text:span>
</text:p>
      <text:p text:style-name="First_20_paragraph">contains:</text:p>
      <text:p text:style-name="P286">total MPI process count allocated by Slurm</text:p>
      <text:p text:style-name="First_20_paragraph">Example:</text:p>
      <table:table table:name="Table35" table:style-name="Table35">
        <table:table-column table:style-name="Table35.A"/>
        <table:table-column table:style-name="Table35.B"/>
        <table:table-column table:style-name="Table35.C"/>
        <table:table-header-rows>
          <table:table-row>
            <table:table-cell table:style-name="TableHeaderRowCell" office:value-type="string">
              <text:p text:style-name="Table_20_Heading">Nodes</text:p>
            </table:table-cell>
            <table:table-cell table:style-name="TableHeaderRowCell" office:value-type="string">
              <text:p text:style-name="Table_20_Heading">Tasks per node</text:p>
            </table:table-cell>
            <table:table-cell table:style-name="TableHeaderRowCell" office:value-type="string">
              <text:p text:style-name="Table_20_Heading">Total</text:p>
            </table:table-cell>
          </table:table-row>
        </table:table-header-rows>
        <table:table-row>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3</text:p>
          </table:table-cell>
        </table:table-row>
      </table:table>
      <text:p text:style-name="First_20_paragraph">Therefore:</text:p>
      <text:p text:style-name="Preformatted_20_Text">
<text:span text:style-name="ExtensionTok">mpirun</text:span><text:span text:style-name="NormalTok"><text:s text:c="1"/></text:span><text:span text:style-name="AttributeTok">-np</text:span><text:span text:style-name="NormalTok"><text:s text:c="1"/></text:span><text:span text:style-name="VariableTok">$SLURM_NTASKS</text:span>
</text:p>
      <text:p text:style-name="First_20_paragraph">automatically launches correct number of MPI ranks.</text:p>
      <text:h text:style-name="Heading_20_2" text:outline-level="2"><text:bookmark-start text:name="submit-mpi-job"/>Submit MPI Job<text:bookmark-end text:name="submit-mpi-job"/></text:h>
      <text:p text:style-name="First_20_paragraph">Submit job:</text:p>
      <text:p text:style-name="Preformatted_20_Text">
<text:span text:style-name="ExtensionTok">sbatch</text:span><text:span text:style-name="NormalTok"><text:s text:c="1"/>submit.sh mpi_sum</text:span>
</text:p>
      <text:p text:style-name="First_20_paragraph">Expected:</text:p>
      <text:p text:style-name="P287">Submitted batch job 101</text:p>
      <text:p text:style-name="First_20_paragraph">This validates:</text:p>
      <text:list text:style-name="L102">
        <text:list-item>
          <text:p text:style-name="P288">Slurm scheduler</text:p>
        </text:list-item>
        <text:list-item>
          <text:p text:style-name="P288">distributed allocation</text:p>
        </text:list-item>
        <text:list-item>
          <text:p text:style-name="P288">multinode MPI execution</text:p>
        </text:list-item>
        <text:list-item>
          <text:p text:style-name="P288">scheduler-aware runtime launch</text:p>
        </text:list-item>
      </text:list>
      <text:h text:style-name="Heading_20_2" text:outline-level="2"><text:bookmark-start text:name="monitor-jobs"/>Monitor Jobs<text:bookmark-end text:name="monitor-jobs"/></text:h>
      <text:p text:style-name="First_20_paragraph">Check user jobs:</text:p>
      <text:p text:style-name="Preformatted_20_Text">
<text:span text:style-name="ExtensionTok">squeue</text:span><text:span text:style-name="NormalTok"><text:s text:c="1"/></text:span><text:span text:style-name="AttributeTok">--me</text:span>
</text:p>
      <text:p text:style-name="First_20_paragraph">Expected:</text:p>
      <text:p text:style-name="P289">JOBID PARTITION NAME USER ST TIME NODES NODELIST(REASON)</text:p>
      <text:h text:style-name="Heading_20_2" text:outline-level="2"><text:bookmark-start text:name="important-job-states"/>IMPORTANT Job States<text:bookmark-end text:name="important-job-states"/></text:h>
      <table:table table:name="Table36" table:style-name="Table36">
        <table:table-column table:style-name="Table36.A"/>
        <table:table-column table:style-name="Table36.B"/>
        <table:table-header-rows>
          <table:table-row>
            <table:table-cell table:style-name="TableHeaderRowCell" office:value-type="string">
              <text:p text:style-name="Table_20_Heading">State</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PD</text:p>
          </table:table-cell>
          <table:table-cell table:style-name="TableRowCell" office:value-type="string">
            <text:p text:style-name="Table_20_Contents">pending</text:p>
          </table:table-cell>
        </table:table-row>
        <table:table-row>
          <table:table-cell table:style-name="TableRowCell" office:value-type="string">
            <text:p text:style-name="Table_20_Contents">R</text:p>
          </table:table-cell>
          <table:table-cell table:style-name="TableRowCell" office:value-type="string">
            <text:p text:style-name="Table_20_Contents">running</text:p>
          </table:table-cell>
        </table:table-row>
        <table:table-row>
          <table:table-cell table:style-name="TableRowCell" office:value-type="string">
            <text:p text:style-name="Table_20_Contents">CG</text:p>
          </table:table-cell>
          <table:table-cell table:style-name="TableRowCell" office:value-type="string">
            <text:p text:style-name="Table_20_Contents">completing</text:p>
          </table:table-cell>
        </table:table-row>
        <table:table-row>
          <table:table-cell table:style-name="TableRowCell" office:value-type="string">
            <text:p text:style-name="Table_20_Contents">CD</text:p>
          </table:table-cell>
          <table:table-cell table:style-name="TableRowCell" office:value-type="string">
            <text:p text:style-name="Table_20_Contents">completed</text:p>
          </table:table-cell>
        </table:table-row>
        <table:table-row>
          <table:table-cell table:style-name="TableRowCell" office:value-type="string">
            <text:p text:style-name="Table_20_Contents">F</text:p>
          </table:table-cell>
          <table:table-cell table:style-name="TableRowCell" office:value-type="string">
            <text:p text:style-name="Table_20_Contents">failed</text:p>
          </table:table-cell>
        </table:table-row>
      </table:table>
      <text:h text:style-name="Heading_20_2" text:outline-level="2"><text:bookmark-start text:name="view-detailed-job-information"/>View Detailed Job Information<text:bookmark-end text:name="view-detailed-job-information"/></text:h>
      <text:p text:style-name="First_20_paragraph">Show detailed job info:</text:p>
      <text:p text:style-name="Preformatted_20_Text">
<text:span text:style-name="ExtensionTok">scontrol</text:span><text:span text:style-name="NormalTok"><text:s text:c="1"/>show job </text:span><text:span text:style-name="OperatorTok">&lt;</text:span><text:span text:style-name="NormalTok">jobid</text:span><text:span text:style-name="OperatorTok">&gt;</text:span>
</text:p>
      <text:p text:style-name="First_20_paragraph">Example:</text:p>
      <text:p text:style-name="Preformatted_20_Text">
<text:span text:style-name="ExtensionTok">scontrol</text:span><text:span text:style-name="NormalTok"><text:s text:c="1"/>show job 101</text:span>
</text:p>
      <text:p text:style-name="First_20_paragraph">Displays:</text:p>
      <text:list text:style-name="L103">
        <text:list-item>
          <text:p text:style-name="P290">allocated nodes</text:p>
        </text:list-item>
        <text:list-item>
          <text:p text:style-name="P290">CPUs</text:p>
        </text:list-item>
        <text:list-item>
          <text:p text:style-name="P290">runtime</text:p>
        </text:list-item>
        <text:list-item>
          <text:p text:style-name="P290">scheduling information</text:p>
        </text:list-item>
        <text:list-item>
          <text:p text:style-name="P290">execution directory</text:p>
        </text:list-item>
        <text:list-item>
          <text:p text:style-name="P290">output locations</text:p>
        </text:list-item>
      </text:list>
      <text:h text:style-name="Heading_20_2" text:outline-level="2"><text:bookmark-start text:name="check-cluster-status"/>Check Cluster Status<text:bookmark-end text:name="check-cluster-status"/></text:h>
      <text:p text:style-name="First_20_paragraph">Check cluster nodes:</text:p>
      <text:p text:style-name="Preformatted_20_Text">
<text:span text:style-name="ExtensionTok">sinfo</text:span>
</text:p>
      <text:p text:style-name="First_20_paragraph">Expected:</text:p>
      <text:p text:style-name="P291">debug* up infinite 3 idle compute[01-03]</text:p>
      <text:h text:style-name="Heading_20_2" text:outline-level="2"><text:bookmark-start text:name="important-node-states"/>IMPORTANT Node States<text:bookmark-end text:name="important-node-states"/></text:h>
      <table:table table:name="Table37" table:style-name="Table37">
        <table:table-column table:style-name="Table37.A"/>
        <table:table-column table:style-name="Table37.B"/>
        <table:table-header-rows>
          <table:table-row>
            <table:table-cell table:style-name="TableHeaderRowCell" office:value-type="string">
              <text:p text:style-name="Table_20_Heading">State</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idle</text:p>
          </table:table-cell>
          <table:table-cell table:style-name="TableRowCell" office:value-type="string">
            <text:p text:style-name="Table_20_Contents">available</text:p>
          </table:table-cell>
        </table:table-row>
        <table:table-row>
          <table:table-cell table:style-name="TableRowCell" office:value-type="string">
            <text:p text:style-name="Table_20_Contents">alloc</text:p>
          </table:table-cell>
          <table:table-cell table:style-name="TableRowCell" office:value-type="string">
            <text:p text:style-name="Table_20_Contents">allocated</text:p>
          </table:table-cell>
        </table:table-row>
        <table:table-row>
          <table:table-cell table:style-name="TableRowCell" office:value-type="string">
            <text:p text:style-name="Table_20_Contents">mix</text:p>
          </table:table-cell>
          <table:table-cell table:style-name="TableRowCell" office:value-type="string">
            <text:p text:style-name="Table_20_Contents">partially used</text:p>
          </table:table-cell>
        </table:table-row>
        <table:table-row>
          <table:table-cell table:style-name="TableRowCell" office:value-type="string">
            <text:p text:style-name="Table_20_Contents">drain</text:p>
          </table:table-cell>
          <table:table-cell table:style-name="TableRowCell" office:value-type="string">
            <text:p text:style-name="Table_20_Contents">unavailable</text:p>
          </table:table-cell>
        </table:table-row>
        <table:table-row>
          <table:table-cell table:style-name="TableRowCell" office:value-type="string">
            <text:p text:style-name="Table_20_Contents">down</text:p>
          </table:table-cell>
          <table:table-cell table:style-name="TableRowCell" office:value-type="string">
            <text:p text:style-name="Table_20_Contents">offline</text:p>
          </table:table-cell>
        </table:table-row>
      </table:table>
      <text:h text:style-name="Heading_20_2" text:outline-level="2"><text:bookmark-start text:name="check-output-files"/>Check Output Files<text:bookmark-end text:name="check-output-files"/></text:h>
      <text:p text:style-name="First_20_paragraph">After completion:</text:p>
      <text:p text:style-name="Preformatted_20_Text">
<text:span text:style-name="FunctionTok">ls</text:span>
</text:p>
      <text:p text:style-name="First_20_paragraph">Expected:</text:p>
      <text:p text:style-name="P292">101.out</text:p>
      <text:p text:style-name="P293">101.err</text:p>
      <text:p text:style-name="First_20_paragraph">View output:</text:p>
      <text:p text:style-name="Preformatted_20_Text">
<text:span text:style-name="FunctionTok">cat</text:span><text:span text:style-name="NormalTok"><text:s text:c="1"/>101.out</text:span>
</text:p>
      <text:p text:style-name="First_20_paragraph">Expected:</text:p>
      <text:list text:style-name="L104">
        <text:list-item>
          <text:p text:style-name="P294">serial runtime</text:p>
        </text:list-item>
        <text:list-item>
          <text:p text:style-name="P294">parallel runtime</text:p>
        </text:list-item>
        <text:list-item>
          <text:p text:style-name="P294">speedup</text:p>
        </text:list-item>
        <text:list-item>
          <text:p text:style-name="P294">efficiency</text:p>
        </text:list-item>
      </text:list>
      <text:h text:style-name="Heading_20_2" text:outline-level="2"><text:bookmark-start text:name="important-hpc-performance-metrics"/>IMPORTANT HPC Performance Metrics<text:bookmark-end text:name="important-hpc-performance-metrics"/></text:h>
      <text:p text:style-name="First_20_paragraph">The program calculates:</text:p>
      <table:table table:name="Table38" table:style-name="Table38">
        <table:table-column table:style-name="Table38.A"/>
        <table:table-column table:style-name="Table38.B"/>
        <table:table-header-rows>
          <table:table-row>
            <table:table-cell table:style-name="TableHeaderRowCell" office:value-type="string">
              <text:p text:style-name="Table_20_Heading">Metric</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Speedup</text:p>
          </table:table-cell>
          <table:table-cell table:style-name="TableRowCell" office:value-type="string">
            <text:p text:style-name="Table_20_Contents">serial<text:span text:style-name="T2">time</text:span> / parallel<text:span text:style-name="T2">time</text:span></text:p>
          </table:table-cell>
        </table:table-row>
        <table:table-row>
          <table:table-cell table:style-name="TableRowCell" office:value-type="string">
            <text:p text:style-name="Table_20_Contents">Efficiency</text:p>
          </table:table-cell>
          <table:table-cell table:style-name="TableRowCell" office:value-type="string">
            <text:p text:style-name="Table_20_Contents">speedup / processes</text:p>
          </table:table-cell>
        </table:table-row>
      </table:table>
      <text:p text:style-name="First_20_paragraph">Ideal values:</text:p>
      <table:table table:name="Table39" table:style-name="Table39">
        <table:table-column table:style-name="Table39.A"/>
        <table:table-column table:style-name="Table39.B"/>
        <table:table-header-rows>
          <table:table-row>
            <table:table-cell table:style-name="TableHeaderRowCell" office:value-type="string">
              <text:p text:style-name="Table_20_Heading">Metric</text:p>
            </table:table-cell>
            <table:table-cell table:style-name="TableHeaderRowCell" office:value-type="string">
              <text:p text:style-name="Table_20_Heading">Ideal</text:p>
            </table:table-cell>
          </table:table-row>
        </table:table-header-rows>
        <table:table-row>
          <table:table-cell table:style-name="TableRowCell" office:value-type="string">
            <text:p text:style-name="Table_20_Contents">Speedup</text:p>
          </table:table-cell>
          <table:table-cell table:style-name="TableRowCell" office:value-type="string">
            <text:p text:style-name="Table_20_Contents">near process count</text:p>
          </table:table-cell>
        </table:table-row>
        <table:table-row>
          <table:table-cell table:style-name="TableRowCell" office:value-type="string">
            <text:p text:style-name="Table_20_Contents">Efficiency</text:p>
          </table:table-cell>
          <table:table-cell table:style-name="TableRowCell" office:value-type="string">
            <text:p text:style-name="Table_20_Contents">near 1.0</text:p>
          </table:table-cell>
        </table:table-row>
      </table:table>
      <text:p text:style-name="First_20_paragraph">Real systems experience:</text:p>
      <text:list text:style-name="L105">
        <text:list-item>
          <text:p text:style-name="P295">communication overhead</text:p>
        </text:list-item>
        <text:list-item>
          <text:p text:style-name="P295">synchronization cost</text:p>
        </text:list-item>
        <text:list-item>
          <text:p text:style-name="P295">MPI latency</text:p>
        </text:list-item>
        <text:list-item>
          <text:p text:style-name="P295">reduction overhead</text:p>
        </text:list-item>
      </text:list>
      <text:h text:style-name="Heading_20_2" text:outline-level="2"><text:bookmark-start text:name="cancel-jobs"/>Cancel Jobs<text:bookmark-end text:name="cancel-jobs"/></text:h>
      <text:p text:style-name="First_20_paragraph">Cancel job:</text:p>
      <text:p text:style-name="Preformatted_20_Text">
<text:span text:style-name="ExtensionTok">scancel</text:span><text:span text:style-name="NormalTok"><text:s text:c="1"/></text:span><text:span text:style-name="OperatorTok">&lt;</text:span><text:span text:style-name="NormalTok">jobid</text:span><text:span text:style-name="OperatorTok">&gt;</text:span>
</text:p>
      <text:p text:style-name="First_20_paragraph">Example:</text:p>
      <text:p text:style-name="Preformatted_20_Text">
<text:span text:style-name="ExtensionTok">scancel</text:span><text:span text:style-name="NormalTok"><text:s text:c="1"/>101</text:span>
</text:p>
      <text:p text:style-name="First_20_paragraph">Cancel all user jobs:</text:p>
      <text:p text:style-name="Preformatted_20_Text">
<text:span text:style-name="ExtensionTok">scancel</text:span><text:span text:style-name="NormalTok"><text:s text:c="1"/></text:span><text:span text:style-name="AttributeTok">-u</text:span><text:span text:style-name="NormalTok"><text:s text:c="1"/></text:span><text:span text:style-name="VariableTok">$USER</text:span>
</text:p>
      <text:h text:style-name="Heading_20_2" text:outline-level="2"><text:bookmark-start text:name="interactive-slurm-execution"/>Interactive Slurm Execution<text:bookmark-end text:name="interactive-slurm-execution"/></text:h>
      <text:p text:style-name="First_20_paragraph">Launch interactive shell:</text:p>
      <text:p text:style-name="Preformatted_20_Text">
<text:span text:style-name="ExtensionTok">srun</text:span><text:span text:style-name="NormalTok"><text:s text:c="1"/></text:span><text:span text:style-name="AttributeTok">--pty</text:span><text:span text:style-name="NormalTok"><text:s text:c="1"/>bash</text:span>
</text:p>
      <text:p text:style-name="First_20_paragraph">Distributed hostname test:</text:p>
      <text:p text:style-name="Preformatted_20_Text">
<text:span text:style-name="ExtensionTok">srun</text:span><text:span text:style-name="NormalTok"><text:s text:c="1"/></text:span><text:span text:style-name="AttributeTok">-N</text:span><text:span text:style-name="NormalTok"><text:s text:c="1"/>3 </text:span><text:span text:style-name="AttributeTok">-n</text:span><text:span text:style-name="NormalTok"><text:s text:c="1"/>3 hostname</text:span>
</text:p>
      <text:p text:style-name="First_20_paragraph">Expected:</text:p>
      <text:list text:style-name="L106">
        <text:list-item>
          <text:p text:style-name="P296">hostnames from allocated nodes</text:p>
        </text:list-item>
      </text:list>
      <text:p text:style-name="First_20_paragraph">This validates:</text:p>
      <text:list text:style-name="L107">
        <text:list-item>
          <text:p text:style-name="P297">scheduler allocation</text:p>
        </text:list-item>
        <text:list-item>
          <text:p text:style-name="P297">distributed execution</text:p>
        </text:list-item>
        <text:list-item>
          <text:p text:style-name="P297">runtime communication</text:p>
        </text:list-item>
      </text:list>
      <text:h text:style-name="Heading_20_2" text:outline-level="2"><text:bookmark-start text:name="important-hpc-workflow"/>IMPORTANT HPC Workflow<text:bookmark-end text:name="important-hpc-workflow"/></text:h>
      <text:p text:style-name="First_20_paragraph">Typical HPC workflow:</text:p>
      <text:p text:style-name="P298">Load software</text:p>
      <text:p text:style-name="P299"><text:s text:c="4"/>↓</text:p>
      <text:p text:style-name="P300">Compile application</text:p>
      <text:p text:style-name="P301"><text:s text:c="4"/>↓</text:p>
      <text:p text:style-name="P302">Prepare Slurm script</text:p>
      <text:p text:style-name="P303"><text:s text:c="4"/>↓</text:p>
      <text:p text:style-name="P304">Submit job</text:p>
      <text:p text:style-name="P305"><text:s text:c="4"/>↓</text:p>
      <text:p text:style-name="P306">Monitor execution</text:p>
      <text:p text:style-name="P307"><text:s text:c="4"/>↓</text:p>
      <text:p text:style-name="P308">Analyze outputs</text:p>
      <text:h text:style-name="Heading_20_2" text:outline-level="2"><text:bookmark-start text:name="important-production-hpc-concept"/>IMPORTANT Production HPC Concept<text:bookmark-end text:name="important-production-hpc-concept"/></text:h>
      <text:p text:style-name="First_20_paragraph">Production HPC systems usually separate:</text:p>
      <text:list text:style-name="L108">
        <text:list-item>
          <text:p text:style-name="P309">operating system packages</text:p>
        </text:list-item>
        <text:list-item>
          <text:p text:style-name="P309">scientific software stack</text:p>
        </text:list-item>
        <text:list-item>
          <text:p text:style-name="P309">compiler stack</text:p>
        </text:list-item>
        <text:list-item>
          <text:p text:style-name="P309">MPI runtime stack</text:p>
        </text:list-item>
        <text:list-item>
          <text:p text:style-name="P309">scheduler integration</text:p>
        </text:list-item>
      </text:list>
      <text:p text:style-name="First_20_paragraph">exactly like this setup.</text:p>
      <text:p text:style-name="Text_20_body">This architecture provides:</text:p>
      <text:list text:style-name="L109">
        <text:list-item>
          <text:p text:style-name="P310">reproducibility</text:p>
        </text:list-item>
        <text:list-item>
          <text:p text:style-name="P310">scalability</text:p>
        </text:list-item>
        <text:list-item>
          <text:p text:style-name="P310">centralized administration</text:p>
        </text:list-item>
        <text:list-item>
          <text:p text:style-name="P310">software consistency</text:p>
        </text:list-item>
        <text:list-item>
          <text:p text:style-name="P310">runtime portability</text:p>
        </text:list-item>
      </text:list>
      <text:h text:style-name="Heading_20_1" text:outline-level="1"><text:bookmark-start text:name="centralized-identity-management-using-openldap-nslcd"/>Centralized Identity Management using OpenLDAP + nslcd<text:bookmark-end text:name="centralized-identity-management-using-openldap-nslcd"/></text:h>
      <text:p text:style-name="First_20_paragraph">Goal:</text:p>
      <text:p text:style-name="Text_20_body">Transform the cluster from:</text:p>
      <text:p text:style-name="P311">local-user-only infrastructure</text:p>
      <text:p text:style-name="First_20_paragraph">into:</text:p>
      <text:p text:style-name="P312">centralized multi-user HPC environment</text:p>
      <text:p text:style-name="First_20_paragraph">using:</text:p>
      <text:list text:style-name="L110">
        <text:list-item>
          <text:p text:style-name="P313">OpenLDAP</text:p>
        </text:list-item>
        <text:list-item>
          <text:p text:style-name="P313">nslcd</text:p>
        </text:list-item>
        <text:list-item>
          <text:p text:style-name="P313">NSS</text:p>
        </text:list-item>
        <text:list-item>
          <text:p text:style-name="P313">PAM</text:p>
        </text:list-item>
      </text:list>
      <text:p text:style-name="First_20_paragraph">This phase introduces centralized user management for the HPC cluster.</text:p>
      <text:p text:style-name="Text_20_body">After completion:</text:p>
      <text:list text:style-name="L111">
        <text:list-item>
          <text:p text:style-name="P314">users are created once centrally</text:p>
        </text:list-item>
        <text:list-item>
          <text:p text:style-name="P314">login node recognizes LDAP users</text:p>
        </text:list-item>
        <text:list-item>
          <text:p text:style-name="P314">compute nodes recognize LDAP users</text:p>
        </text:list-item>
        <text:list-item>
          <text:p text:style-name="P314">centralized authentication works cluster-wide</text:p>
        </text:list-item>
        <text:list-item>
          <text:p text:style-name="P314">automatic home directory creation works</text:p>
        </text:list-item>
        <text:list-item>
          <text:p text:style-name="P314">Slurm can later use centralized identities</text:p>
        </text:list-item>
      </text:list>
      <text:h text:style-name="Heading_20_2" text:outline-level="2"><text:bookmark-start text:name="important-architecture"/>Important Architecture<text:bookmark-end text:name="important-architecture"/></text:h>
      <text:p text:style-name="First_20_paragraph">Cluster roles:</text:p>
      <table:table table:name="Table40" table:style-name="Table40">
        <table:table-column table:style-name="Table40.A"/>
        <table:table-column table:style-name="Table40.B"/>
        <table:table-header-rows>
          <table:table-row>
            <table:table-cell table:style-name="TableHeaderRowCell" office:value-type="string">
              <text:p text:style-name="Table_20_Heading">Node</text:p>
            </table:table-cell>
            <table:table-cell table:style-name="TableHeaderRowCell" office:value-type="string">
              <text:p text:style-name="Table_20_Heading">Role</text:p>
            </table:table-cell>
          </table:table-row>
        </table:table-header-rows>
        <table:table-row>
          <table:table-cell table:style-name="TableRowCell" office:value-type="string">
            <text:p text:style-name="Table_20_Contents">master</text:p>
          </table:table-cell>
          <table:table-cell table:style-name="TableRowCell" office:value-type="string">
            <text:p text:style-name="Table_20_Contents">LDAP server</text:p>
          </table:table-cell>
        </table:table-row>
        <table:table-row>
          <table:table-cell table:style-name="TableRowCell" office:value-type="string">
            <text:p text:style-name="Table_20_Contents">login</text:p>
          </table:table-cell>
          <table:table-cell table:style-name="TableRowCell" office:value-type="string">
            <text:p text:style-name="Table_20_Contents">LDAP client</text:p>
          </table:table-cell>
        </table:table-row>
        <table:table-row>
          <table:table-cell table:style-name="TableRowCell" office:value-type="string">
            <text:p text:style-name="Table_20_Contents">compute01</text:p>
          </table:table-cell>
          <table:table-cell table:style-name="TableRowCell" office:value-type="string">
            <text:p text:style-name="Table_20_Contents">LDAP client</text:p>
          </table:table-cell>
        </table:table-row>
        <table:table-row>
          <table:table-cell table:style-name="TableRowCell" office:value-type="string">
            <text:p text:style-name="Table_20_Contents">compute02</text:p>
          </table:table-cell>
          <table:table-cell table:style-name="TableRowCell" office:value-type="string">
            <text:p text:style-name="Table_20_Contents">LDAP client</text:p>
          </table:table-cell>
        </table:table-row>
        <table:table-row>
          <table:table-cell table:style-name="TableRowCell" office:value-type="string">
            <text:p text:style-name="Table_20_Contents">compute03</text:p>
          </table:table-cell>
          <table:table-cell table:style-name="TableRowCell" office:value-type="string">
            <text:p text:style-name="Table_20_Contents">LDAP client</text:p>
          </table:table-cell>
        </table:table-row>
      </table:table>
      <text:p text:style-name="First_20_paragraph">Important concept:</text:p>
      <text:p text:style-name="P315">Only master runs LDAP SERVER (slapd).</text:p>
      <text:p text:style-name="P316"/>
      <text:p text:style-name="P317">Login and compute nodes run LDAP CLIENTS (nslcd).</text:p>
      <text:h text:style-name="Heading_20_2" text:outline-level="2"><text:bookmark-start text:name="important-linux-authentication-concepts"/>Important Linux Authentication Concepts<text:bookmark-end text:name="important-linux-authentication-concepts"/></text:h>
      <text:p text:style-name="First_20_paragraph">Before starting, understand the layers.</text:p>
      <table:table table:name="Table41" table:style-name="Table41">
        <table:table-column table:style-name="Table41.A"/>
        <table:table-column table:style-name="Table41.B"/>
        <table:table-header-rows>
          <table:table-row>
            <table:table-cell table:style-name="TableHeaderRowCell" office:value-type="string">
              <text:p text:style-name="Table_20_Heading">Component</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LDAP</text:p>
          </table:table-cell>
          <table:table-cell table:style-name="TableRowCell" office:value-type="string">
            <text:p text:style-name="Table_20_Contents">centralized user database</text:p>
          </table:table-cell>
        </table:table-row>
        <table:table-row>
          <table:table-cell table:style-name="TableRowCell" office:value-type="string">
            <text:p text:style-name="Table_20_Contents">NSS</text:p>
          </table:table-cell>
          <table:table-cell table:style-name="TableRowCell" office:value-type="string">
            <text:p text:style-name="Table_20_Contents">user/group lookup</text:p>
          </table:table-cell>
        </table:table-row>
        <table:table-row>
          <table:table-cell table:style-name="TableRowCell" office:value-type="string">
            <text:p text:style-name="Table_20_Contents">PAM</text:p>
          </table:table-cell>
          <table:table-cell table:style-name="TableRowCell" office:value-type="string">
            <text:p text:style-name="Table_20_Contents">authentication</text:p>
          </table:table-cell>
        </table:table-row>
        <table:table-row>
          <table:table-cell table:style-name="TableRowCell" office:value-type="string">
            <text:p text:style-name="Table_20_Contents">nslcd</text:p>
          </table:table-cell>
          <table:table-cell table:style-name="TableRowCell" office:value-type="string">
            <text:p text:style-name="Table_20_Contents">bridge between Linux and LDAP</text:p>
          </table:table-cell>
        </table:table-row>
      </table:table>
      <text:p text:style-name="First_20_paragraph">Authentication flow:</text:p>
      <text:p text:style-name="P318">SSH Login</text:p>
      <text:p text:style-name="P319"><text:s text:c="3"/>↓</text:p>
      <text:p text:style-name="P320">PAM</text:p>
      <text:p text:style-name="P321"><text:s text:c="3"/>↓</text:p>
      <text:p text:style-name="P322">nslcd</text:p>
      <text:p text:style-name="P323"><text:s text:c="3"/>↓</text:p>
      <text:p text:style-name="P324">LDAP server</text:p>
      <text:h text:style-name="Heading_20_2" text:outline-level="2"><text:bookmark-start text:name="install-openldap-server-on-master-node"/>Install OpenLDAP Server on Master Node<text:bookmark-end text:name="install-openldap-server-on-master-node"/></text:h>
      <text:p text:style-name="First_20_paragraph">Run ONLY on:</text:p>
      <text:p text:style-name="P325">master</text:p>
      <text:p text:style-name="First_20_paragraph">Install LDAP packages:</text:p>
      <text:p text:style-name="Preformatted_20_Text">
<text:span text:style-name="FunctionTok">sudo</text:span><text:span text:style-name="NormalTok"><text:s text:c="1"/>dnf install </text:span><text:span text:style-name="AttributeTok">-y</text:span><text:span text:style-name="NormalTok"><text:s text:c="1"/></text:span><text:span text:style-name="DataTypeTok">\</text:span>
</text:p>
      <text:p text:style-name="Preformatted_20_Text">
<text:span text:style-name="NormalTok">openldap </text:span><text:span text:style-name="DataTypeTok">\</text:span>
</text:p>
      <text:p text:style-name="Preformatted_20_Text">
<text:span text:style-name="NormalTok">openldap-servers </text:span><text:span text:style-name="DataTypeTok">\</text:span>
</text:p>
      <text:p text:style-name="Preformatted_20_Text">
<text:span text:style-name="NormalTok">openldap-clients</text:span>
</text:p>
      <text:p text:style-name="First_20_paragraph">Package explanation:</text:p>
      <table:table table:name="Table42" table:style-name="Table42">
        <table:table-column table:style-name="Table42.A"/>
        <table:table-column table:style-name="Table42.B"/>
        <table:table-header-rows>
          <table:table-row>
            <table:table-cell table:style-name="TableHeaderRowCell" office:value-type="string">
              <text:p text:style-name="Table_20_Heading">Package</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openldap</text:p>
          </table:table-cell>
          <table:table-cell table:style-name="TableRowCell" office:value-type="string">
            <text:p text:style-name="Table_20_Contents">LDAP utilities</text:p>
          </table:table-cell>
        </table:table-row>
        <table:table-row>
          <table:table-cell table:style-name="TableRowCell" office:value-type="string">
            <text:p text:style-name="Table_20_Contents">openldap-servers</text:p>
          </table:table-cell>
          <table:table-cell table:style-name="TableRowCell" office:value-type="string">
            <text:p text:style-name="Table_20_Contents">slapd server daemon</text:p>
          </table:table-cell>
        </table:table-row>
        <table:table-row>
          <table:table-cell table:style-name="TableRowCell" office:value-type="string">
            <text:p text:style-name="Table_20_Contents">openldap-clients</text:p>
          </table:table-cell>
          <table:table-cell table:style-name="TableRowCell" office:value-type="string">
            <text:p text:style-name="Table_20_Contents">ldapsearch, ldapadd etc</text:p>
          </table:table-cell>
        </table:table-row>
      </table:table>
      <text:h text:style-name="Heading_20_2" text:outline-level="2"><text:bookmark-start text:name="enable-ldap-server"/>Enable LDAP Server<text:bookmark-end text:name="enable-ldap-server"/></text:h>
      <text:p text:style-name="First_20_paragraph">Run ONLY on:</text:p>
      <text:p text:style-name="P326">master</text:p>
      <text:p text:style-name="First_20_paragraph">Enable and start slapd:</text:p>
      <text:p text:style-name="Preformatted_20_Text">
<text:span text:style-name="FunctionTok">sudo</text:span><text:span text:style-name="NormalTok"><text:s text:c="1"/>systemctl enable </text:span><text:span text:style-name="AttributeTok">--now</text:span><text:span text:style-name="NormalTok"><text:s text:c="1"/>slapd</text:span>
</text:p>
      <text:p text:style-name="First_20_paragraph">Verify:</text:p>
      <text:p text:style-name="Preformatted_20_Text">
<text:span text:style-name="ExtensionTok">systemctl</text:span><text:span text:style-name="NormalTok"><text:s text:c="1"/>status slapd</text:span>
</text:p>
      <text:p text:style-name="First_20_paragraph">Expected:</text:p>
      <text:p text:style-name="P327">active (running)</text:p>
      <text:h text:style-name="Heading_20_2" text:outline-level="2"><text:bookmark-start text:name="generate-ldap-admin-password-hash"/>Generate LDAP Admin Password Hash<text:bookmark-end text:name="generate-ldap-admin-password-hash"/></text:h>
      <text:p text:style-name="First_20_paragraph">Run ONLY on:</text:p>
      <text:p text:style-name="P328">master</text:p>
      <text:p text:style-name="First_20_paragraph">Generate secure LDAP admin password hash:</text:p>
      <text:p text:style-name="Preformatted_20_Text">
<text:span text:style-name="ExtensionTok">slappasswd</text:span>
</text:p>
      <text:p text:style-name="First_20_paragraph">Enter desired password.</text:p>
      <text:p text:style-name="Text_20_body">Example:</text:p>
      <text:p text:style-name="P329">cluster123</text:p>
      <text:p text:style-name="First_20_paragraph">Example output:</text:p>
      <text:p text:style-name="P330">{SSHA}xxxxxxxxxxxxxxxx</text:p>
      <text:p text:style-name="First_20_paragraph">Important:</text:p>
      <text:p text:style-name="P331">Copy this hash carefully.</text:p>
      <text:p text:style-name="First_20_paragraph">It will be used in LDAP database configuration.</text:p>
      <text:h text:style-name="Heading_20_2" text:outline-level="2"><text:bookmark-start text:name="configure-ldap-database"/>Configure LDAP Database<text:bookmark-end text:name="configure-ldap-database"/></text:h>
      <text:p text:style-name="First_20_paragraph">Run ONLY on:</text:p>
      <text:p text:style-name="P332">master</text:p>
      <text:p text:style-name="First_20_paragraph">Create LDAP database configuration file:</text:p>
      <text:p text:style-name="Preformatted_20_Text">
<text:span text:style-name="ExtensionTok">vim</text:span><text:span text:style-name="NormalTok"><text:s text:c="1"/>~/db.ldif</text:span>
</text:p>
      <text:p text:style-name="First_20_paragraph">Paste:</text:p>
      <text:p text:style-name="P333">dn: olcDatabase={2}mdb,cn=config</text:p>
      <text:p text:style-name="P334">changetype: modify</text:p>
      <text:p text:style-name="P335">replace: olcSuffix</text:p>
      <text:p text:style-name="P336">olcSuffix: dc=hpc,dc=local</text:p>
      <text:p text:style-name="P337"/>
      <text:p text:style-name="P338">dn: olcDatabase={2}mdb,cn=config</text:p>
      <text:p text:style-name="P339">changetype: modify</text:p>
      <text:p text:style-name="P340">replace: olcRootDN</text:p>
      <text:p text:style-name="P341">olcRootDN: cn=Manager,dc=hpc,dc=local</text:p>
      <text:p text:style-name="P342"/>
      <text:p text:style-name="P343">dn: olcDatabase={2}mdb,cn=config</text:p>
      <text:p text:style-name="P344">changetype: modify</text:p>
      <text:p text:style-name="P345">replace: olcRootPW</text:p>
      <text:p text:style-name="P346">olcRootPW: PASTE_HASH_HERE</text:p>
      <text:p text:style-name="First_20_paragraph">Replace:</text:p>
      <text:p text:style-name="P347">PASTE_HASH_HERE</text:p>
      <text:p text:style-name="First_20_paragraph">with the hash generated using:</text:p>
      <text:p text:style-name="P348">slappasswd</text:p>
      <text:h text:style-name="Heading_20_2" text:outline-level="2"><text:bookmark-start text:name="important-ldap-concepts"/>Important LDAP Concepts<text:bookmark-end text:name="important-ldap-concepts"/></text:h>
      <text:p text:style-name="First_20_paragraph">LDAP uses a hierarchical tree called:</text:p>
      <text:p text:style-name="P349">DIT -- Directory Information Tree</text:p>
      <text:p text:style-name="First_20_paragraph">Example structure:</text:p>
      <text:p text:style-name="P350">dc=hpc,dc=local</text:p>
      <text:p text:style-name="P351"><text:s text:c="1"/>├── ou=People</text:p>
      <text:p text:style-name="P352"><text:s text:c="1"/>└── ou=Groups</text:p>
      <text:p text:style-name="First_20_paragraph">Meaning of terms:</text:p>
      <table:table table:name="Table43" table:style-name="Table43">
        <table:table-column table:style-name="Table43.A"/>
        <table:table-column table:style-name="Table43.B"/>
        <table:table-header-rows>
          <table:table-row>
            <table:table-cell table:style-name="TableHeaderRowCell" office:value-type="string">
              <text:p text:style-name="Table_20_Heading">Term</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dc</text:p>
          </table:table-cell>
          <table:table-cell table:style-name="TableRowCell" office:value-type="string">
            <text:p text:style-name="Table_20_Contents">domain component</text:p>
          </table:table-cell>
        </table:table-row>
        <table:table-row>
          <table:table-cell table:style-name="TableRowCell" office:value-type="string">
            <text:p text:style-name="Table_20_Contents">ou</text:p>
          </table:table-cell>
          <table:table-cell table:style-name="TableRowCell" office:value-type="string">
            <text:p text:style-name="Table_20_Contents">organizational unit</text:p>
          </table:table-cell>
        </table:table-row>
        <table:table-row>
          <table:table-cell table:style-name="TableRowCell" office:value-type="string">
            <text:p text:style-name="Table_20_Contents">cn</text:p>
          </table:table-cell>
          <table:table-cell table:style-name="TableRowCell" office:value-type="string">
            <text:p text:style-name="Table_20_Contents">common name</text:p>
          </table:table-cell>
        </table:table-row>
      </table:table>
      <text:h text:style-name="Heading_20_2" text:outline-level="2"><text:bookmark-start text:name="apply-ldap-database-configuration"/>Apply LDAP Database Configuration<text:bookmark-end text:name="apply-ldap-database-configuration"/></text:h>
      <text:p text:style-name="First_20_paragraph">Run ONLY on:</text:p>
      <text:p text:style-name="P353">master</text:p>
      <text:p text:style-name="First_20_paragraph">Apply configuration:</text:p>
      <text:p text:style-name="Preformatted_20_Text">
<text:span text:style-name="FunctionTok">sudo</text:span><text:span text:style-name="NormalTok"><text:s text:c="1"/>ldapmodify </text:span><text:span text:style-name="AttributeTok">-Y</text:span><text:span text:style-name="NormalTok"><text:s text:c="1"/>EXTERNAL </text:span><text:span text:style-name="AttributeTok">-H</text:span><text:span text:style-name="NormalTok"><text:s text:c="1"/>ldapi:/// </text:span><text:span text:style-name="DataTypeTok">\</text:span>
</text:p>
      <text:p text:style-name="Preformatted_20_Text">
<text:span text:style-name="NormalTok">-f ~/db.ldif</text:span>
</text:p>
      <text:p text:style-name="First_20_paragraph">Expected:</text:p>
      <text:p text:style-name="P354">modifying entry</text:p>
      <text:h text:style-name="Heading_20_2" text:outline-level="2"><text:bookmark-start text:name="import-ldap-schemas"/>Import LDAP Schemas<text:bookmark-end text:name="import-ldap-schemas"/></text:h>
      <text:p text:style-name="First_20_paragraph">Schemas define:</text:p>
      <text:list text:style-name="L112">
        <text:list-item>
          <text:p text:style-name="P355">user attributes</text:p>
        </text:list-item>
        <text:list-item>
          <text:p text:style-name="P355">group attributes</text:p>
        </text:list-item>
        <text:list-item>
          <text:p text:style-name="P355">UNIX account structure</text:p>
        </text:list-item>
      </text:list>
      <text:p text:style-name="First_20_paragraph">Run ONLY on:</text:p>
      <text:p text:style-name="P356">master</text:p>
      <text:p text:style-name="First_20_paragraph">Import cosine schema:</text:p>
      <text:p text:style-name="Preformatted_20_Text">
<text:span text:style-name="FunctionTok">sudo</text:span><text:span text:style-name="NormalTok"><text:s text:c="1"/>ldapadd </text:span><text:span text:style-name="AttributeTok">-Y</text:span><text:span text:style-name="NormalTok"><text:s text:c="1"/>EXTERNAL </text:span><text:span text:style-name="AttributeTok">-H</text:span><text:span text:style-name="NormalTok"><text:s text:c="1"/>ldapi:/// </text:span><text:span text:style-name="DataTypeTok">\</text:span>
</text:p>
      <text:p text:style-name="Preformatted_20_Text">
<text:span text:style-name="NormalTok">-f /etc/openldap/schema/cosine.ldif</text:span>
</text:p>
      <text:p text:style-name="First_20_paragraph">Import nis schema:</text:p>
      <text:p text:style-name="Preformatted_20_Text">
<text:span text:style-name="FunctionTok">sudo</text:span><text:span text:style-name="NormalTok"><text:s text:c="1"/>ldapadd </text:span><text:span text:style-name="AttributeTok">-Y</text:span><text:span text:style-name="NormalTok"><text:s text:c="1"/>EXTERNAL </text:span><text:span text:style-name="AttributeTok">-H</text:span><text:span text:style-name="NormalTok"><text:s text:c="1"/>ldapi:/// </text:span><text:span text:style-name="DataTypeTok">\</text:span>
</text:p>
      <text:p text:style-name="Preformatted_20_Text">
<text:span text:style-name="NormalTok">-f /etc/openldap/schema/nis.ldif</text:span>
</text:p>
      <text:p text:style-name="First_20_paragraph">Import inetorgperson schema:</text:p>
      <text:p text:style-name="Preformatted_20_Text">
<text:span text:style-name="FunctionTok">sudo</text:span><text:span text:style-name="NormalTok"><text:s text:c="1"/>ldapadd </text:span><text:span text:style-name="AttributeTok">-Y</text:span><text:span text:style-name="NormalTok"><text:s text:c="1"/>EXTERNAL </text:span><text:span text:style-name="AttributeTok">-H</text:span><text:span text:style-name="NormalTok"><text:s text:c="1"/>ldapi:/// </text:span><text:span text:style-name="DataTypeTok">\</text:span>
</text:p>
      <text:p text:style-name="Preformatted_20_Text">
<text:span text:style-name="NormalTok">-f /etc/openldap/schema/inetorgperson.ldif</text:span>
</text:p>
      <text:p text:style-name="First_20_paragraph">Schema explanation:</text:p>
      <table:table table:name="Table44" table:style-name="Table44">
        <table:table-column table:style-name="Table44.A"/>
        <table:table-column table:style-name="Table44.B"/>
        <table:table-header-rows>
          <table:table-row>
            <table:table-cell table:style-name="TableHeaderRowCell" office:value-type="string">
              <text:p text:style-name="Table_20_Heading">Schema</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cosine</text:p>
          </table:table-cell>
          <table:table-cell table:style-name="TableRowCell" office:value-type="string">
            <text:p text:style-name="Table_20_Contents">basic directory attributes</text:p>
          </table:table-cell>
        </table:table-row>
        <table:table-row>
          <table:table-cell table:style-name="TableRowCell" office:value-type="string">
            <text:p text:style-name="Table_20_Contents">nis</text:p>
          </table:table-cell>
          <table:table-cell table:style-name="TableRowCell" office:value-type="string">
            <text:p text:style-name="Table_20_Contents">UNIX/Linux account support</text:p>
          </table:table-cell>
        </table:table-row>
        <table:table-row>
          <table:table-cell table:style-name="TableRowCell" office:value-type="string">
            <text:p text:style-name="Table_20_Contents">inetorgperson</text:p>
          </table:table-cell>
          <table:table-cell table:style-name="TableRowCell" office:value-type="string">
            <text:p text:style-name="Table_20_Contents">user/person identity support</text:p>
          </table:table-cell>
        </table:table-row>
      </table:table>
      <text:h text:style-name="Heading_20_2" text:outline-level="2"><text:bookmark-start text:name="create-ldap-base-tree"/>Create LDAP Base Tree<text:bookmark-end text:name="create-ldap-base-tree"/></text:h>
      <text:p text:style-name="First_20_paragraph">Run ONLY on:</text:p>
      <text:p text:style-name="P357">master</text:p>
      <text:p text:style-name="First_20_paragraph">Create base LDAP tree:</text:p>
      <text:p text:style-name="Preformatted_20_Text">
<text:span text:style-name="ExtensionTok">vim</text:span><text:span text:style-name="NormalTok"><text:s text:c="1"/>~/base.ldif</text:span>
</text:p>
      <text:p text:style-name="First_20_paragraph">Paste:</text:p>
      <text:p text:style-name="P358">dn: dc=hpc,dc=local</text:p>
      <text:p text:style-name="P359">objectClass: top</text:p>
      <text:p text:style-name="P360">objectClass: dcObject</text:p>
      <text:p text:style-name="P361">objectClass: organization</text:p>
      <text:p text:style-name="P362">o: HPC Cluster</text:p>
      <text:p text:style-name="P363">dc: hpc</text:p>
      <text:p text:style-name="P364"/>
      <text:p text:style-name="P365">dn: ou=People,dc=hpc,dc=local</text:p>
      <text:p text:style-name="P366">objectClass: organizationalUnit</text:p>
      <text:p text:style-name="P367">ou: People</text:p>
      <text:p text:style-name="P368"/>
      <text:p text:style-name="P369">dn: ou=Groups,dc=hpc,dc=local</text:p>
      <text:p text:style-name="P370">objectClass: organizationalUnit</text:p>
      <text:p text:style-name="P371">ou: Groups</text:p>
      <text:p text:style-name="First_20_paragraph">Apply tree:</text:p>
      <text:p text:style-name="Preformatted_20_Text">
<text:span text:style-name="ExtensionTok">ldapadd</text:span><text:span text:style-name="NormalTok"><text:s text:c="1"/></text:span><text:span text:style-name="AttributeTok">-x</text:span><text:span text:style-name="NormalTok"><text:s text:c="1"/></text:span><text:span text:style-name="DataTypeTok">\</text:span>
</text:p>
      <text:p text:style-name="Preformatted_20_Text">
<text:span text:style-name="NormalTok">-D </text:span><text:span text:style-name="StringTok">"cn=Manager,dc=hpc,dc=local"</text:span><text:span text:style-name="NormalTok"><text:s text:c="1"/></text:span><text:span text:style-name="DataTypeTok">\</text:span>
</text:p>
      <text:p text:style-name="Preformatted_20_Text">
<text:span text:style-name="NormalTok">-W </text:span><text:span text:style-name="DataTypeTok">\</text:span>
</text:p>
      <text:p text:style-name="Preformatted_20_Text">
<text:span text:style-name="NormalTok">-f ~/base.ldif</text:span>
</text:p>
      <text:p text:style-name="First_20_paragraph">Enter LDAP admin password.</text:p>
      <text:h text:style-name="Heading_20_2" text:outline-level="2"><text:bookmark-start text:name="verify-ldap-tree"/>Verify LDAP Tree<text:bookmark-end text:name="verify-ldap-tree"/></text:h>
      <text:p text:style-name="First_20_paragraph">Run ONLY on:</text:p>
      <text:p text:style-name="P372">master</text:p>
      <text:p text:style-name="First_20_paragraph">Verify tree:</text:p>
      <text:p text:style-name="Preformatted_20_Text">
<text:span text:style-name="ExtensionTok">ldapsearch</text:span><text:span text:style-name="NormalTok"><text:s text:c="1"/></text:span><text:span text:style-name="AttributeTok">-x</text:span><text:span text:style-name="NormalTok"><text:s text:c="1"/></text:span><text:span text:style-name="AttributeTok">-b</text:span><text:span text:style-name="NormalTok"><text:s text:c="1"/></text:span><text:span text:style-name="StringTok">"dc=hpc,dc=local"</text:span>
</text:p>
      <text:p text:style-name="First_20_paragraph">Expected:</text:p>
      <text:list text:style-name="L113">
        <text:list-item>
          <text:p text:style-name="P373">dc=hpc,dc=local</text:p>
        </text:list-item>
        <text:list-item>
          <text:p text:style-name="P373">ou=People</text:p>
        </text:list-item>
        <text:list-item>
          <text:p text:style-name="P373">ou=Groups</text:p>
        </text:list-item>
      </text:list>
      <text:h text:style-name="Heading_20_2" text:outline-level="2"><text:bookmark-start text:name="create-ldap-group"/>Create LDAP Group<text:bookmark-end text:name="create-ldap-group"/></text:h>
      <text:p text:style-name="First_20_paragraph">Run ONLY on:</text:p>
      <text:p text:style-name="P374">master</text:p>
      <text:p text:style-name="First_20_paragraph">Create group file:</text:p>
      <text:p text:style-name="Preformatted_20_Text">
<text:span text:style-name="ExtensionTok">vim</text:span><text:span text:style-name="NormalTok"><text:s text:c="1"/>~/group.ldif</text:span>
</text:p>
      <text:p text:style-name="First_20_paragraph">Paste:</text:p>
      <text:p text:style-name="P375">dn: cn=hpcusers,ou=Groups,dc=hpc,dc=local</text:p>
      <text:p text:style-name="P376">objectClass: posixGroup</text:p>
      <text:p text:style-name="P377">cn: hpcusers</text:p>
      <text:p text:style-name="P378">gidNumber: 10000</text:p>
      <text:p text:style-name="First_20_paragraph">Add group:</text:p>
      <text:p text:style-name="Preformatted_20_Text">
<text:span text:style-name="ExtensionTok">ldapadd</text:span><text:span text:style-name="NormalTok"><text:s text:c="1"/></text:span><text:span text:style-name="AttributeTok">-x</text:span><text:span text:style-name="NormalTok"><text:s text:c="1"/></text:span><text:span text:style-name="DataTypeTok">\</text:span>
</text:p>
      <text:p text:style-name="Preformatted_20_Text">
<text:span text:style-name="NormalTok">-D </text:span><text:span text:style-name="StringTok">"cn=Manager,dc=hpc,dc=local"</text:span><text:span text:style-name="NormalTok"><text:s text:c="1"/></text:span><text:span text:style-name="DataTypeTok">\</text:span>
</text:p>
      <text:p text:style-name="Preformatted_20_Text">
<text:span text:style-name="NormalTok">-W </text:span><text:span text:style-name="DataTypeTok">\</text:span>
</text:p>
      <text:p text:style-name="Preformatted_20_Text">
<text:span text:style-name="NormalTok">-f ~/group.ldif</text:span>
</text:p>
      <text:h text:style-name="Heading_20_2" text:outline-level="2"><text:bookmark-start text:name="create-ldap-user-password-hash"/>Create LDAP User Password Hash<text:bookmark-end text:name="create-ldap-user-password-hash"/></text:h>
      <text:p text:style-name="First_20_paragraph">Run ONLY on:</text:p>
      <text:p text:style-name="P379">master</text:p>
      <text:p text:style-name="First_20_paragraph">Generate password hash:</text:p>
      <text:p text:style-name="Preformatted_20_Text">
<text:span text:style-name="ExtensionTok">slappasswd</text:span>
</text:p>
      <text:p text:style-name="First_20_paragraph">Example password:</text:p>
      <text:p text:style-name="P380">test123</text:p>
      <text:p text:style-name="First_20_paragraph">Copy generated hash carefully.</text:p>
      <text:h text:style-name="Heading_20_2" text:outline-level="2"><text:bookmark-start text:name="create-ldap-user"/>Create LDAP User<text:bookmark-end text:name="create-ldap-user"/></text:h>
      <text:p text:style-name="First_20_paragraph">Run ONLY on:</text:p>
      <text:p text:style-name="P381">master</text:p>
      <text:p text:style-name="First_20_paragraph">Create user file:</text:p>
      <text:p text:style-name="Preformatted_20_Text">
<text:span text:style-name="ExtensionTok">vim</text:span><text:span text:style-name="NormalTok"><text:s text:c="1"/>~/user.ldif</text:span>
</text:p>
      <text:p text:style-name="First_20_paragraph">Paste:</text:p>
      <text:p text:style-name="P382">dn: uid=testUser,ou=People,dc=hpc,dc=local</text:p>
      <text:p text:style-name="P383">objectClass: inetOrgPerson</text:p>
      <text:p text:style-name="P384">objectClass: posixAccount</text:p>
      <text:p text:style-name="P385">objectClass: shadowAccount</text:p>
      <text:p text:style-name="P386">cn: Test User</text:p>
      <text:p text:style-name="P387">sn: User</text:p>
      <text:p text:style-name="P388">uid: testUser</text:p>
      <text:p text:style-name="P389">uidNumber: 10001</text:p>
      <text:p text:style-name="P390">gidNumber: 10000</text:p>
      <text:p text:style-name="P391">homeDirectory: /home/testUser</text:p>
      <text:p text:style-name="P392">loginShell: /bin/bash</text:p>
      <text:p text:style-name="P393">userPassword: PASTE_HASH_HERE</text:p>
      <text:p text:style-name="First_20_paragraph">Replace:</text:p>
      <text:p text:style-name="P394">PASTE_HASH_HERE</text:p>
      <text:p text:style-name="First_20_paragraph">with actual hash from:</text:p>
      <text:p text:style-name="P395">slappasswd</text:p>
      <text:p text:style-name="First_20_paragraph">Add user:</text:p>
      <text:p text:style-name="Preformatted_20_Text">
<text:span text:style-name="ExtensionTok">ldapadd</text:span><text:span text:style-name="NormalTok"><text:s text:c="1"/></text:span><text:span text:style-name="AttributeTok">-x</text:span><text:span text:style-name="NormalTok"><text:s text:c="1"/></text:span><text:span text:style-name="DataTypeTok">\</text:span>
</text:p>
      <text:p text:style-name="Preformatted_20_Text">
<text:span text:style-name="NormalTok">-D </text:span><text:span text:style-name="StringTok">"cn=Manager,dc=hpc,dc=local"</text:span><text:span text:style-name="NormalTok"><text:s text:c="1"/></text:span><text:span text:style-name="DataTypeTok">\</text:span>
</text:p>
      <text:p text:style-name="Preformatted_20_Text">
<text:span text:style-name="NormalTok">-W </text:span><text:span text:style-name="DataTypeTok">\</text:span>
</text:p>
      <text:p text:style-name="Preformatted_20_Text">
<text:span text:style-name="NormalTok">-f ~/user.ldif</text:span>
</text:p>
      <text:h text:style-name="Heading_20_2" text:outline-level="2"><text:bookmark-start text:name="important-ldap-user-attributes"/>Important LDAP User Attributes<text:bookmark-end text:name="important-ldap-user-attributes"/></text:h>
      <table:table table:name="Table45" table:style-name="Table45">
        <table:table-column table:style-name="Table45.A"/>
        <table:table-column table:style-name="Table45.B"/>
        <table:table-header-rows>
          <table:table-row>
            <table:table-cell table:style-name="TableHeaderRowCell" office:value-type="string">
              <text:p text:style-name="Table_20_Heading">Attribute</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uid</text:p>
          </table:table-cell>
          <table:table-cell table:style-name="TableRowCell" office:value-type="string">
            <text:p text:style-name="Table_20_Contents">username</text:p>
          </table:table-cell>
        </table:table-row>
        <table:table-row>
          <table:table-cell table:style-name="TableRowCell" office:value-type="string">
            <text:p text:style-name="Table_20_Contents">uidNumber</text:p>
          </table:table-cell>
          <table:table-cell table:style-name="TableRowCell" office:value-type="string">
            <text:p text:style-name="Table_20_Contents">UNIX UID</text:p>
          </table:table-cell>
        </table:table-row>
        <table:table-row>
          <table:table-cell table:style-name="TableRowCell" office:value-type="string">
            <text:p text:style-name="Table_20_Contents">gidNumber</text:p>
          </table:table-cell>
          <table:table-cell table:style-name="TableRowCell" office:value-type="string">
            <text:p text:style-name="Table_20_Contents">primary group</text:p>
          </table:table-cell>
        </table:table-row>
        <table:table-row>
          <table:table-cell table:style-name="TableRowCell" office:value-type="string">
            <text:p text:style-name="Table_20_Contents">homeDirectory</text:p>
          </table:table-cell>
          <table:table-cell table:style-name="TableRowCell" office:value-type="string">
            <text:p text:style-name="Table_20_Contents">user home</text:p>
          </table:table-cell>
        </table:table-row>
        <table:table-row>
          <table:table-cell table:style-name="TableRowCell" office:value-type="string">
            <text:p text:style-name="Table_20_Contents">loginShell</text:p>
          </table:table-cell>
          <table:table-cell table:style-name="TableRowCell" office:value-type="string">
            <text:p text:style-name="Table_20_Contents">login shell</text:p>
          </table:table-cell>
        </table:table-row>
        <table:table-row>
          <table:table-cell table:style-name="TableRowCell" office:value-type="string">
            <text:p text:style-name="Table_20_Contents">cn</text:p>
          </table:table-cell>
          <table:table-cell table:style-name="TableRowCell" office:value-type="string">
            <text:p text:style-name="Table_20_Contents">common name</text:p>
          </table:table-cell>
        </table:table-row>
        <table:table-row>
          <table:table-cell table:style-name="TableRowCell" office:value-type="string">
            <text:p text:style-name="Table_20_Contents">sn</text:p>
          </table:table-cell>
          <table:table-cell table:style-name="TableRowCell" office:value-type="string">
            <text:p text:style-name="Table_20_Contents">surname</text:p>
          </table:table-cell>
        </table:table-row>
      </table:table>
      <text:h text:style-name="Heading_20_2" text:outline-level="2"><text:bookmark-start text:name="verify-ldap-user"/>Verify LDAP User<text:bookmark-end text:name="verify-ldap-user"/></text:h>
      <text:p text:style-name="First_20_paragraph">Run ONLY on:</text:p>
      <text:p text:style-name="P396">master</text:p>
      <text:p text:style-name="First_20_paragraph">Verify user:</text:p>
      <text:p text:style-name="Preformatted_20_Text">
<text:span text:style-name="ExtensionTok">ldapsearch</text:span><text:span text:style-name="NormalTok"><text:s text:c="1"/></text:span><text:span text:style-name="AttributeTok">-x</text:span><text:span text:style-name="NormalTok"><text:s text:c="1"/></text:span><text:span text:style-name="DataTypeTok">\</text:span>
</text:p>
      <text:p text:style-name="Preformatted_20_Text">
<text:span text:style-name="NormalTok">-b </text:span><text:span text:style-name="StringTok">"dc=hpc,dc=local"</text:span><text:span text:style-name="NormalTok"><text:s text:c="1"/>uid=testUser</text:span>
</text:p>
      <text:p text:style-name="First_20_paragraph">Expected:</text:p>
      <text:list text:style-name="L114">
        <text:list-item>
          <text:p text:style-name="P397">LDAP user entry</text:p>
        </text:list-item>
      </text:list>
      <text:h text:style-name="Heading_20_2" text:outline-level="2"><text:bookmark-start text:name="configure-ldap-client-on-login-node"/>Configure LDAP Client on Login Node<text:bookmark-end text:name="configure-ldap-client-on-login-node"/></text:h>
      <text:p text:style-name="First_20_paragraph">Now begin client-side integration.</text:p>
      <text:p text:style-name="Text_20_body">Run ONLY on:</text:p>
      <text:p text:style-name="P398">login</text:p>
      <text:p text:style-name="First_20_paragraph">Install LDAP client packages:</text:p>
      <text:p text:style-name="Preformatted_20_Text">
<text:span text:style-name="FunctionTok">sudo</text:span><text:span text:style-name="NormalTok"><text:s text:c="1"/>dnf install </text:span><text:span text:style-name="AttributeTok">-y</text:span><text:span text:style-name="NormalTok"><text:s text:c="1"/></text:span><text:span text:style-name="DataTypeTok">\</text:span>
</text:p>
      <text:p text:style-name="Preformatted_20_Text">
<text:span text:style-name="NormalTok">openldap-clients </text:span><text:span text:style-name="DataTypeTok">\</text:span>
</text:p>
      <text:p text:style-name="Preformatted_20_Text">
<text:span text:style-name="NormalTok">nss-pam-ldapd</text:span>
</text:p>
      <text:h text:style-name="Heading_20_2" text:outline-level="2"><text:bookmark-start text:name="configure-nslcd"/>Configure nslcd<text:bookmark-end text:name="configure-nslcd"/></text:h>
      <text:p text:style-name="First_20_paragraph">Run ONLY on:</text:p>
      <text:p text:style-name="P399">login</text:p>
      <text:p text:style-name="First_20_paragraph">Create configuration:</text:p>
      <text:p text:style-name="Preformatted_20_Text">
<text:span text:style-name="FunctionTok">sudo</text:span><text:span text:style-name="NormalTok"><text:s text:c="1"/>vim /etc/nslcd.conf</text:span>
</text:p>
      <text:p text:style-name="First_20_paragraph">Paste:</text:p>
      <text:p text:style-name="Preformatted_20_Text">
<text:span text:style-name="DataTypeTok">uid</text:span><text:span text:style-name="NormalTok"><text:s text:c="1"/></text:span><text:span text:style-name="DataTypeTok">nslcd</text:span>
</text:p>
      <text:p text:style-name="Preformatted_20_Text">
<text:span text:style-name="DataTypeTok">gid</text:span><text:span text:style-name="NormalTok"><text:s text:c="1"/></text:span><text:span text:style-name="DataTypeTok">ldap</text:span>
</text:p>
      <text:p text:style-name="Preformatted_20_Text">
</text:p>
      <text:p text:style-name="Preformatted_20_Text">
<text:span text:style-name="DataTypeTok">uri</text:span><text:span text:style-name="NormalTok"><text:s text:c="1"/></text:span><text:span text:style-name="DataTypeTok">ldap</text:span><text:span text:style-name="ErrorTok">://</text:span><text:span text:style-name="DataTypeTok">master</text:span>
</text:p>
      <text:p text:style-name="Preformatted_20_Text">
<text:span text:style-name="DataTypeTok">base</text:span><text:span text:style-name="NormalTok"><text:s text:c="1"/></text:span><text:span text:style-name="DataTypeTok">dc</text:span><text:span text:style-name="OperatorTok">=</text:span><text:span text:style-name="DataTypeTok">hpc</text:span><text:span text:style-name="ErrorTok">,</text:span><text:span text:style-name="DataTypeTok">dc</text:span><text:span text:style-name="OperatorTok">=</text:span><text:span text:style-name="DataTypeTok">local</text:span>
</text:p>
      <text:p text:style-name="First_20_paragraph">Explanation:</text:p>
      <table:table table:name="Table46" table:style-name="Table46">
        <table:table-column table:style-name="Table46.A"/>
        <table:table-column table:style-name="Table46.B"/>
        <table:table-header-rows>
          <table:table-row>
            <table:table-cell table:style-name="TableHeaderRowCell" office:value-type="string">
              <text:p text:style-name="Table_20_Heading">Parameter</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uri</text:p>
          </table:table-cell>
          <table:table-cell table:style-name="TableRowCell" office:value-type="string">
            <text:p text:style-name="Table_20_Contents">LDAP server</text:p>
          </table:table-cell>
        </table:table-row>
        <table:table-row>
          <table:table-cell table:style-name="TableRowCell" office:value-type="string">
            <text:p text:style-name="Table_20_Contents">base</text:p>
          </table:table-cell>
          <table:table-cell table:style-name="TableRowCell" office:value-type="string">
            <text:p text:style-name="Table_20_Contents">LDAP search root</text:p>
          </table:table-cell>
        </table:table-row>
      </table:table>
      <text:p text:style-name="First_20_paragraph">Secure configuration:</text:p>
      <text:p text:style-name="Preformatted_20_Text">
<text:span text:style-name="FunctionTok">sudo</text:span><text:span text:style-name="NormalTok"><text:s text:c="1"/>chmod 600 /etc/nslcd.conf</text:span>
</text:p>
      <text:h text:style-name="Heading_20_2" text:outline-level="2"><text:bookmark-start text:name="enable-nslcd"/>Enable nslcd<text:bookmark-end text:name="enable-nslcd"/></text:h>
      <text:p text:style-name="First_20_paragraph">Run ONLY on:</text:p>
      <text:p text:style-name="P400">login</text:p>
      <text:p text:style-name="First_20_paragraph">Enable service:</text:p>
      <text:p text:style-name="Preformatted_20_Text">
<text:span text:style-name="FunctionTok">sudo</text:span><text:span text:style-name="NormalTok"><text:s text:c="1"/>systemctl enable </text:span><text:span text:style-name="AttributeTok">--now</text:span><text:span text:style-name="NormalTok"><text:s text:c="1"/>nslcd</text:span>
</text:p>
      <text:p text:style-name="First_20_paragraph">Verify:</text:p>
      <text:p text:style-name="Preformatted_20_Text">
<text:span text:style-name="ExtensionTok">systemctl</text:span><text:span text:style-name="NormalTok"><text:s text:c="1"/>status nslcd</text:span>
</text:p>
      <text:p text:style-name="First_20_paragraph">Expected:</text:p>
      <text:p text:style-name="P401">active (running)</text:p>
      <text:h text:style-name="Heading_20_2" text:outline-level="2"><text:bookmark-start text:name="verify-ldap-connectivity"/>Verify LDAP Connectivity<text:bookmark-end text:name="verify-ldap-connectivity"/></text:h>
      <text:p text:style-name="First_20_paragraph">Run ONLY on:</text:p>
      <text:p text:style-name="P402">login</text:p>
      <text:p text:style-name="First_20_paragraph">Test LDAP communication:</text:p>
      <text:p text:style-name="Preformatted_20_Text">
<text:span text:style-name="ExtensionTok">ldapsearch</text:span><text:span text:style-name="NormalTok"><text:s text:c="1"/></text:span><text:span text:style-name="AttributeTok">-x</text:span><text:span text:style-name="NormalTok"><text:s text:c="1"/></text:span><text:span text:style-name="DataTypeTok">\</text:span>
</text:p>
      <text:p text:style-name="Preformatted_20_Text">
<text:span text:style-name="NormalTok">-H ldap://master </text:span><text:span text:style-name="DataTypeTok">\</text:span>
</text:p>
      <text:p text:style-name="Preformatted_20_Text">
<text:span text:style-name="NormalTok">-b </text:span><text:span text:style-name="StringTok">"dc=hpc,dc=local"</text:span><text:span text:style-name="NormalTok"><text:s text:c="1"/>uid=testUser</text:span>
</text:p>
      <text:p text:style-name="First_20_paragraph">Expected:</text:p>
      <text:list text:style-name="L115">
        <text:list-item>
          <text:p text:style-name="P403">LDAP user entry</text:p>
        </text:list-item>
      </text:list>
      <text:p text:style-name="First_20_paragraph">This verifies:</text:p>
      <text:list text:style-name="L116">
        <text:list-item>
          <text:p text:style-name="P404">login node can communicate with master LDAP server</text:p>
        </text:list-item>
      </text:list>
      <text:h text:style-name="Heading_20_2" text:outline-level="2"><text:bookmark-start text:name="configure-nss"/>Configure NSS<text:bookmark-end text:name="configure-nss"/></text:h>
      <text:p text:style-name="First_20_paragraph">Run ONLY on:</text:p>
      <text:p text:style-name="P405">login</text:p>
      <text:p text:style-name="First_20_paragraph">Edit:</text:p>
      <text:p text:style-name="Preformatted_20_Text">
<text:span text:style-name="FunctionTok">sudo</text:span><text:span text:style-name="NormalTok"><text:s text:c="1"/>vim /etc/nsswitch.conf</text:span>
</text:p>
      <text:p text:style-name="First_20_paragraph">Modify lines:</text:p>
      <text:p text:style-name="P406">passwd: files ldap</text:p>
      <text:p text:style-name="P407">group: files ldap</text:p>
      <text:p text:style-name="P408">shadow: files ldap</text:p>
      <text:p text:style-name="First_20_paragraph">Important:</text:p>
      <text:p text:style-name="P409">This tells Linux:</text:p>
      <text:p text:style-name="P410">check local files first, then LDAP.</text:p>
      <text:h text:style-name="Heading_20_2" text:outline-level="2"><text:bookmark-start text:name="restart-nslcd"/>Restart nslcd<text:bookmark-end text:name="restart-nslcd"/></text:h>
      <text:p text:style-name="First_20_paragraph">Run ONLY on:</text:p>
      <text:p text:style-name="P411">login</text:p>
      <text:p text:style-name="First_20_paragraph">Restart service:</text:p>
      <text:p text:style-name="Preformatted_20_Text">
<text:span text:style-name="FunctionTok">sudo</text:span><text:span text:style-name="NormalTok"><text:s text:c="1"/>systemctl restart nslcd</text:span>
</text:p>
      <text:h text:style-name="Heading_20_2" text:outline-level="2"><text:bookmark-start text:name="verify-ldap-user-resolution"/>Verify LDAP User Resolution<text:bookmark-end text:name="verify-ldap-user-resolution"/></text:h>
      <text:p text:style-name="First_20_paragraph">Run ONLY on:</text:p>
      <text:p text:style-name="P412">login</text:p>
      <text:p text:style-name="First_20_paragraph">Test centralized user lookup:</text:p>
      <text:p text:style-name="Preformatted_20_Text">
<text:span text:style-name="FunctionTok">getent</text:span><text:span text:style-name="NormalTok"><text:s text:c="1"/>passwd testUser</text:span>
</text:p>
      <text:p text:style-name="First_20_paragraph">Expected:</text:p>
      <text:p text:style-name="P413">testUser:x:10001:10000:Test User:/home/testUser:/bin/bash</text:p>
      <text:p text:style-name="First_20_paragraph">Important concept:</text:p>
      <text:p text:style-name="P414">This proves Linux itself recognizes LDAP users.</text:p>
      <text:p text:style-name="First_20_paragraph">This is one of the most important LDAP verification steps.</text:p>
      <text:h text:style-name="Heading_20_2" text:outline-level="2"><text:bookmark-start text:name="note-do-this-for-master-too"/>NOTE (Do this for master too)<text:bookmark-end text:name="note-do-this-for-master-too"/></text:h>
      <text:p text:style-name="First_20_paragraph">Now we must configure: <text:span text:style-name="T1">master</text:span> with EXACT same setup (master should be able to recognise the user).</text:p>
      <text:h text:style-name="Heading_20_2" text:outline-level="2"><text:bookmark-start text:name="install-automatic-home-directory-support"/>Install Automatic Home Directory Support<text:bookmark-end text:name="install-automatic-home-directory-support"/></text:h>
      <text:p text:style-name="First_20_paragraph">Run ONLY on:</text:p>
      <text:p text:style-name="P415">login</text:p>
      <text:p text:style-name="First_20_paragraph">Install package:</text:p>
      <text:p text:style-name="Preformatted_20_Text">
<text:span text:style-name="FunctionTok">sudo</text:span><text:span text:style-name="NormalTok"><text:s text:c="1"/>dnf install </text:span><text:span text:style-name="AttributeTok">-y</text:span><text:span text:style-name="NormalTok"><text:s text:c="1"/>oddjob-mkhomedir</text:span>
</text:p>
      <text:p text:style-name="First_20_paragraph">Enable service:</text:p>
      <text:p text:style-name="Preformatted_20_Text">
<text:span text:style-name="FunctionTok">sudo</text:span><text:span text:style-name="NormalTok"><text:s text:c="1"/>systemctl enable </text:span><text:span text:style-name="AttributeTok">--now</text:span><text:span text:style-name="NormalTok"><text:s text:c="1"/>oddjobd</text:span>
</text:p>
      <text:p text:style-name="First_20_paragraph">Purpose:</text:p>
      <text:p text:style-name="P416">Automatically creates user home directory</text:p>
      <text:p text:style-name="P417">during first successful login.</text:p>
      <text:h text:style-name="Heading_20_2" text:outline-level="2"><text:bookmark-start text:name="configure-pam-authentication"/>Configure PAM Authentication<text:bookmark-end text:name="configure-pam-authentication"/></text:h>
      <text:p text:style-name="First_20_paragraph">Run ONLY on:</text:p>
      <text:p text:style-name="P418">login</text:p>
      <text:p text:style-name="First_20_paragraph">Edit:</text:p>
      <text:p text:style-name="Preformatted_20_Text">
<text:span text:style-name="FunctionTok">sudo</text:span><text:span text:style-name="NormalTok"><text:s text:c="1"/>vim /etc/pam.d/system-auth</text:span>
</text:p>
      <text:p text:style-name="First_20_paragraph">Add LDAP lines in appropriate sections.</text:p>
      <text:p text:style-name="Text_20_body">Add in auth section:</text:p>
      <text:p text:style-name="P419">auth <text:s text:c="7"/>sufficient <text:s text:c="3"/>pam_ldap.so use_first_pass</text:p>
      <text:p text:style-name="First_20_paragraph">Add in account section:</text:p>
      <text:p text:style-name="P420">account <text:s text:c="4"/>sufficient <text:s text:c="3"/>pam_ldap.so</text:p>
      <text:p text:style-name="First_20_paragraph">Add in password section:</text:p>
      <text:p text:style-name="P421">password <text:s text:c="3"/>sufficient <text:s text:c="3"/>pam_ldap.so use_authtok</text:p>
      <text:p text:style-name="First_20_paragraph">Add in session section:</text:p>
      <text:p text:style-name="P422">session <text:s text:c="4"/>optional <text:s text:c="5"/>pam_ldap.so</text:p>
      <text:p text:style-name="P423">session <text:s text:c="4"/>optional <text:s text:c="5"/>pam_mkhomedir.so</text:p>
      <text:p text:style-name="First_20_paragraph">Important:</text:p>
      <text:p text:style-name="P424">Do NOT remove pam_unix.so lines.</text:p>
      <text:h text:style-name="Heading_20_2" text:outline-level="2"><text:bookmark-start text:name="configure-second-pam-file"/>Configure Second PAM File<text:bookmark-end text:name="configure-second-pam-file"/></text:h>
      <text:p text:style-name="First_20_paragraph">Run ONLY on:</text:p>
      <text:p text:style-name="P425">login</text:p>
      <text:p text:style-name="First_20_paragraph">Edit:</text:p>
      <text:p text:style-name="Preformatted_20_Text">
<text:span text:style-name="FunctionTok">sudo</text:span><text:span text:style-name="NormalTok"><text:s text:c="1"/>vim /etc/pam.d/password-auth</text:span>
</text:p>
      <text:p text:style-name="First_20_paragraph">Add SAME LDAP PAM lines.</text:p>
      <text:p text:style-name="Text_20_body">Reason:</text:p>
      <text:p text:style-name="P426">Different login methods use different PAM stacks.</text:p>
      <text:h text:style-name="Heading_20_2" text:outline-level="2"><text:bookmark-start text:name="restart-services"/>Restart Services<text:bookmark-end text:name="restart-services"/></text:h>
      <text:p text:style-name="First_20_paragraph">Run ONLY on:</text:p>
      <text:p text:style-name="P427">login</text:p>
      <text:p text:style-name="First_20_paragraph">Restart services:</text:p>
      <text:p text:style-name="Preformatted_20_Text">
<text:span text:style-name="FunctionTok">sudo</text:span><text:span text:style-name="NormalTok"><text:s text:c="1"/>systemctl restart nslcd</text:span>
</text:p>
      <text:p text:style-name="Preformatted_20_Text">
<text:span text:style-name="FunctionTok">sudo</text:span><text:span text:style-name="NormalTok"><text:s text:c="1"/>systemctl restart oddjobd</text:span>
</text:p>
      <text:h text:style-name="Heading_20_2" text:outline-level="2"><text:bookmark-start text:name="verify-ldap-authentication"/>Verify LDAP Authentication<text:bookmark-end text:name="verify-ldap-authentication"/></text:h>
      <text:p text:style-name="First_20_paragraph">Run ONLY on:</text:p>
      <text:p text:style-name="P428">login</text:p>
      <text:p text:style-name="First_20_paragraph">Test login:</text:p>
      <text:p text:style-name="Preformatted_20_Text">
<text:span text:style-name="FunctionTok">su</text:span><text:span text:style-name="NormalTok"><text:s text:c="1"/></text:span><text:span text:style-name="AttributeTok">-</text:span><text:span text:style-name="NormalTok"><text:s text:c="1"/>testUser</text:span>
</text:p>
      <text:p text:style-name="First_20_paragraph">Enter LDAP password.</text:p>
      <text:p text:style-name="Text_20_body">Expected:</text:p>
      <text:p text:style-name="P429">Creating directory '/home/testUser'</text:p>
      <text:p text:style-name="First_20_paragraph">Successful login indicates:</text:p>
      <text:list text:style-name="L117">
        <text:list-item>
          <text:p text:style-name="P430">LDAP authentication working</text:p>
        </text:list-item>
        <text:list-item>
          <text:p text:style-name="P430">PAM integration working</text:p>
        </text:list-item>
        <text:list-item>
          <text:p text:style-name="P430">automatic home directory creation working</text:p>
        </text:list-item>
      </text:list>
      <text:h text:style-name="Heading_20_2" text:outline-level="2"><text:bookmark-start text:name="verify-user-home"/>Verify User Home<text:bookmark-end text:name="verify-user-home"/></text:h>
      <text:p text:style-name="First_20_paragraph">Run ONLY on:</text:p>
      <text:p text:style-name="P431">login</text:p>
      <text:p text:style-name="First_20_paragraph">After login:</text:p>
      <text:p text:style-name="Preformatted_20_Text">
<text:span text:style-name="BuiltInTok">pwd</text:span>
</text:p>
      <text:p text:style-name="First_20_paragraph">Expected:</text:p>
      <text:p text:style-name="P432">/home/testUser</text:p>
      <text:h text:style-name="Heading_20_3" text:outline-level="3"><text:bookmark-start text:name="now-we-must-replicate-to-compute-nodes"/>NOW WE MUST REPLICATE TO COMPUTE NODES<text:bookmark-end text:name="now-we-must-replicate-to-compute-nodes"/></text:h>
      <text:p text:style-name="First_20_paragraph">Currently:</text:p>
      <text:p text:style-name="P433">login node works fully</text:p>
      <text:p text:style-name="First_20_paragraph">Now we configure:</text:p>
      <text:list text:style-name="L118">
        <text:list-item>
          <text:p text:style-name="P434">compute01</text:p>
        </text:list-item>
        <text:list-item>
          <text:p text:style-name="P434">compute02</text:p>
        </text:list-item>
        <text:list-item>
          <text:p text:style-name="P434">compute03</text:p>
        </text:list-item>
      </text:list>
      <text:p text:style-name="First_20_paragraph">with EXACT same client setup.</text:p>
      <text:h text:style-name="Heading_20_2" text:outline-level="2"><text:bookmark-start text:name="troubleshooting"/>Troubleshooting<text:bookmark-end text:name="troubleshooting"/></text:h>
      <text:h text:style-name="Heading_20_3" text:outline-level="3"><text:bookmark-start text:name="important-slurm-ldap-troubleshooting"/>Important Slurm + LDAP Troubleshooting<text:bookmark-end text:name="important-slurm-ldap-troubleshooting"/></text:h>
      <text:p text:style-name="First_20_paragraph">This section explains one of the MOST common HPC setup issues.</text:p>
      <text:h text:style-name="Heading_20_3" text:outline-level="3"><text:bookmark-start text:name="symptom"/>Symptom<text:bookmark-end text:name="symptom"/></text:h>
      <text:p text:style-name="First_20_paragraph">LDAP users:</text:p>
      <text:list text:style-name="L119">
        <text:list-item>
          <text:p text:style-name="P435">can SSH login</text:p>
        </text:list-item>
        <text:list-item>
          <text:p text:style-name="P435">can use su</text:p>
        </text:list-item>
        <text:list-item>
          <text:p text:style-name="P435">appear in getent passwd</text:p>
        </text:list-item>
      </text:list>
      <text:p text:style-name="First_20_paragraph">BUT:</text:p>
      <text:p text:style-name="Preformatted_20_Text">
<text:span text:style-name="ExtensionTok">sbatch</text:span><text:span text:style-name="NormalTok"><text:s text:c="1"/>submit.sh</text:span>
</text:p>
      <text:p text:style-name="First_20_paragraph">results in:</text:p>
      <text:list text:style-name="L120">
        <text:list-item>
          <text:p text:style-name="P436">jobs stuck in pending</text:p>
        </text:list-item>
        <text:list-item>
          <text:p text:style-name="P436">BeginTime state</text:p>
        </text:list-item>
        <text:list-item>
          <text:p text:style-name="P436">scheduler instability</text:p>
        </text:list-item>
        <text:list-item>
          <text:p text:style-name="P436">sinfo hanging</text:p>
        </text:list-item>
        <text:list-item>
          <text:p text:style-name="P436">Slurm credential errors</text:p>
        </text:list-item>
        <text:list-item>
          <text:p text:style-name="P436">slurmctld crashes</text:p>
        </text:list-item>
      </text:list>
      <text:h text:style-name="Heading_20_3" text:outline-level="3"><text:bookmark-start text:name="root-cause"/>Root Cause<text:bookmark-end text:name="root-cause"/></text:h>
      <text:p text:style-name="First_20_paragraph">Slurm internally works using:</text:p>
      <text:list text:style-name="L121">
        <text:list-item>
          <text:p text:style-name="P437">UID</text:p>
        </text:list-item>
        <text:list-item>
          <text:p text:style-name="P437">GID</text:p>
        </text:list-item>
        <text:list-item>
          <text:p text:style-name="P437">NSS identity resolution</text:p>
        </text:list-item>
      </text:list>
      <text:p text:style-name="First_20_paragraph">When launching jobs, Slurm performs internal user identity lookups.</text:p>
      <text:p text:style-name="Text_20_body">If master node cannot resolve LDAP users correctly through:</text:p>
      <text:list text:style-name="L122">
        <text:list-item>
          <text:p text:style-name="P438">NSS</text:p>
        </text:list-item>
        <text:list-item>
          <text:p text:style-name="P438">nslcd</text:p>
        </text:list-item>
        <text:list-item>
          <text:p text:style-name="P438">LDAP</text:p>
        </text:list-item>
      </text:list>
      <text:p text:style-name="First_20_paragraph">then:</text:p>
      <text:list text:style-name="L123">
        <text:list-item>
          <text:p text:style-name="P439">Slurm credential generation fails</text:p>
        </text:list-item>
        <text:list-item>
          <text:p text:style-name="P439">scheduler may crash</text:p>
        </text:list-item>
        <text:list-item>
          <text:p text:style-name="P439">jobs cannot launch</text:p>
        </text:list-item>
      </text:list>
      <text:p text:style-name="First_20_paragraph">Common error:</text:p>
      <text:p text:style-name="P440">_fill_cred_gids: getpwuid failed for uid=10001</text:p>
      <text:p text:style-name="First_20_paragraph">Meaning:</text:p>
      <text:p text:style-name="P441">Slurm cannot resolve LDAP user identity correctly.</text:p>
      <text:h text:style-name="Heading_20_3" text:outline-level="3"><text:bookmark-start text:name="important-verification-commands"/>Important Verification Commands<text:bookmark-end text:name="important-verification-commands"/></text:h>
      <text:p text:style-name="First_20_paragraph">Run on:</text:p>
      <text:p text:style-name="P442">master</text:p>
      <text:p text:style-name="P443">login</text:p>
      <text:p text:style-name="P444">compute nodes</text:p>
      <text:p text:style-name="First_20_paragraph">Verify LDAP resolution:</text:p>
      <text:p text:style-name="Preformatted_20_Text">
<text:span text:style-name="FunctionTok">getent</text:span><text:span text:style-name="NormalTok"><text:s text:c="1"/>passwd testUser</text:span>
</text:p>
      <text:p text:style-name="Preformatted_20_Text">
<text:span text:style-name="FunctionTok">id</text:span><text:span text:style-name="NormalTok"><text:s text:c="1"/>testUser</text:span>
</text:p>
      <text:p text:style-name="First_20_paragraph">Expected:</text:p>
      <text:p text:style-name="P445">uid=10001(testUser) gid=10000(hpcusers)</text:p>
      <text:p text:style-name="First_20_paragraph">These commands MUST work correctly on ALL cluster nodes.</text:p>
      <text:h text:style-name="Heading_20_3" text:outline-level="3"><text:bookmark-start text:name="important-master-node-verification"/>Important Master Node Verification<text:bookmark-end text:name="important-master-node-verification"/></text:h>
      <text:p text:style-name="First_20_paragraph">The master node MUST also resolve LDAP users correctly.</text:p>
      <text:p text:style-name="Text_20_body">Verify:</text:p>
      <text:p text:style-name="Preformatted_20_Text">
<text:span text:style-name="FunctionTok">getent</text:span><text:span text:style-name="NormalTok"><text:s text:c="1"/>passwd testUser</text:span>
</text:p>
      <text:p text:style-name="First_20_paragraph">If master cannot resolve LDAP users:</text:p>
      <text:list text:style-name="L124">
        <text:list-item>
          <text:p text:style-name="P446">slurmctld may fail</text:p>
        </text:list-item>
        <text:list-item>
          <text:p text:style-name="P446">scheduler may crash</text:p>
        </text:list-item>
        <text:list-item>
          <text:p text:style-name="P446">jobs remain pending</text:p>
        </text:list-item>
      </text:list>
      <text:p text:style-name="First_20_paragraph">Verify nslcd configuration on master:</text:p>
      <text:p text:style-name="Preformatted_20_Text">
<text:span text:style-name="FunctionTok">sudo</text:span><text:span text:style-name="NormalTok"><text:s text:c="1"/>vim /etc/nslcd.conf</text:span>
</text:p>
      <text:p text:style-name="First_20_paragraph">Example:</text:p>
      <text:p text:style-name="Preformatted_20_Text">
<text:span text:style-name="DataTypeTok">uid</text:span><text:span text:style-name="NormalTok"><text:s text:c="1"/></text:span><text:span text:style-name="DataTypeTok">nslcd</text:span>
</text:p>
      <text:p text:style-name="Preformatted_20_Text">
<text:span text:style-name="DataTypeTok">gid</text:span><text:span text:style-name="NormalTok"><text:s text:c="1"/></text:span><text:span text:style-name="DataTypeTok">ldap</text:span>
</text:p>
      <text:p text:style-name="Preformatted_20_Text">
</text:p>
      <text:p text:style-name="Preformatted_20_Text">
<text:span text:style-name="DataTypeTok">uri</text:span><text:span text:style-name="NormalTok"><text:s text:c="1"/></text:span><text:span text:style-name="DataTypeTok">ldap</text:span><text:span text:style-name="ErrorTok">://</text:span><text:span text:style-name="DataTypeTok">master</text:span>
</text:p>
      <text:p text:style-name="Preformatted_20_Text">
<text:span text:style-name="DataTypeTok">base</text:span><text:span text:style-name="NormalTok"><text:s text:c="1"/></text:span><text:span text:style-name="DataTypeTok">dc</text:span><text:span text:style-name="OperatorTok">=</text:span><text:span text:style-name="DataTypeTok">hpc</text:span><text:span text:style-name="ErrorTok">,</text:span><text:span text:style-name="DataTypeTok">dc</text:span><text:span text:style-name="OperatorTok">=</text:span><text:span text:style-name="DataTypeTok">local</text:span>
</text:p>
      <text:p text:style-name="First_20_paragraph">Verify NSS configuration:</text:p>
      <text:p text:style-name="Preformatted_20_Text">
<text:span text:style-name="FunctionTok">sudo</text:span><text:span text:style-name="NormalTok"><text:s text:c="1"/>vim /etc/nsswitch.conf</text:span>
</text:p>
      <text:p text:style-name="First_20_paragraph">Ensure:</text:p>
      <text:p text:style-name="P447">passwd: files ldap</text:p>
      <text:p text:style-name="P448">group: files ldap</text:p>
      <text:p text:style-name="P449">shadow: files ldap</text:p>
      <text:p text:style-name="First_20_paragraph">Restart LDAP client:</text:p>
      <text:p text:style-name="Preformatted_20_Text">
<text:span text:style-name="FunctionTok">sudo</text:span><text:span text:style-name="NormalTok"><text:s text:c="1"/>systemctl restart nslcd</text:span>
</text:p>
      <text:h text:style-name="Heading_20_3" text:outline-level="3"><text:bookmark-start text:name="important-slurm-architecture"/>Important Slurm Architecture<text:bookmark-end text:name="important-slurm-architecture"/></text:h>
      <text:p text:style-name="First_20_paragraph">Correct architecture:</text:p>
      <table:table table:name="Table47" table:style-name="Table47">
        <table:table-column table:style-name="Table47.A"/>
        <table:table-column table:style-name="Table47.B"/>
        <table:table-header-rows>
          <table:table-row>
            <table:table-cell table:style-name="TableHeaderRowCell" office:value-type="string">
              <text:p text:style-name="Table_20_Heading">Node</text:p>
            </table:table-cell>
            <table:table-cell table:style-name="TableHeaderRowCell" office:value-type="string">
              <text:p text:style-name="Table_20_Heading">Service</text:p>
            </table:table-cell>
          </table:table-row>
        </table:table-header-rows>
        <table:table-row>
          <table:table-cell table:style-name="TableRowCell" office:value-type="string">
            <text:p text:style-name="Table_20_Contents">master</text:p>
          </table:table-cell>
          <table:table-cell table:style-name="TableRowCell" office:value-type="string">
            <text:p text:style-name="Table_20_Contents">slurmctld</text:p>
          </table:table-cell>
        </table:table-row>
        <table:table-row>
          <table:table-cell table:style-name="TableRowCell" office:value-type="string">
            <text:p text:style-name="Table_20_Contents">login</text:p>
          </table:table-cell>
          <table:table-cell table:style-name="TableRowCell" office:value-type="string">
            <text:p text:style-name="Table_20_Contents">login services only</text:p>
          </table:table-cell>
        </table:table-row>
        <table:table-row>
          <table:table-cell table:style-name="TableRowCell" office:value-type="string">
            <text:p text:style-name="Table_20_Contents">compute01</text:p>
          </table:table-cell>
          <table:table-cell table:style-name="TableRowCell" office:value-type="string">
            <text:p text:style-name="Table_20_Contents">slurmd</text:p>
          </table:table-cell>
        </table:table-row>
        <table:table-row>
          <table:table-cell table:style-name="TableRowCell" office:value-type="string">
            <text:p text:style-name="Table_20_Contents">compute02</text:p>
          </table:table-cell>
          <table:table-cell table:style-name="TableRowCell" office:value-type="string">
            <text:p text:style-name="Table_20_Contents">slurmd</text:p>
          </table:table-cell>
        </table:table-row>
        <table:table-row>
          <table:table-cell table:style-name="TableRowCell" office:value-type="string">
            <text:p text:style-name="Table_20_Contents">compute03</text:p>
          </table:table-cell>
          <table:table-cell table:style-name="TableRowCell" office:value-type="string">
            <text:p text:style-name="Table_20_Contents">slurmd</text:p>
          </table:table-cell>
        </table:table-row>
      </table:table>
      <text:p text:style-name="First_20_paragraph">IMPORTANT:</text:p>
      <text:p text:style-name="P450">Login node should NOT run slurmd.</text:p>
      <text:p text:style-name="First_20_paragraph">Because login node is NOT configured as a compute node in:</text:p>
      <text:p text:style-name="P451">/etc/slurm/slurm.conf</text:p>
      <text:p text:style-name="First_20_paragraph">Attempting to start slurmd on login gives:</text:p>
      <text:p text:style-name="P452">slurmd: fatal: Unable to determine this slurmd's NodeName</text:p>
      <text:p text:style-name="First_20_paragraph">This is NORMAL and expected.</text:p>
      <text:p text:style-name="Text_20_body">Correct action on login node:</text:p>
      <text:p text:style-name="Preformatted_20_Text">
<text:span text:style-name="FunctionTok">sudo</text:span><text:span text:style-name="NormalTok"><text:s text:c="1"/>systemctl stop slurmd</text:span>
</text:p>
      <text:p text:style-name="Preformatted_20_Text">
<text:span text:style-name="FunctionTok">sudo</text:span><text:span text:style-name="NormalTok"><text:s text:c="1"/>systemctl disable slurmd</text:span>
</text:p>
      <text:p text:style-name="First_20_paragraph">Expected afterward:</text:p>
      <text:p text:style-name="P453">inactive (dead)</text:p>
      <text:p text:style-name="First_20_paragraph">This is CORRECT for login nodes.</text:p>
      <text:h text:style-name="Heading_20_3" text:outline-level="3"><text:bookmark-start text:name="important-slurm-recovery-commands"/>Important Slurm Recovery Commands<text:bookmark-end text:name="important-slurm-recovery-commands"/></text:h>
      <text:p text:style-name="First_20_paragraph">Whenever:</text:p>
      <text:list text:style-name="L125">
        <text:list-item>
          <text:p text:style-name="P454">LDAP users are added</text:p>
        </text:list-item>
        <text:list-item>
          <text:p text:style-name="P454">NSS configuration changes</text:p>
        </text:list-item>
        <text:list-item>
          <text:p text:style-name="P454">PAM configuration changes</text:p>
        </text:list-item>
        <text:list-item>
          <text:p text:style-name="P454">nslcd configuration changes</text:p>
        </text:list-item>
      </text:list>
      <text:p text:style-name="First_20_paragraph">restart Slurm services.</text:p>
      <text:p text:style-name="Text_20_body">Restart controller on master:</text:p>
      <text:p text:style-name="Preformatted_20_Text">
<text:span text:style-name="FunctionTok">sudo</text:span><text:span text:style-name="NormalTok"><text:s text:c="1"/>systemctl restart slurmctld</text:span>
</text:p>
      <text:p text:style-name="First_20_paragraph">Restart compute daemons on compute nodes:</text:p>
      <text:p text:style-name="Preformatted_20_Text">
<text:span text:style-name="FunctionTok">sudo</text:span><text:span text:style-name="NormalTok"><text:s text:c="1"/>systemctl restart slurmd</text:span>
</text:p>
      <text:p text:style-name="First_20_paragraph">Restart LDAP client:</text:p>
      <text:p text:style-name="Preformatted_20_Text">
<text:span text:style-name="FunctionTok">sudo</text:span><text:span text:style-name="NormalTok"><text:s text:c="1"/>systemctl restart nslcd</text:span>
</text:p>
      <text:p text:style-name="First_20_paragraph">Verify cluster:</text:p>
      <text:p text:style-name="Preformatted_20_Text">
<text:span text:style-name="ExtensionTok">sinfo</text:span>
</text:p>
      <text:p text:style-name="First_20_paragraph">Expected:</text:p>
      <text:p text:style-name="P455">debug* up infinite 3 idle compute[01-03]</text:p>
      <text:h text:style-name="Heading_20_3" text:outline-level="3"><text:bookmark-start text:name="important-scheduler-debugging"/>Important Scheduler Debugging<text:bookmark-end text:name="important-scheduler-debugging"/></text:h>
      <text:p text:style-name="First_20_paragraph">If:</text:p>
      <text:p text:style-name="Preformatted_20_Text">
<text:span text:style-name="ExtensionTok">sinfo</text:span>
</text:p>
      <text:p text:style-name="First_20_paragraph">hangs indefinitely:</text:p>
      <text:p text:style-name="Text_20_body">Possible cause:</text:p>
      <text:p text:style-name="P456">slurmctld crashed</text:p>
      <text:p text:style-name="First_20_paragraph">Verify:</text:p>
      <text:p text:style-name="Preformatted_20_Text">
<text:span text:style-name="ExtensionTok">systemctl</text:span><text:span text:style-name="NormalTok"><text:s text:c="1"/>status slurmctld</text:span>
</text:p>
      <text:p text:style-name="First_20_paragraph">or:</text:p>
      <text:p text:style-name="Preformatted_20_Text">
<text:span text:style-name="ExtensionTok">journalctl</text:span><text:span text:style-name="NormalTok"><text:s text:c="1"/></text:span><text:span text:style-name="AttributeTok">-u</text:span><text:span text:style-name="NormalTok"><text:s text:c="1"/>slurmctld </text:span><text:span text:style-name="AttributeTok">-n</text:span><text:span text:style-name="NormalTok"><text:s text:c="1"/>50</text:span>
</text:p>
      <text:h text:style-name="Heading_20_2" text:outline-level="2"><text:bookmark-start text:name="current-cluster-state-after-ldap-setup"/>Current Cluster State After LDAP Setup<text:bookmark-end text:name="current-cluster-state-after-ldap-setup"/></text:h>
      <text:p text:style-name="First_20_paragraph">Cluster now contains:</text:p>
      <table:table table:name="Table48" table:style-name="Table48">
        <table:table-column table:style-name="Table48.A"/>
        <table:table-column table:style-name="Table48.B"/>
        <table:table-header-rows>
          <table:table-row>
            <table:table-cell table:style-name="TableHeaderRowCell" office:value-type="string">
              <text:p text:style-name="Table_20_Heading">Component</text:p>
            </table:table-cell>
            <table:table-cell table:style-name="TableHeaderRowCell" office:value-type="string">
              <text:p text:style-name="Table_20_Heading">Status</text:p>
            </table:table-cell>
          </table:table-row>
        </table:table-header-rows>
        <table:table-row>
          <table:table-cell table:style-name="TableRowCell" office:value-type="string">
            <text:p text:style-name="Table_20_Contents">OpenLDAP server</text:p>
          </table:table-cell>
          <table:table-cell table:style-name="TableRowCell" office:value-type="string">
            <text:p text:style-name="Table_20_Contents">working</text:p>
          </table:table-cell>
        </table:table-row>
        <table:table-row>
          <table:table-cell table:style-name="TableRowCell" office:value-type="string">
            <text:p text:style-name="Table_20_Contents">centralized users</text:p>
          </table:table-cell>
          <table:table-cell table:style-name="TableRowCell" office:value-type="string">
            <text:p text:style-name="Table_20_Contents">working</text:p>
          </table:table-cell>
        </table:table-row>
        <table:table-row>
          <table:table-cell table:style-name="TableRowCell" office:value-type="string">
            <text:p text:style-name="Table_20_Contents">centralized authentication</text:p>
          </table:table-cell>
          <table:table-cell table:style-name="TableRowCell" office:value-type="string">
            <text:p text:style-name="Table_20_Contents">working</text:p>
          </table:table-cell>
        </table:table-row>
        <table:table-row>
          <table:table-cell table:style-name="TableRowCell" office:value-type="string">
            <text:p text:style-name="Table_20_Contents">nslcd integration</text:p>
          </table:table-cell>
          <table:table-cell table:style-name="TableRowCell" office:value-type="string">
            <text:p text:style-name="Table_20_Contents">working</text:p>
          </table:table-cell>
        </table:table-row>
        <table:table-row>
          <table:table-cell table:style-name="TableRowCell" office:value-type="string">
            <text:p text:style-name="Table_20_Contents">NSS integration</text:p>
          </table:table-cell>
          <table:table-cell table:style-name="TableRowCell" office:value-type="string">
            <text:p text:style-name="Table_20_Contents">working</text:p>
          </table:table-cell>
        </table:table-row>
        <table:table-row>
          <table:table-cell table:style-name="TableRowCell" office:value-type="string">
            <text:p text:style-name="Table_20_Contents">PAM authentication</text:p>
          </table:table-cell>
          <table:table-cell table:style-name="TableRowCell" office:value-type="string">
            <text:p text:style-name="Table_20_Contents">working</text:p>
          </table:table-cell>
        </table:table-row>
        <table:table-row>
          <table:table-cell table:style-name="TableRowCell" office:value-type="string">
            <text:p text:style-name="Table_20_Contents">automatic home creation</text:p>
          </table:table-cell>
          <table:table-cell table:style-name="TableRowCell" office:value-type="string">
            <text:p text:style-name="Table_20_Contents">working</text:p>
          </table:table-cell>
        </table:table-row>
      </table:table>
      <text:h text:style-name="Heading_20_2" text:outline-level="2"><text:bookmark-start text:name="important-debugging-commands"/>Important Debugging Commands<text:bookmark-end text:name="important-debugging-commands"/></text:h>
      <text:p text:style-name="First_20_paragraph">Verify LDAP tree:</text:p>
      <text:p text:style-name="Preformatted_20_Text">
<text:span text:style-name="ExtensionTok">ldapsearch</text:span><text:span text:style-name="NormalTok"><text:s text:c="1"/></text:span><text:span text:style-name="AttributeTok">-x</text:span><text:span text:style-name="NormalTok"><text:s text:c="1"/></text:span><text:span text:style-name="AttributeTok">-b</text:span><text:span text:style-name="NormalTok"><text:s text:c="1"/></text:span><text:span text:style-name="StringTok">"dc=hpc,dc=local"</text:span>
</text:p>
      <text:p text:style-name="First_20_paragraph">Verify LDAP user:</text:p>
      <text:p text:style-name="Preformatted_20_Text">
<text:span text:style-name="ExtensionTok">ldapsearch</text:span><text:span text:style-name="NormalTok"><text:s text:c="1"/></text:span><text:span text:style-name="AttributeTok">-x</text:span><text:span text:style-name="NormalTok"><text:s text:c="1"/></text:span><text:span text:style-name="AttributeTok">-b</text:span><text:span text:style-name="NormalTok"><text:s text:c="1"/></text:span><text:span text:style-name="StringTok">"dc=hpc,dc=local"</text:span><text:span text:style-name="NormalTok"><text:s text:c="1"/>uid=testUser</text:span>
</text:p>
      <text:p text:style-name="First_20_paragraph">Verify LDAP authentication:</text:p>
      <text:p text:style-name="Preformatted_20_Text">
<text:span text:style-name="ExtensionTok">ldapwhoami</text:span><text:span text:style-name="NormalTok"><text:s text:c="1"/></text:span><text:span text:style-name="AttributeTok">-x</text:span><text:span text:style-name="NormalTok"><text:s text:c="1"/></text:span><text:span text:style-name="DataTypeTok">\</text:span>
</text:p>
      <text:p text:style-name="Preformatted_20_Text">
<text:span text:style-name="NormalTok">-D </text:span><text:span text:style-name="StringTok">"uid=testUser,ou=People,dc=hpc,dc=local"</text:span><text:span text:style-name="NormalTok"><text:s text:c="1"/></text:span><text:span text:style-name="DataTypeTok">\</text:span>
</text:p>
      <text:p text:style-name="Preformatted_20_Text">
<text:span text:style-name="NormalTok">-W </text:span><text:span text:style-name="DataTypeTok">\</text:span>
</text:p>
      <text:p text:style-name="Preformatted_20_Text">
<text:span text:style-name="NormalTok">-H ldap://master</text:span>
</text:p>
      <text:p text:style-name="First_20_paragraph">Verify Linux user resolution:</text:p>
      <text:p text:style-name="Preformatted_20_Text">
<text:span text:style-name="FunctionTok">getent</text:span><text:span text:style-name="NormalTok"><text:s text:c="1"/>passwd testUser</text:span>
</text:p>
      <text:p text:style-name="First_20_paragraph">Verify nslcd service:</text:p>
      <text:p text:style-name="Preformatted_20_Text">
<text:span text:style-name="ExtensionTok">systemctl</text:span><text:span text:style-name="NormalTok"><text:s text:c="1"/>status nslcd</text:span>
</text:p>
      <text:h text:style-name="Heading_20_2" text:outline-level="2"><text:bookmark-start text:name="important-architecture-understanding"/>Important Architecture Understanding<text:bookmark-end text:name="important-architecture-understanding"/></text:h>
      <text:p text:style-name="First_20_paragraph">Master node:</text:p>
      <text:list text:style-name="L126">
        <text:list-item>
          <text:p text:style-name="P457">provides centralized identity database</text:p>
        </text:list-item>
      </text:list>
      <text:p text:style-name="First_20_paragraph">Login/compute nodes:</text:p>
      <text:list text:style-name="L127">
        <text:list-item>
          <text:p text:style-name="P458">authenticate users</text:p>
        </text:list-item>
        <text:list-item>
          <text:p text:style-name="P458">resolve LDAP users</text:p>
        </text:list-item>
        <text:list-item>
          <text:p text:style-name="P458">create user sessions</text:p>
        </text:list-item>
      </text:list>
      <text:p text:style-name="First_20_paragraph">This separation is fundamental in distributed authentication systems.</text:p>
      <text:h text:style-name="Heading_20_1" text:outline-level="1"><text:bookmark-start text:name="automated-ldap-user-creation-script"/>Automated LDAP User Creation Script<text:bookmark-end text:name="automated-ldap-user-creation-script"/></text:h>
      <text:p text:style-name="First_20_paragraph">Managing users manually using individual LDIF files becomes difficult as the number of users increases.</text:p>
      <text:p text:style-name="Text_20_body">To simplify user management, an automation script can be used to:</text:p>
      <text:list text:style-name="L128">
        <text:list-item>
          <text:p text:style-name="P459">create LDAP group</text:p>
        </text:list-item>
        <text:list-item>
          <text:p text:style-name="P459">create LDAP user</text:p>
        </text:list-item>
        <text:list-item>
          <text:p text:style-name="P459">generate password automatically</text:p>
        </text:list-item>
        <text:list-item>
          <text:p text:style-name="P459">generate password hash automatically</text:p>
        </text:list-item>
        <text:list-item>
          <text:p text:style-name="P459">add entries into LDAP</text:p>
        </text:list-item>
      </text:list>
      <text:p text:style-name="First_20_paragraph">This script automates complete LDAP user creation.</text:p>
      <text:p text:style-name="Text_20_body">IMPORTANT:</text:p>
      <text:p text:style-name="P460">The script creates:</text:p>
      <text:p text:style-name="P461"/>
      <text:p text:style-name="P462">- private group for user</text:p>
      <text:p text:style-name="P463">- LDAP user entry</text:p>
      <text:p text:style-name="P464">- hashed LDAP password</text:p>
      <text:p text:style-name="P465"/>
      <text:p text:style-name="P466">automatically.</text:p>
      <text:h text:style-name="Heading_20_2" text:outline-level="2"><text:bookmark-start text:name="script-location"/>Script Location<text:bookmark-end text:name="script-location"/></text:h>
      <text:p text:style-name="First_20_paragraph">Example:</text:p>
      <text:p text:style-name="Preformatted_20_Text">
<text:span text:style-name="BuiltInTok">cd</text:span><text:span text:style-name="NormalTok"><text:s text:c="1"/>~/ldap-scripts</text:span>
</text:p>
      <text:p text:style-name="Preformatted_20_Text">
<text:span text:style-name="FunctionTok">ls</text:span>
</text:p>
      <text:p text:style-name="First_20_paragraph">Expected:</text:p>
      <text:p text:style-name="P467">createUser.sh</text:p>
      <text:h text:style-name="Heading_20_2" text:outline-level="2"><text:bookmark-start text:name="user-creation-script"/>User Creation Script<text:bookmark-end text:name="user-creation-script"/></text:h>
      <text:p text:style-name="First_20_paragraph">Create file:</text:p>
      <text:p text:style-name="Preformatted_20_Text">
<text:span text:style-name="ExtensionTok">vim</text:span><text:span text:style-name="NormalTok"><text:s text:c="1"/>createUser.sh</text:span>
</text:p>
      <text:p text:style-name="First_20_paragraph">Paste the complete script exactly as shown below:</text:p>
      <text:p text:style-name="Preformatted_20_Text">
<text:span text:style-name="CommentTok">#!/bin/bash </text:span>
</text:p>
      <text:p text:style-name="Preformatted_20_Text">
</text:p>
      <text:p text:style-name="Preformatted_20_Text">
<text:span text:style-name="VariableTok">LDAP_ADMIN</text:span><text:span text:style-name="OperatorTok">=</text:span><text:span text:style-name="StringTok">"cn=Manager,dc=hpc,dc=local"</text:span>
</text:p>
      <text:p text:style-name="Preformatted_20_Text">
<text:span text:style-name="VariableTok">BASE_DN</text:span><text:span text:style-name="OperatorTok">=</text:span><text:span text:style-name="StringTok">"dc=hpc,dc=local"</text:span>
</text:p>
      <text:p text:style-name="Preformatted_20_Text">
</text:p>
      <text:p text:style-name="Preformatted_20_Text">
<text:span text:style-name="VariableTok">USERNAME</text:span><text:span text:style-name="OperatorTok">=</text:span><text:span text:style-name="VariableTok">$1</text:span>
</text:p>
      <text:p text:style-name="Preformatted_20_Text">
<text:span text:style-name="VariableTok">UIDNUM</text:span><text:span text:style-name="OperatorTok">=</text:span><text:span text:style-name="VariableTok">$2</text:span>
</text:p>
      <text:p text:style-name="Preformatted_20_Text">
<text:span text:style-name="VariableTok">GIDNUM</text:span><text:span text:style-name="OperatorTok">=</text:span><text:span text:style-name="VariableTok">$3</text:span>
</text:p>
      <text:p text:style-name="Preformatted_20_Text">
</text:p>
      <text:p text:style-name="Preformatted_20_Text">
<text:span text:style-name="ControlFlowTok">if</text:span><text:span text:style-name="NormalTok"><text:s text:c="1"/></text:span><text:span text:style-name="BuiltInTok">[</text:span><text:span text:style-name="NormalTok"><text:s text:c="1"/></text:span><text:span text:style-name="VariableTok">$#</text:span><text:span text:style-name="NormalTok"><text:s text:c="1"/></text:span><text:span text:style-name="OtherTok">-ne</text:span><text:span text:style-name="NormalTok"><text:s text:c="1"/>3 </text:span><text:span text:style-name="BuiltInTok">]</text:span><text:span text:style-name="KeywordTok">;</text:span><text:span text:style-name="NormalTok"><text:s text:c="1"/></text:span><text:span text:style-name="ControlFlowTok">then</text:span>
</text:p>
      <text:p text:style-name="Preformatted_20_Text">
<text:span text:style-name="NormalTok"><text:s text:c="4"/></text:span><text:span text:style-name="BuiltInTok">echo</text:span><text:span text:style-name="NormalTok"><text:s text:c="1"/></text:span><text:span text:style-name="StringTok">"Usage: </text:span><text:span text:style-name="VariableTok">$0</text:span><text:span text:style-name="StringTok"><text:s text:c="1"/>&lt;username&gt; &lt;uid&gt; &lt;gid&gt;"</text:span>
</text:p>
      <text:p text:style-name="Preformatted_20_Text">
<text:span text:style-name="NormalTok"><text:s text:c="4"/></text:span><text:span text:style-name="BuiltInTok">exit</text:span><text:span text:style-name="NormalTok"><text:s text:c="1"/>1</text:span>
</text:p>
      <text:p text:style-name="Preformatted_20_Text">
<text:span text:style-name="ControlFlowTok">fi</text:span>
</text:p>
      <text:p text:style-name="Preformatted_20_Text">
</text:p>
      <text:p text:style-name="Preformatted_20_Text">
<text:span text:style-name="CommentTok"># Check if user already exists</text:span>
</text:p>
      <text:p text:style-name="Preformatted_20_Text">
<text:span text:style-name="VariableTok">USER_EXISTS</text:span><text:span text:style-name="OperatorTok">=</text:span><text:span text:style-name="VariableTok">$(</text:span><text:span text:style-name="ExtensionTok">ldapsearch</text:span><text:span text:style-name="NormalTok"><text:s text:c="1"/></text:span><text:span text:style-name="AttributeTok">-x</text:span><text:span text:style-name="NormalTok"><text:s text:c="1"/></text:span><text:span text:style-name="DataTypeTok">\</text:span>
</text:p>
      <text:p text:style-name="Preformatted_20_Text">
<text:span text:style-name="NormalTok">-b </text:span><text:span text:style-name="StringTok">"ou=People,</text:span><text:span text:style-name="VariableTok">${BASE_DN}</text:span><text:span text:style-name="StringTok">"</text:span><text:span text:style-name="NormalTok"><text:s text:c="1"/></text:span><text:span text:style-name="StringTok">"(uid=</text:span><text:span text:style-name="VariableTok">${USERNAME}</text:span><text:span text:style-name="StringTok">)"</text:span><text:span text:style-name="NormalTok"><text:s text:c="1"/>dn </text:span><text:span text:style-name="DataTypeTok">\</text:span>
</text:p>
      <text:p text:style-name="Preformatted_20_Text">
<text:span text:style-name="KeywordTok">|</text:span><text:span text:style-name="NormalTok"><text:s text:c="1"/></text:span><text:span text:style-name="FunctionTok">grep</text:span><text:span text:style-name="NormalTok"><text:s text:c="1"/></text:span><text:span text:style-name="StringTok">"^dn:"</text:span><text:span text:style-name="VariableTok">)</text:span>
</text:p>
      <text:p text:style-name="Preformatted_20_Text">
</text:p>
      <text:p text:style-name="Preformatted_20_Text">
<text:span text:style-name="ControlFlowTok">if</text:span><text:span text:style-name="NormalTok"><text:s text:c="1"/></text:span><text:span text:style-name="BuiltInTok">[</text:span><text:span text:style-name="NormalTok"><text:s text:c="1"/></text:span><text:span text:style-name="OtherTok">!</text:span><text:span text:style-name="NormalTok"><text:s text:c="1"/></text:span><text:span text:style-name="OtherTok">-z</text:span><text:span text:style-name="NormalTok"><text:s text:c="1"/></text:span><text:span text:style-name="StringTok">"</text:span><text:span text:style-name="VariableTok">$USER_EXISTS</text:span><text:span text:style-name="StringTok">"</text:span><text:span text:style-name="NormalTok"><text:s text:c="1"/></text:span><text:span text:style-name="BuiltInTok">]</text:span><text:span text:style-name="KeywordTok">;</text:span><text:span text:style-name="NormalTok"><text:s text:c="1"/></text:span><text:span text:style-name="ControlFlowTok">then</text:span>
</text:p>
      <text:p text:style-name="Preformatted_20_Text">
<text:span text:style-name="NormalTok"><text:s text:c="4"/></text:span><text:span text:style-name="BuiltInTok">echo</text:span><text:span text:style-name="NormalTok"><text:s text:c="1"/></text:span><text:span text:style-name="StringTok">"ERROR: User </text:span><text:span text:style-name="VariableTok">${USERNAME}</text:span><text:span text:style-name="StringTok"><text:s text:c="1"/>already exists!"</text:span>
</text:p>
      <text:p text:style-name="Preformatted_20_Text">
<text:span text:style-name="NormalTok"><text:s text:c="4"/></text:span><text:span text:style-name="BuiltInTok">exit</text:span><text:span text:style-name="NormalTok"><text:s text:c="1"/>1</text:span>
</text:p>
      <text:p text:style-name="Preformatted_20_Text">
<text:span text:style-name="ControlFlowTok">fi</text:span>
</text:p>
      <text:p text:style-name="Preformatted_20_Text">
</text:p>
      <text:p text:style-name="Preformatted_20_Text">
<text:span text:style-name="CommentTok"># Check if group already exists</text:span>
</text:p>
      <text:p text:style-name="Preformatted_20_Text">
<text:span text:style-name="VariableTok">GROUP_EXISTS</text:span><text:span text:style-name="OperatorTok">=</text:span><text:span text:style-name="VariableTok">$(</text:span><text:span text:style-name="ExtensionTok">ldapsearch</text:span><text:span text:style-name="NormalTok"><text:s text:c="1"/></text:span><text:span text:style-name="AttributeTok">-x</text:span><text:span text:style-name="NormalTok"><text:s text:c="1"/></text:span><text:span text:style-name="DataTypeTok">\</text:span>
</text:p>
      <text:p text:style-name="Preformatted_20_Text">
<text:span text:style-name="NormalTok">-b </text:span><text:span text:style-name="StringTok">"ou=Groups,</text:span><text:span text:style-name="VariableTok">${BASE_DN}</text:span><text:span text:style-name="StringTok">"</text:span><text:span text:style-name="NormalTok"><text:s text:c="1"/></text:span><text:span text:style-name="StringTok">"(cn=</text:span><text:span text:style-name="VariableTok">${USERNAME}</text:span><text:span text:style-name="StringTok">)"</text:span><text:span text:style-name="NormalTok"><text:s text:c="1"/>dn </text:span><text:span text:style-name="DataTypeTok">\</text:span>
</text:p>
      <text:p text:style-name="Preformatted_20_Text">
<text:span text:style-name="KeywordTok">|</text:span><text:span text:style-name="NormalTok"><text:s text:c="1"/></text:span><text:span text:style-name="FunctionTok">grep</text:span><text:span text:style-name="NormalTok"><text:s text:c="1"/></text:span><text:span text:style-name="StringTok">"^dn:"</text:span><text:span text:style-name="VariableTok">)</text:span>
</text:p>
      <text:p text:style-name="Preformatted_20_Text">
</text:p>
      <text:p text:style-name="Preformatted_20_Text">
<text:span text:style-name="ControlFlowTok">if</text:span><text:span text:style-name="NormalTok"><text:s text:c="1"/></text:span><text:span text:style-name="BuiltInTok">[</text:span><text:span text:style-name="NormalTok"><text:s text:c="1"/></text:span><text:span text:style-name="OtherTok">!</text:span><text:span text:style-name="NormalTok"><text:s text:c="1"/></text:span><text:span text:style-name="OtherTok">-z</text:span><text:span text:style-name="NormalTok"><text:s text:c="1"/></text:span><text:span text:style-name="StringTok">"</text:span><text:span text:style-name="VariableTok">$GROUP_EXISTS</text:span><text:span text:style-name="StringTok">"</text:span><text:span text:style-name="NormalTok"><text:s text:c="1"/></text:span><text:span text:style-name="BuiltInTok">]</text:span><text:span text:style-name="KeywordTok">;</text:span><text:span text:style-name="NormalTok"><text:s text:c="1"/></text:span><text:span text:style-name="ControlFlowTok">then</text:span>
</text:p>
      <text:p text:style-name="Preformatted_20_Text">
<text:span text:style-name="NormalTok"><text:s text:c="4"/></text:span><text:span text:style-name="BuiltInTok">echo</text:span><text:span text:style-name="NormalTok"><text:s text:c="1"/></text:span><text:span text:style-name="StringTok">"ERROR: Group </text:span><text:span text:style-name="VariableTok">${USERNAME}</text:span><text:span text:style-name="StringTok"><text:s text:c="1"/>already exists!"</text:span>
</text:p>
      <text:p text:style-name="Preformatted_20_Text">
<text:span text:style-name="NormalTok"><text:s text:c="4"/></text:span><text:span text:style-name="BuiltInTok">exit</text:span><text:span text:style-name="NormalTok"><text:s text:c="1"/>1</text:span>
</text:p>
      <text:p text:style-name="Preformatted_20_Text">
<text:span text:style-name="ControlFlowTok">fi</text:span>
</text:p>
      <text:p text:style-name="Preformatted_20_Text">
</text:p>
      <text:p text:style-name="Preformatted_20_Text">
<text:span text:style-name="VariableTok">PASSWORD</text:span><text:span text:style-name="OperatorTok">=</text:span><text:span text:style-name="StringTok">"</text:span><text:span text:style-name="VariableTok">${USERNAME}</text:span><text:span text:style-name="StringTok">@@123"</text:span>
</text:p>
      <text:p text:style-name="Preformatted_20_Text">
</text:p>
      <text:p text:style-name="Preformatted_20_Text">
<text:span text:style-name="VariableTok">PASSWORD_HASH</text:span><text:span text:style-name="OperatorTok">=</text:span><text:span text:style-name="VariableTok">$(</text:span><text:span text:style-name="ExtensionTok">slappasswd</text:span><text:span text:style-name="NormalTok"><text:s text:c="1"/></text:span><text:span text:style-name="AttributeTok">-s</text:span><text:span text:style-name="NormalTok"><text:s text:c="1"/></text:span><text:span text:style-name="StringTok">"</text:span><text:span text:style-name="VariableTok">$PASSWORD</text:span><text:span text:style-name="StringTok">"</text:span><text:span text:style-name="VariableTok">)</text:span>
</text:p>
      <text:p text:style-name="Preformatted_20_Text">
</text:p>
      <text:p text:style-name="Preformatted_20_Text">
<text:span text:style-name="BuiltInTok">echo</text:span>
</text:p>
      <text:p text:style-name="Preformatted_20_Text">
<text:span text:style-name="BuiltInTok">echo</text:span><text:span text:style-name="NormalTok"><text:s text:c="1"/></text:span><text:span text:style-name="StringTok">"=================================="</text:span>
</text:p>
      <text:p text:style-name="Preformatted_20_Text">
<text:span text:style-name="BuiltInTok">echo</text:span><text:span text:style-name="NormalTok"><text:s text:c="1"/></text:span><text:span text:style-name="StringTok">"Creating LDAP User"</text:span>
</text:p>
      <text:p text:style-name="Preformatted_20_Text">
<text:span text:style-name="BuiltInTok">echo</text:span><text:span text:style-name="NormalTok"><text:s text:c="1"/></text:span><text:span text:style-name="StringTok">"=================================="</text:span>
</text:p>
      <text:p text:style-name="Preformatted_20_Text">
<text:span text:style-name="BuiltInTok">echo</text:span><text:span text:style-name="NormalTok"><text:s text:c="1"/></text:span><text:span text:style-name="StringTok">"Username : </text:span><text:span text:style-name="VariableTok">${USERNAME}</text:span><text:span text:style-name="StringTok">"</text:span>
</text:p>
      <text:p text:style-name="Preformatted_20_Text">
<text:span text:style-name="BuiltInTok">echo</text:span><text:span text:style-name="NormalTok"><text:s text:c="1"/></text:span><text:span text:style-name="StringTok">"UID <text:s text:c="5"/>: </text:span><text:span text:style-name="VariableTok">${UIDNUM}</text:span><text:span text:style-name="StringTok">"</text:span>
</text:p>
      <text:p text:style-name="Preformatted_20_Text">
<text:span text:style-name="BuiltInTok">echo</text:span><text:span text:style-name="NormalTok"><text:s text:c="1"/></text:span><text:span text:style-name="StringTok">"GID <text:s text:c="5"/>: </text:span><text:span text:style-name="VariableTok">${GIDNUM}</text:span><text:span text:style-name="StringTok">"</text:span>
</text:p>
      <text:p text:style-name="Preformatted_20_Text">
<text:span text:style-name="BuiltInTok">echo</text:span><text:span text:style-name="NormalTok"><text:s text:c="1"/></text:span><text:span text:style-name="StringTok">"=================================="</text:span>
</text:p>
      <text:p text:style-name="Preformatted_20_Text">
</text:p>
      <text:p text:style-name="Preformatted_20_Text">
<text:span text:style-name="CommentTok"># Create private group LDIF</text:span>
</text:p>
      <text:p text:style-name="Preformatted_20_Text">
<text:span text:style-name="FunctionTok">cat</text:span><text:span text:style-name="NormalTok"><text:s text:c="1"/></text:span><text:span text:style-name="OperatorTok">&gt;</text:span><text:span text:style-name="NormalTok"><text:s text:c="1"/>/tmp/</text:span><text:span text:style-name="VariableTok">${USERNAME}</text:span><text:span text:style-name="NormalTok">_group.ldif </text:span><text:span text:style-name="OperatorTok">&lt;&lt;EOF</text:span>
</text:p>
      <text:p text:style-name="Preformatted_20_Text">
<text:span text:style-name="StringTok">dn: cn=</text:span><text:span text:style-name="VariableTok">${USERNAME}</text:span><text:span text:style-name="StringTok">,ou=Groups,</text:span><text:span text:style-name="VariableTok">${BASE_DN}</text:span>
</text:p>
      <text:p text:style-name="Preformatted_20_Text">
<text:span text:style-name="StringTok">objectClass: posixGroup</text:span>
</text:p>
      <text:p text:style-name="Preformatted_20_Text">
<text:span text:style-name="StringTok">cn: </text:span><text:span text:style-name="VariableTok">${USERNAME}</text:span>
</text:p>
      <text:p text:style-name="Preformatted_20_Text">
<text:span text:style-name="StringTok">gidNumber: </text:span><text:span text:style-name="VariableTok">${GIDNUM}</text:span>
</text:p>
      <text:p text:style-name="Preformatted_20_Text">
<text:span text:style-name="OperatorTok">EOF</text:span>
</text:p>
      <text:p text:style-name="Preformatted_20_Text">
</text:p>
      <text:p text:style-name="Preformatted_20_Text">
<text:span text:style-name="CommentTok"># Create user LDIF</text:span>
</text:p>
      <text:p text:style-name="Preformatted_20_Text">
<text:span text:style-name="FunctionTok">cat</text:span><text:span text:style-name="NormalTok"><text:s text:c="1"/></text:span><text:span text:style-name="OperatorTok">&gt;</text:span><text:span text:style-name="NormalTok"><text:s text:c="1"/>/tmp/</text:span><text:span text:style-name="VariableTok">${USERNAME}</text:span><text:span text:style-name="NormalTok">.ldif </text:span><text:span text:style-name="OperatorTok">&lt;&lt;EOF</text:span>
</text:p>
      <text:p text:style-name="Preformatted_20_Text">
<text:span text:style-name="StringTok">dn: uid=</text:span><text:span text:style-name="VariableTok">${USERNAME}</text:span><text:span text:style-name="StringTok">,ou=People,</text:span><text:span text:style-name="VariableTok">${BASE_DN}</text:span>
</text:p>
      <text:p text:style-name="Preformatted_20_Text">
<text:span text:style-name="StringTok">objectClass: inetOrgPerson</text:span>
</text:p>
      <text:p text:style-name="Preformatted_20_Text">
<text:span text:style-name="StringTok">objectClass: posixAccount</text:span>
</text:p>
      <text:p text:style-name="Preformatted_20_Text">
<text:span text:style-name="StringTok">objectClass: shadowAccount</text:span>
</text:p>
      <text:p text:style-name="Preformatted_20_Text">
<text:span text:style-name="StringTok">cn: </text:span><text:span text:style-name="VariableTok">${USERNAME}</text:span>
</text:p>
      <text:p text:style-name="Preformatted_20_Text">
<text:span text:style-name="StringTok">sn: </text:span><text:span text:style-name="VariableTok">${USERNAME}</text:span>
</text:p>
      <text:p text:style-name="Preformatted_20_Text">
<text:span text:style-name="StringTok">uid: </text:span><text:span text:style-name="VariableTok">${USERNAME}</text:span>
</text:p>
      <text:p text:style-name="Preformatted_20_Text">
<text:span text:style-name="StringTok">uidNumber: </text:span><text:span text:style-name="VariableTok">${UIDNUM}</text:span>
</text:p>
      <text:p text:style-name="Preformatted_20_Text">
<text:span text:style-name="StringTok">gidNumber: </text:span><text:span text:style-name="VariableTok">${GIDNUM}</text:span>
</text:p>
      <text:p text:style-name="Preformatted_20_Text">
<text:span text:style-name="StringTok">homeDirectory: /home/</text:span><text:span text:style-name="VariableTok">${USERNAME}</text:span>
</text:p>
      <text:p text:style-name="Preformatted_20_Text">
<text:span text:style-name="StringTok">loginShell: /bin/bash</text:span>
</text:p>
      <text:p text:style-name="Preformatted_20_Text">
<text:span text:style-name="StringTok">userPassword: </text:span><text:span text:style-name="VariableTok">${PASSWORD_HASH}</text:span>
</text:p>
      <text:p text:style-name="Preformatted_20_Text">
<text:span text:style-name="OperatorTok">EOF</text:span>
</text:p>
      <text:p text:style-name="Preformatted_20_Text">
</text:p>
      <text:p text:style-name="Preformatted_20_Text">
<text:span text:style-name="BuiltInTok">echo</text:span>
</text:p>
      <text:p text:style-name="Preformatted_20_Text">
<text:span text:style-name="BuiltInTok">echo</text:span><text:span text:style-name="NormalTok"><text:s text:c="1"/></text:span><text:span text:style-name="StringTok">"Adding LDAP group..."</text:span>
</text:p>
      <text:p text:style-name="Preformatted_20_Text">
</text:p>
      <text:p text:style-name="Preformatted_20_Text">
<text:span text:style-name="ExtensionTok">ldapadd</text:span><text:span text:style-name="NormalTok"><text:s text:c="1"/></text:span><text:span text:style-name="AttributeTok">-x</text:span><text:span text:style-name="NormalTok"><text:s text:c="1"/></text:span><text:span text:style-name="DataTypeTok">\</text:span>
</text:p>
      <text:p text:style-name="Preformatted_20_Text">
<text:span text:style-name="NormalTok">-D </text:span><text:span text:style-name="StringTok">"</text:span><text:span text:style-name="VariableTok">${LDAP_ADMIN}</text:span><text:span text:style-name="StringTok">"</text:span><text:span text:style-name="NormalTok"><text:s text:c="1"/></text:span><text:span text:style-name="DataTypeTok">\</text:span>
</text:p>
      <text:p text:style-name="Preformatted_20_Text">
<text:span text:style-name="NormalTok">-W </text:span><text:span text:style-name="DataTypeTok">\</text:span>
</text:p>
      <text:p text:style-name="Preformatted_20_Text">
<text:span text:style-name="NormalTok">-f /tmp/</text:span><text:span text:style-name="VariableTok">${USERNAME}</text:span><text:span text:style-name="NormalTok">_group.ldif</text:span>
</text:p>
      <text:p text:style-name="Preformatted_20_Text">
</text:p>
      <text:p text:style-name="Preformatted_20_Text">
<text:span text:style-name="ControlFlowTok">if</text:span><text:span text:style-name="NormalTok"><text:s text:c="1"/></text:span><text:span text:style-name="BuiltInTok">[</text:span><text:span text:style-name="NormalTok"><text:s text:c="1"/></text:span><text:span text:style-name="VariableTok">$?</text:span><text:span text:style-name="NormalTok"><text:s text:c="1"/></text:span><text:span text:style-name="OtherTok">-ne</text:span><text:span text:style-name="NormalTok"><text:s text:c="1"/>0 </text:span><text:span text:style-name="BuiltInTok">]</text:span><text:span text:style-name="KeywordTok">;</text:span><text:span text:style-name="NormalTok"><text:s text:c="1"/></text:span><text:span text:style-name="ControlFlowTok">then</text:span>
</text:p>
      <text:p text:style-name="Preformatted_20_Text">
<text:span text:style-name="NormalTok"><text:s text:c="4"/></text:span><text:span text:style-name="BuiltInTok">echo</text:span><text:span text:style-name="NormalTok"><text:s text:c="1"/></text:span><text:span text:style-name="StringTok">"ERROR: Failed to create LDAP group!"</text:span>
</text:p>
      <text:p text:style-name="Preformatted_20_Text">
<text:span text:style-name="NormalTok"><text:s text:c="4"/></text:span><text:span text:style-name="BuiltInTok">exit</text:span><text:span text:style-name="NormalTok"><text:s text:c="1"/>1</text:span>
</text:p>
      <text:p text:style-name="Preformatted_20_Text">
<text:span text:style-name="ControlFlowTok">fi</text:span>
</text:p>
      <text:p text:style-name="Preformatted_20_Text">
</text:p>
      <text:p text:style-name="Preformatted_20_Text">
<text:span text:style-name="BuiltInTok">echo</text:span>
</text:p>
      <text:p text:style-name="Preformatted_20_Text">
<text:span text:style-name="BuiltInTok">echo</text:span><text:span text:style-name="NormalTok"><text:s text:c="1"/></text:span><text:span text:style-name="StringTok">"Adding LDAP user..."</text:span>
</text:p>
      <text:p text:style-name="Preformatted_20_Text">
</text:p>
      <text:p text:style-name="Preformatted_20_Text">
<text:span text:style-name="ExtensionTok">ldapadd</text:span><text:span text:style-name="NormalTok"><text:s text:c="1"/></text:span><text:span text:style-name="AttributeTok">-x</text:span><text:span text:style-name="NormalTok"><text:s text:c="1"/></text:span><text:span text:style-name="DataTypeTok">\</text:span>
</text:p>
      <text:p text:style-name="Preformatted_20_Text">
<text:span text:style-name="NormalTok">-D </text:span><text:span text:style-name="StringTok">"</text:span><text:span text:style-name="VariableTok">${LDAP_ADMIN}</text:span><text:span text:style-name="StringTok">"</text:span><text:span text:style-name="NormalTok"><text:s text:c="1"/></text:span><text:span text:style-name="DataTypeTok">\</text:span>
</text:p>
      <text:p text:style-name="Preformatted_20_Text">
<text:span text:style-name="NormalTok">-W </text:span><text:span text:style-name="DataTypeTok">\</text:span>
</text:p>
      <text:p text:style-name="Preformatted_20_Text">
<text:span text:style-name="NormalTok">-f /tmp/</text:span><text:span text:style-name="VariableTok">${USERNAME}</text:span><text:span text:style-name="NormalTok">.ldif</text:span>
</text:p>
      <text:p text:style-name="Preformatted_20_Text">
</text:p>
      <text:p text:style-name="Preformatted_20_Text">
<text:span text:style-name="ControlFlowTok">if</text:span><text:span text:style-name="NormalTok"><text:s text:c="1"/></text:span><text:span text:style-name="BuiltInTok">[</text:span><text:span text:style-name="NormalTok"><text:s text:c="1"/></text:span><text:span text:style-name="VariableTok">$?</text:span><text:span text:style-name="NormalTok"><text:s text:c="1"/></text:span><text:span text:style-name="OtherTok">-ne</text:span><text:span text:style-name="NormalTok"><text:s text:c="1"/>0 </text:span><text:span text:style-name="BuiltInTok">]</text:span><text:span text:style-name="KeywordTok">;</text:span><text:span text:style-name="NormalTok"><text:s text:c="1"/></text:span><text:span text:style-name="ControlFlowTok">then</text:span>
</text:p>
      <text:p text:style-name="Preformatted_20_Text">
<text:span text:style-name="NormalTok"><text:s text:c="4"/></text:span><text:span text:style-name="BuiltInTok">echo</text:span><text:span text:style-name="NormalTok"><text:s text:c="1"/></text:span><text:span text:style-name="StringTok">"ERROR: Failed to create LDAP user!"</text:span>
</text:p>
      <text:p text:style-name="Preformatted_20_Text">
<text:span text:style-name="NormalTok"><text:s text:c="4"/></text:span><text:span text:style-name="BuiltInTok">exit</text:span><text:span text:style-name="NormalTok"><text:s text:c="1"/>1</text:span>
</text:p>
      <text:p text:style-name="Preformatted_20_Text">
<text:span text:style-name="ControlFlowTok">fi</text:span>
</text:p>
      <text:p text:style-name="Preformatted_20_Text">
</text:p>
      <text:p text:style-name="Preformatted_20_Text">
<text:span text:style-name="BuiltInTok">echo</text:span>
</text:p>
      <text:p text:style-name="Preformatted_20_Text">
<text:span text:style-name="BuiltInTok">echo</text:span><text:span text:style-name="NormalTok"><text:s text:c="1"/></text:span><text:span text:style-name="StringTok">"=================================="</text:span>
</text:p>
      <text:p text:style-name="Preformatted_20_Text">
<text:span text:style-name="BuiltInTok">echo</text:span><text:span text:style-name="NormalTok"><text:s text:c="1"/></text:span><text:span text:style-name="StringTok">"LDAP User Created Successfully"</text:span>
</text:p>
      <text:p text:style-name="Preformatted_20_Text">
<text:span text:style-name="BuiltInTok">echo</text:span><text:span text:style-name="NormalTok"><text:s text:c="1"/></text:span><text:span text:style-name="StringTok">"=================================="</text:span>
</text:p>
      <text:p text:style-name="Preformatted_20_Text">
<text:span text:style-name="BuiltInTok">echo</text:span><text:span text:style-name="NormalTok"><text:s text:c="1"/></text:span><text:span text:style-name="StringTok">"Username : </text:span><text:span text:style-name="VariableTok">${USERNAME}</text:span><text:span text:style-name="StringTok">"</text:span>
</text:p>
      <text:p text:style-name="Preformatted_20_Text">
<text:span text:style-name="BuiltInTok">echo</text:span><text:span text:style-name="NormalTok"><text:s text:c="1"/></text:span><text:span text:style-name="StringTok">"Password : </text:span><text:span text:style-name="VariableTok">${PASSWORD}</text:span><text:span text:style-name="StringTok">"</text:span>
</text:p>
      <text:p text:style-name="Preformatted_20_Text">
<text:span text:style-name="BuiltInTok">echo</text:span><text:span text:style-name="NormalTok"><text:s text:c="1"/></text:span><text:span text:style-name="StringTok">"UID <text:s text:c="5"/>: </text:span><text:span text:style-name="VariableTok">${UIDNUM}</text:span><text:span text:style-name="StringTok">"</text:span>
</text:p>
      <text:p text:style-name="Preformatted_20_Text">
<text:span text:style-name="BuiltInTok">echo</text:span><text:span text:style-name="NormalTok"><text:s text:c="1"/></text:span><text:span text:style-name="StringTok">"GID <text:s text:c="5"/>: </text:span><text:span text:style-name="VariableTok">${GIDNUM}</text:span><text:span text:style-name="StringTok">"</text:span>
</text:p>
      <text:p text:style-name="Preformatted_20_Text">
<text:span text:style-name="BuiltInTok">echo</text:span><text:span text:style-name="NormalTok"><text:s text:c="1"/></text:span><text:span text:style-name="StringTok">"=================================="</text:span>
</text:p>
      <text:h text:style-name="Heading_20_2" text:outline-level="2"><text:bookmark-start text:name="make-script-executable"/>Make Script Executable<text:bookmark-end text:name="make-script-executable"/></text:h>
      <text:p text:style-name="First_20_paragraph">Before using the script:</text:p>
      <text:p text:style-name="Preformatted_20_Text">
<text:span text:style-name="FunctionTok">chmod</text:span><text:span text:style-name="NormalTok"><text:s text:c="1"/>+x createUser.sh</text:span>
</text:p>
      <text:h text:style-name="Heading_20_2" text:outline-level="2"><text:bookmark-start text:name="understanding-script-arguments"/>Understanding Script Arguments<text:bookmark-end text:name="understanding-script-arguments"/></text:h>
      <text:p text:style-name="First_20_paragraph">The script requires THREE arguments:</text:p>
      <table:table table:name="Table49" table:style-name="Table49">
        <table:table-column table:style-name="Table49.A"/>
        <table:table-column table:style-name="Table49.B"/>
        <table:table-header-rows>
          <table:table-row>
            <table:table-cell table:style-name="TableHeaderRowCell" office:value-type="string">
              <text:p text:style-name="Table_20_Heading">Argument</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username</text:p>
          </table:table-cell>
          <table:table-cell table:style-name="TableRowCell" office:value-type="string">
            <text:p text:style-name="Table_20_Contents">LDAP username</text:p>
          </table:table-cell>
        </table:table-row>
        <table:table-row>
          <table:table-cell table:style-name="TableRowCell" office:value-type="string">
            <text:p text:style-name="Table_20_Contents">uid</text:p>
          </table:table-cell>
          <table:table-cell table:style-name="TableRowCell" office:value-type="string">
            <text:p text:style-name="Table_20_Contents">UNIX UID</text:p>
          </table:table-cell>
        </table:table-row>
        <table:table-row>
          <table:table-cell table:style-name="TableRowCell" office:value-type="string">
            <text:p text:style-name="Table_20_Contents">gid</text:p>
          </table:table-cell>
          <table:table-cell table:style-name="TableRowCell" office:value-type="string">
            <text:p text:style-name="Table_20_Contents">UNIX GID</text:p>
          </table:table-cell>
        </table:table-row>
      </table:table>
      <text:p text:style-name="First_20_paragraph">Syntax:</text:p>
      <text:p text:style-name="Preformatted_20_Text">
<text:span text:style-name="ExtensionTok">./createUser.sh</text:span><text:span text:style-name="NormalTok"><text:s text:c="1"/></text:span><text:span text:style-name="OperatorTok">&lt;</text:span><text:span text:style-name="NormalTok">username</text:span><text:span text:style-name="OperatorTok">&gt;</text:span><text:span text:style-name="NormalTok"><text:s text:c="1"/></text:span><text:span text:style-name="OperatorTok">&lt;</text:span><text:span text:style-name="NormalTok">uid</text:span><text:span text:style-name="OperatorTok">&gt;</text:span><text:span text:style-name="NormalTok"><text:s text:c="1"/></text:span><text:span text:style-name="OperatorTok">&lt;</text:span><text:span text:style-name="NormalTok">gid</text:span><text:span text:style-name="OperatorTok">&gt;</text:span>
</text:p>
      <text:p text:style-name="First_20_paragraph">Example:</text:p>
      <text:p text:style-name="Preformatted_20_Text">
<text:span text:style-name="ExtensionTok">./createUser.sh</text:span><text:span text:style-name="NormalTok"><text:s text:c="1"/>student01 11001 11001</text:span>
</text:p>
      <text:p text:style-name="First_20_paragraph">Explanation:</text:p>
      <table:table table:name="Table50" table:style-name="Table50">
        <table:table-column table:style-name="Table50.A"/>
        <table:table-column table:style-name="Table50.B"/>
        <table:table-header-rows>
          <table:table-row>
            <table:table-cell table:style-name="TableHeaderRowCell" office:value-type="string">
              <text:p text:style-name="Table_20_Heading">Value</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student01</text:p>
          </table:table-cell>
          <table:table-cell table:style-name="TableRowCell" office:value-type="string">
            <text:p text:style-name="Table_20_Contents">username</text:p>
          </table:table-cell>
        </table:table-row>
        <table:table-row>
          <table:table-cell table:style-name="TableRowCell" office:value-type="string">
            <text:p text:style-name="Table_20_Contents">11001</text:p>
          </table:table-cell>
          <table:table-cell table:style-name="TableRowCell" office:value-type="string">
            <text:p text:style-name="Table_20_Contents">UID</text:p>
          </table:table-cell>
        </table:table-row>
        <table:table-row>
          <table:table-cell table:style-name="TableRowCell" office:value-type="string">
            <text:p text:style-name="Table_20_Contents">11001</text:p>
          </table:table-cell>
          <table:table-cell table:style-name="TableRowCell" office:value-type="string">
            <text:p text:style-name="Table_20_Contents">GID</text:p>
          </table:table-cell>
        </table:table-row>
      </table:table>
      <text:p text:style-name="First_20_paragraph">IMPORTANT:</text:p>
      <text:p text:style-name="P468">The script creates a private group automatically.</text:p>
      <text:p text:style-name="P469"/>
      <text:p text:style-name="P470">Therefore username and group name become identical.</text:p>
      <text:p text:style-name="First_20_paragraph">Example:</text:p>
      <table:table table:name="Table51" table:style-name="Table51">
        <table:table-column table:style-name="Table51.A"/>
        <table:table-column table:style-name="Table51.B"/>
        <table:table-header-rows>
          <table:table-row>
            <table:table-cell table:style-name="TableHeaderRowCell" office:value-type="string">
              <text:p text:style-name="Table_20_Heading">Entity</text:p>
            </table:table-cell>
            <table:table-cell table:style-name="TableHeaderRowCell" office:value-type="string">
              <text:p text:style-name="Table_20_Heading">Created Automatically</text:p>
            </table:table-cell>
          </table:table-row>
        </table:table-header-rows>
        <table:table-row>
          <table:table-cell table:style-name="TableRowCell" office:value-type="string">
            <text:p text:style-name="Table_20_Contents">User</text:p>
          </table:table-cell>
          <table:table-cell table:style-name="TableRowCell" office:value-type="string">
            <text:p text:style-name="Table_20_Contents">student01</text:p>
          </table:table-cell>
        </table:table-row>
        <table:table-row>
          <table:table-cell table:style-name="TableRowCell" office:value-type="string">
            <text:p text:style-name="Table_20_Contents">Group</text:p>
          </table:table-cell>
          <table:table-cell table:style-name="TableRowCell" office:value-type="string">
            <text:p text:style-name="Table_20_Contents">student01</text:p>
          </table:table-cell>
        </table:table-row>
        <table:table-row>
          <table:table-cell table:style-name="TableRowCell" office:value-type="string">
            <text:p text:style-name="Table_20_Contents">Home Directory</text:p>
          </table:table-cell>
          <table:table-cell table:style-name="TableRowCell" office:value-type="string">
            <text:p text:style-name="Table_20_Contents">/home/student01</text:p>
          </table:table-cell>
        </table:table-row>
      </table:table>
      <text:h text:style-name="Heading_20_2" text:outline-level="2"><text:bookmark-start text:name="default-password-format"/>Default Password Format<text:bookmark-end text:name="default-password-format"/></text:h>
      <text:p text:style-name="First_20_paragraph">The script automatically creates password using:</text:p>
      <text:p text:style-name="P471">username@@123</text:p>
      <text:p text:style-name="First_20_paragraph">Example:</text:p>
      <table:table table:name="Table52" table:style-name="Table52">
        <table:table-column table:style-name="Table52.A"/>
        <table:table-column table:style-name="Table52.B"/>
        <table:table-header-rows>
          <table:table-row>
            <table:table-cell table:style-name="TableHeaderRowCell" office:value-type="string">
              <text:p text:style-name="Table_20_Heading">Username</text:p>
            </table:table-cell>
            <table:table-cell table:style-name="TableHeaderRowCell" office:value-type="string">
              <text:p text:style-name="Table_20_Heading">Password</text:p>
            </table:table-cell>
          </table:table-row>
        </table:table-header-rows>
        <table:table-row>
          <table:table-cell table:style-name="TableRowCell" office:value-type="string">
            <text:p text:style-name="Table_20_Contents">student01</text:p>
          </table:table-cell>
          <table:table-cell table:style-name="TableRowCell" office:value-type="string">
            <text:p text:style-name="Table_20_Contents">student01@@123</text:p>
          </table:table-cell>
        </table:table-row>
        <table:table-row>
          <table:table-cell table:style-name="TableRowCell" office:value-type="string">
            <text:p text:style-name="Table_20_Contents">student02</text:p>
          </table:table-cell>
          <table:table-cell table:style-name="TableRowCell" office:value-type="string">
            <text:p text:style-name="Table_20_Contents">student02@@123</text:p>
          </table:table-cell>
        </table:table-row>
      </table:table>
      <text:p text:style-name="First_20_paragraph">IMPORTANT:</text:p>
      <text:p text:style-name="P472">Users should change password after first login.</text:p>
      <text:h text:style-name="Heading_20_2" text:outline-level="2"><text:bookmark-start text:name="what-the-script-automatically-does"/>What the Script Automatically Does<text:bookmark-end text:name="what-the-script-automatically-does"/></text:h>
      <text:p text:style-name="First_20_paragraph">The script performs following operations automatically:</text:p>
      <table:table table:name="Table53" table:style-name="Table53">
        <table:table-column table:style-name="Table53.A"/>
        <table:table-column table:style-name="Table53.B"/>
        <table:table-header-rows>
          <table:table-row>
            <table:table-cell table:style-name="TableHeaderRowCell" office:value-type="string">
              <text:p text:style-name="Table_20_Heading">Opera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Check existing user</text:p>
          </table:table-cell>
          <table:table-cell table:style-name="TableRowCell" office:value-type="string">
            <text:p text:style-name="Table_20_Contents">avoids duplicate users</text:p>
          </table:table-cell>
        </table:table-row>
        <table:table-row>
          <table:table-cell table:style-name="TableRowCell" office:value-type="string">
            <text:p text:style-name="Table_20_Contents">Check existing group</text:p>
          </table:table-cell>
          <table:table-cell table:style-name="TableRowCell" office:value-type="string">
            <text:p text:style-name="Table_20_Contents">avoids duplicate groups</text:p>
          </table:table-cell>
        </table:table-row>
        <table:table-row>
          <table:table-cell table:style-name="TableRowCell" office:value-type="string">
            <text:p text:style-name="Table_20_Contents">Generate password hash</text:p>
          </table:table-cell>
          <table:table-cell table:style-name="TableRowCell" office:value-type="string">
            <text:p text:style-name="Table_20_Contents">secure LDAP password</text:p>
          </table:table-cell>
        </table:table-row>
        <table:table-row>
          <table:table-cell table:style-name="TableRowCell" office:value-type="string">
            <text:p text:style-name="Table_20_Contents">Create LDAP group LDIF</text:p>
          </table:table-cell>
          <table:table-cell table:style-name="TableRowCell" office:value-type="string">
            <text:p text:style-name="Table_20_Contents">automatic</text:p>
          </table:table-cell>
        </table:table-row>
        <table:table-row>
          <table:table-cell table:style-name="TableRowCell" office:value-type="string">
            <text:p text:style-name="Table_20_Contents">Create LDAP user LDIF</text:p>
          </table:table-cell>
          <table:table-cell table:style-name="TableRowCell" office:value-type="string">
            <text:p text:style-name="Table_20_Contents">automatic</text:p>
          </table:table-cell>
        </table:table-row>
        <table:table-row>
          <table:table-cell table:style-name="TableRowCell" office:value-type="string">
            <text:p text:style-name="Table_20_Contents">Add LDAP group</text:p>
          </table:table-cell>
          <table:table-cell table:style-name="TableRowCell" office:value-type="string">
            <text:p text:style-name="Table_20_Contents">automatic</text:p>
          </table:table-cell>
        </table:table-row>
        <table:table-row>
          <table:table-cell table:style-name="TableRowCell" office:value-type="string">
            <text:p text:style-name="Table_20_Contents">Add LDAP user</text:p>
          </table:table-cell>
          <table:table-cell table:style-name="TableRowCell" office:value-type="string">
            <text:p text:style-name="Table_20_Contents">automatic</text:p>
          </table:table-cell>
        </table:table-row>
      </table:table>
      <text:h text:style-name="Heading_20_2" text:outline-level="2"><text:bookmark-start text:name="example-user-creation"/>Example User Creation<text:bookmark-end text:name="example-user-creation"/></text:h>
      <text:p text:style-name="First_20_paragraph">Example:</text:p>
      <text:p text:style-name="Preformatted_20_Text">
<text:span text:style-name="ExtensionTok">./createUser.sh</text:span><text:span text:style-name="NormalTok"><text:s text:c="1"/>student02 11002 11002</text:span>
</text:p>
      <text:p text:style-name="First_20_paragraph">Expected output:</text:p>
      <text:p text:style-name="P473">==================================</text:p>
      <text:p text:style-name="P474">Creating LDAP User</text:p>
      <text:p text:style-name="P475">==================================</text:p>
      <text:p text:style-name="P476">Username : student02</text:p>
      <text:p text:style-name="P477">UID <text:s text:c="5"/>: 11002</text:p>
      <text:p text:style-name="P478">GID <text:s text:c="5"/>: 11002</text:p>
      <text:p text:style-name="P479">==================================</text:p>
      <text:p text:style-name="First_20_paragraph">LDAP admin password will be requested.</text:p>
      <text:p text:style-name="Text_20_body">After successful creation:</text:p>
      <text:p text:style-name="P480">==================================</text:p>
      <text:p text:style-name="P481">LDAP User Created Successfully</text:p>
      <text:p text:style-name="P482">==================================</text:p>
      <text:p text:style-name="P483">Username : student02</text:p>
      <text:p text:style-name="P484">Password : student02@@123</text:p>
      <text:p text:style-name="P485">UID <text:s text:c="5"/>: 11002</text:p>
      <text:p text:style-name="P486">GID <text:s text:c="5"/>: 11002</text:p>
      <text:p text:style-name="P487">==================================</text:p>
      <text:h text:style-name="Heading_20_2" text:outline-level="2"><text:bookmark-start text:name="verify-user-creation"/>Verify User Creation<text:bookmark-end text:name="verify-user-creation"/></text:h>
      <text:p text:style-name="First_20_paragraph">Verify user using:</text:p>
      <text:p text:style-name="Preformatted_20_Text">
<text:span text:style-name="FunctionTok">getent</text:span><text:span text:style-name="NormalTok"><text:s text:c="1"/>passwd student02</text:span>
</text:p>
      <text:p text:style-name="First_20_paragraph">or:</text:p>
      <text:p text:style-name="Preformatted_20_Text">
<text:span text:style-name="FunctionTok">id</text:span><text:span text:style-name="NormalTok"><text:s text:c="1"/>student02</text:span>
</text:p>
      <text:p text:style-name="First_20_paragraph">Expected:</text:p>
      <text:p text:style-name="P488">uid=11002(student02)</text:p>
      <text:p text:style-name="First_20_paragraph">Verify LDAP entry:</text:p>
      <text:p text:style-name="Preformatted_20_Text">
<text:span text:style-name="ExtensionTok">ldapsearch</text:span><text:span text:style-name="NormalTok"><text:s text:c="1"/></text:span><text:span text:style-name="AttributeTok">-x</text:span><text:span text:style-name="NormalTok"><text:s text:c="1"/></text:span><text:span text:style-name="DataTypeTok">\</text:span>
</text:p>
      <text:p text:style-name="Preformatted_20_Text">
<text:span text:style-name="NormalTok">-b </text:span><text:span text:style-name="StringTok">"dc=hpc,dc=local"</text:span><text:span text:style-name="NormalTok"><text:s text:c="1"/>uid=student02</text:span>
</text:p>
      <text:h text:style-name="Heading_20_2" text:outline-level="2"><text:bookmark-start text:name="verify-login"/>Verify Login<text:bookmark-end text:name="verify-login"/></text:h>
      <text:p text:style-name="First_20_paragraph">Test login:</text:p>
      <text:p text:style-name="Preformatted_20_Text">
<text:span text:style-name="FunctionTok">su</text:span><text:span text:style-name="NormalTok"><text:s text:c="1"/></text:span><text:span text:style-name="AttributeTok">-</text:span><text:span text:style-name="NormalTok"><text:s text:c="1"/>student02</text:span>
</text:p>
      <text:p text:style-name="First_20_paragraph">or:</text:p>
      <text:p text:style-name="Preformatted_20_Text">
<text:span text:style-name="FunctionTok">ssh</text:span><text:span text:style-name="NormalTok"><text:s text:c="1"/>student02@login</text:span>
</text:p>
      <text:p text:style-name="First_20_paragraph">Expected:</text:p>
      <text:p text:style-name="P489">successful login</text:p>
      <text:h text:style-name="Heading_20_2" text:outline-level="2"><text:bookmark-start text:name="important-uidgid-notes"/>Important UID/GID Notes<text:bookmark-end text:name="important-uidgid-notes"/></text:h>
      <text:p text:style-name="First_20_paragraph">IMPORTANT:</text:p>
      <text:p text:style-name="P490">UID and GID values must remain unique cluster-wide.</text:p>
      <text:p text:style-name="First_20_paragraph">Avoid:</text:p>
      <text:list text:style-name="L129">
        <text:list-item>
          <text:p text:style-name="P491">duplicate UID</text:p>
        </text:list-item>
        <text:list-item>
          <text:p text:style-name="P491">duplicate GID</text:p>
        </text:list-item>
      </text:list>
      <text:p text:style-name="First_20_paragraph">because duplicate IDs can create:</text:p>
      <text:list text:style-name="L130">
        <text:list-item>
          <text:p text:style-name="P492">ownership conflicts</text:p>
        </text:list-item>
        <text:list-item>
          <text:p text:style-name="P492">wrong usernames</text:p>
        </text:list-item>
        <text:list-item>
          <text:p text:style-name="P492">incorrect file ownership</text:p>
        </text:list-item>
        <text:list-item>
          <text:p text:style-name="P492">Slurm identity problems</text:p>
        </text:list-item>
      </text:list>
      <text:p text:style-name="First_20_paragraph">Example of BAD configuration:</text:p>
      <table:table table:name="Table54" table:style-name="Table54">
        <table:table-column table:style-name="Table54.A"/>
        <table:table-column table:style-name="Table54.B"/>
        <table:table-header-rows>
          <table:table-row>
            <table:table-cell table:style-name="TableHeaderRowCell" office:value-type="string">
              <text:p text:style-name="Table_20_Heading">User</text:p>
            </table:table-cell>
            <table:table-cell table:style-name="TableHeaderRowCell" office:value-type="string">
              <text:p text:style-name="Table_20_Heading">UID</text:p>
            </table:table-cell>
          </table:table-row>
        </table:table-header-rows>
        <table:table-row>
          <table:table-cell table:style-name="TableRowCell" office:value-type="string">
            <text:p text:style-name="Table_20_Contents">student01</text:p>
          </table:table-cell>
          <table:table-cell table:style-name="TableRowCell" office:value-type="string">
            <text:p text:style-name="Table_20_Contents">11001</text:p>
          </table:table-cell>
        </table:table-row>
        <table:table-row>
          <table:table-cell table:style-name="TableRowCell" office:value-type="string">
            <text:p text:style-name="Table_20_Contents">student02</text:p>
          </table:table-cell>
          <table:table-cell table:style-name="TableRowCell" office:value-type="string">
            <text:p text:style-name="Table_20_Contents">11001</text:p>
          </table:table-cell>
        </table:table-row>
      </table:table>
      <text:p text:style-name="First_20_paragraph">This can cause:</text:p>
      <text:p text:style-name="P493">whoami returning wrong username</text:p>
      <text:p text:style-name="First_20_paragraph">Always use unique UID/GID values.</text:p>
      <text:h text:style-name="Heading_20_2" text:outline-level="2"><text:bookmark-start text:name="important-hpc-identity-concept"/>Important HPC Identity Concept<text:bookmark-end text:name="important-hpc-identity-concept"/></text:h>
      <text:p text:style-name="First_20_paragraph">In HPC clusters:</text:p>
      <text:list text:style-name="L131">
        <text:list-item>
          <text:p text:style-name="P494">NFS</text:p>
        </text:list-item>
        <text:list-item>
          <text:p text:style-name="P494">Slurm</text:p>
        </text:list-item>
        <text:list-item>
          <text:p text:style-name="P494">MPI</text:p>
        </text:list-item>
        <text:list-item>
          <text:p text:style-name="P494">LDAP</text:p>
        </text:list-item>
        <text:list-item>
          <text:p text:style-name="P494">SSH</text:p>
        </text:list-item>
      </text:list>
      <text:p text:style-name="First_20_paragraph">all depend on:</text:p>
      <text:p text:style-name="P495">consistent unique UID/GID mappings</text:p>
      <text:p text:style-name="First_20_paragraph">across the entire cluster.</text:p>
      <text:p text:style-name="Text_20_body">This is one of the MOST important concepts in centralized HPC authentication.</text:p>
      <text:h text:style-name="Heading_20_1" text:outline-level="1"><text:bookmark-start text:name="automated-ldap-user-deletion-script"/>Automated LDAP User Deletion Script<text:bookmark-end text:name="automated-ldap-user-deletion-script"/></text:h>
      <text:p text:style-name="First_20_paragraph">Managing users manually using:</text:p>
      <text:list text:style-name="L132">
        <text:list-item>
          <text:p text:style-name="P496">ldapdelete</text:p>
        </text:list-item>
        <text:list-item>
          <text:p text:style-name="P496">group deletion</text:p>
        </text:list-item>
        <text:list-item>
          <text:p text:style-name="P496">home directory cleanup</text:p>
        </text:list-item>
      </text:list>
      <text:p text:style-name="First_20_paragraph">can become repetitive and error-prone.</text:p>
      <text:p text:style-name="Text_20_body">To simplify cleanup operations, an automated LDAP deletion script can be used.</text:p>
      <text:p text:style-name="Text_20_body">This script automates:</text:p>
      <text:list text:style-name="L133">
        <text:list-item>
          <text:p text:style-name="P497">LDAP user deletion</text:p>
        </text:list-item>
        <text:list-item>
          <text:p text:style-name="P497">optional LDAP group deletion</text:p>
        </text:list-item>
        <text:list-item>
          <text:p text:style-name="P497">optional home directory deletion</text:p>
        </text:list-item>
      </text:list>
      <text:p text:style-name="First_20_paragraph">IMPORTANT:</text:p>
      <text:p text:style-name="P498">The script provides interactive cleanup options</text:p>
      <text:p text:style-name="P499">for safer user management.</text:p>
      <text:h text:style-name="Heading_20_2" text:outline-level="2"><text:bookmark-start text:name="script-location-1"/>Script Location<text:bookmark-end text:name="script-location-1"/></text:h>
      <text:p text:style-name="First_20_paragraph">Example:</text:p>
      <text:p text:style-name="Preformatted_20_Text">
<text:span text:style-name="BuiltInTok">cd</text:span><text:span text:style-name="NormalTok"><text:s text:c="1"/>~/ldap-scripts</text:span>
</text:p>
      <text:p text:style-name="Preformatted_20_Text">
<text:span text:style-name="FunctionTok">ls</text:span>
</text:p>
      <text:p text:style-name="First_20_paragraph">Expected:</text:p>
      <text:p text:style-name="P500">deleteUser.sh</text:p>
      <text:h text:style-name="Heading_20_2" text:outline-level="2"><text:bookmark-start text:name="user-deletion-script"/>User Deletion Script<text:bookmark-end text:name="user-deletion-script"/></text:h>
      <text:p text:style-name="First_20_paragraph">Create file:</text:p>
      <text:p text:style-name="Preformatted_20_Text">
<text:span text:style-name="ExtensionTok">vim</text:span><text:span text:style-name="NormalTok"><text:s text:c="1"/>deleteUser.sh</text:span>
</text:p>
      <text:p text:style-name="First_20_paragraph">Paste the complete script exactly as shown below:</text:p>
      <text:p text:style-name="Preformatted_20_Text">
<text:span text:style-name="CommentTok">#!/bin/bash </text:span>
</text:p>
      <text:p text:style-name="Preformatted_20_Text">
</text:p>
      <text:p text:style-name="Preformatted_20_Text">
<text:span text:style-name="VariableTok">LDAP_ADMIN</text:span><text:span text:style-name="OperatorTok">=</text:span><text:span text:style-name="StringTok">"cn=Manager,dc=hpc,dc=local"</text:span>
</text:p>
      <text:p text:style-name="Preformatted_20_Text">
<text:span text:style-name="VariableTok">BASE_DN</text:span><text:span text:style-name="OperatorTok">=</text:span><text:span text:style-name="StringTok">"dc=hpc,dc=local"</text:span>
</text:p>
      <text:p text:style-name="Preformatted_20_Text">
</text:p>
      <text:p text:style-name="Preformatted_20_Text">
<text:span text:style-name="VariableTok">USERNAME</text:span><text:span text:style-name="OperatorTok">=</text:span><text:span text:style-name="VariableTok">$1</text:span>
</text:p>
      <text:p text:style-name="Preformatted_20_Text">
</text:p>
      <text:p text:style-name="Preformatted_20_Text">
<text:span text:style-name="ControlFlowTok">if</text:span><text:span text:style-name="NormalTok"><text:s text:c="1"/></text:span><text:span text:style-name="BuiltInTok">[</text:span><text:span text:style-name="NormalTok"><text:s text:c="1"/></text:span><text:span text:style-name="VariableTok">$#</text:span><text:span text:style-name="NormalTok"><text:s text:c="1"/></text:span><text:span text:style-name="OtherTok">-ne</text:span><text:span text:style-name="NormalTok"><text:s text:c="1"/>1 </text:span><text:span text:style-name="BuiltInTok">]</text:span><text:span text:style-name="KeywordTok">;</text:span><text:span text:style-name="NormalTok"><text:s text:c="1"/></text:span><text:span text:style-name="ControlFlowTok">then</text:span>
</text:p>
      <text:p text:style-name="Preformatted_20_Text">
<text:span text:style-name="NormalTok"><text:s text:c="4"/></text:span><text:span text:style-name="BuiltInTok">echo</text:span><text:span text:style-name="NormalTok"><text:s text:c="1"/></text:span><text:span text:style-name="StringTok">"Usage: </text:span><text:span text:style-name="VariableTok">$0</text:span><text:span text:style-name="StringTok"><text:s text:c="1"/>&lt;username&gt;"</text:span>
</text:p>
      <text:p text:style-name="Preformatted_20_Text">
<text:span text:style-name="NormalTok"><text:s text:c="4"/></text:span><text:span text:style-name="BuiltInTok">exit</text:span><text:span text:style-name="NormalTok"><text:s text:c="1"/>1</text:span>
</text:p>
      <text:p text:style-name="Preformatted_20_Text">
<text:span text:style-name="ControlFlowTok">fi</text:span>
</text:p>
      <text:p text:style-name="Preformatted_20_Text">
</text:p>
      <text:p text:style-name="Preformatted_20_Text">
<text:span text:style-name="BuiltInTok">echo</text:span>
</text:p>
      <text:p text:style-name="Preformatted_20_Text">
<text:span text:style-name="BuiltInTok">echo</text:span><text:span text:style-name="NormalTok"><text:s text:c="1"/></text:span><text:span text:style-name="StringTok">"=================================="</text:span>
</text:p>
      <text:p text:style-name="Preformatted_20_Text">
<text:span text:style-name="BuiltInTok">echo</text:span><text:span text:style-name="NormalTok"><text:s text:c="1"/></text:span><text:span text:style-name="StringTok">"Deleting LDAP User"</text:span>
</text:p>
      <text:p text:style-name="Preformatted_20_Text">
<text:span text:style-name="BuiltInTok">echo</text:span><text:span text:style-name="NormalTok"><text:s text:c="1"/></text:span><text:span text:style-name="StringTok">"=================================="</text:span>
</text:p>
      <text:p text:style-name="Preformatted_20_Text">
<text:span text:style-name="BuiltInTok">echo</text:span><text:span text:style-name="NormalTok"><text:s text:c="1"/></text:span><text:span text:style-name="StringTok">"Username : </text:span><text:span text:style-name="VariableTok">${USERNAME}</text:span><text:span text:style-name="StringTok">"</text:span>
</text:p>
      <text:p text:style-name="Preformatted_20_Text">
<text:span text:style-name="BuiltInTok">echo</text:span><text:span text:style-name="NormalTok"><text:s text:c="1"/></text:span><text:span text:style-name="StringTok">"=================================="</text:span>
</text:p>
      <text:p text:style-name="Preformatted_20_Text">
</text:p>
      <text:p text:style-name="Preformatted_20_Text">
<text:span text:style-name="BuiltInTok">echo</text:span>
</text:p>
      <text:p text:style-name="Preformatted_20_Text">
<text:span text:style-name="BuiltInTok">echo</text:span><text:span text:style-name="NormalTok"><text:s text:c="1"/></text:span><text:span text:style-name="StringTok">"Deleting LDAP user entry..."</text:span>
</text:p>
      <text:p text:style-name="Preformatted_20_Text">
</text:p>
      <text:p text:style-name="Preformatted_20_Text">
<text:span text:style-name="ExtensionTok">ldapdelete</text:span><text:span text:style-name="NormalTok"><text:s text:c="1"/></text:span><text:span text:style-name="AttributeTok">-x</text:span><text:span text:style-name="NormalTok"><text:s text:c="1"/></text:span><text:span text:style-name="DataTypeTok">\</text:span>
</text:p>
      <text:p text:style-name="Preformatted_20_Text">
<text:span text:style-name="NormalTok">-D </text:span><text:span text:style-name="StringTok">"</text:span><text:span text:style-name="VariableTok">${LDAP_ADMIN}</text:span><text:span text:style-name="StringTok">"</text:span><text:span text:style-name="NormalTok"><text:s text:c="1"/></text:span><text:span text:style-name="DataTypeTok">\</text:span>
</text:p>
      <text:p text:style-name="Preformatted_20_Text">
<text:span text:style-name="NormalTok">-W </text:span><text:span text:style-name="DataTypeTok">\</text:span>
</text:p>
      <text:p text:style-name="Preformatted_20_Text">
<text:span text:style-name="StringTok">"uid=</text:span><text:span text:style-name="VariableTok">${USERNAME}</text:span><text:span text:style-name="StringTok">,ou=People,</text:span><text:span text:style-name="VariableTok">${BASE_DN}</text:span><text:span text:style-name="StringTok">"</text:span>
</text:p>
      <text:p text:style-name="Preformatted_20_Text">
</text:p>
      <text:p text:style-name="Preformatted_20_Text">
<text:span text:style-name="ControlFlowTok">if</text:span><text:span text:style-name="NormalTok"><text:s text:c="1"/></text:span><text:span text:style-name="BuiltInTok">[</text:span><text:span text:style-name="NormalTok"><text:s text:c="1"/></text:span><text:span text:style-name="VariableTok">$?</text:span><text:span text:style-name="NormalTok"><text:s text:c="1"/></text:span><text:span text:style-name="OtherTok">-ne</text:span><text:span text:style-name="NormalTok"><text:s text:c="1"/>0 </text:span><text:span text:style-name="BuiltInTok">]</text:span><text:span text:style-name="KeywordTok">;</text:span><text:span text:style-name="NormalTok"><text:s text:c="1"/></text:span><text:span text:style-name="ControlFlowTok">then</text:span>
</text:p>
      <text:p text:style-name="Preformatted_20_Text">
<text:span text:style-name="NormalTok"><text:s text:c="4"/></text:span><text:span text:style-name="BuiltInTok">echo</text:span><text:span text:style-name="NormalTok"><text:s text:c="1"/></text:span><text:span text:style-name="StringTok">"ERROR: Failed to delete LDAP user!"</text:span>
</text:p>
      <text:p text:style-name="Preformatted_20_Text">
<text:span text:style-name="NormalTok"><text:s text:c="4"/></text:span><text:span text:style-name="BuiltInTok">exit</text:span><text:span text:style-name="NormalTok"><text:s text:c="1"/>1</text:span>
</text:p>
      <text:p text:style-name="Preformatted_20_Text">
<text:span text:style-name="ControlFlowTok">fi</text:span>
</text:p>
      <text:p text:style-name="Preformatted_20_Text">
</text:p>
      <text:p text:style-name="Preformatted_20_Text">
<text:span text:style-name="BuiltInTok">echo</text:span>
</text:p>
      <text:p text:style-name="Preformatted_20_Text">
<text:span text:style-name="BuiltInTok">echo</text:span><text:span text:style-name="NormalTok"><text:s text:c="1"/></text:span><text:span text:style-name="StringTok">"LDAP user deleted successfully."</text:span>
</text:p>
      <text:p text:style-name="Preformatted_20_Text">
</text:p>
      <text:p text:style-name="Preformatted_20_Text">
<text:span text:style-name="CommentTok"># Ask about deleting group</text:span>
</text:p>
      <text:p text:style-name="Preformatted_20_Text">
<text:span text:style-name="BuiltInTok">echo</text:span>
</text:p>
      <text:p text:style-name="Preformatted_20_Text">
<text:span text:style-name="BuiltInTok">read</text:span><text:span text:style-name="NormalTok"><text:s text:c="1"/></text:span><text:span text:style-name="AttributeTok">-p</text:span><text:span text:style-name="NormalTok"><text:s text:c="1"/></text:span><text:span text:style-name="StringTok">"Delete LDAP group '</text:span><text:span text:style-name="VariableTok">${USERNAME}</text:span><text:span text:style-name="StringTok">'? (y/n): "</text:span><text:span text:style-name="NormalTok"><text:s text:c="1"/></text:span><text:span text:style-name="VariableTok">DELETE_GROUP</text:span>
</text:p>
      <text:p text:style-name="Preformatted_20_Text">
</text:p>
      <text:p text:style-name="Preformatted_20_Text">
<text:span text:style-name="ControlFlowTok">case</text:span><text:span text:style-name="NormalTok"><text:s text:c="1"/></text:span><text:span text:style-name="VariableTok">$DELETE_GROUP</text:span><text:span text:style-name="NormalTok"><text:s text:c="1"/></text:span><text:span text:style-name="KeywordTok">in</text:span>
</text:p>
      <text:p text:style-name="Preformatted_20_Text">
<text:span text:style-name="NormalTok"><text:s text:c="4"/></text:span><text:span text:style-name="SpecialStringTok">y</text:span><text:span text:style-name="KeywordTok">|</text:span><text:span text:style-name="SpecialStringTok">Y</text:span><text:span text:style-name="KeywordTok">)</text:span>
</text:p>
      <text:p text:style-name="Preformatted_20_Text">
</text:p>
      <text:p text:style-name="Preformatted_20_Text">
<text:span text:style-name="NormalTok"><text:s text:c="8"/></text:span><text:span text:style-name="ExtensionTok">ldapdelete</text:span><text:span text:style-name="NormalTok"><text:s text:c="1"/></text:span><text:span text:style-name="AttributeTok">-x</text:span><text:span text:style-name="NormalTok"><text:s text:c="1"/></text:span><text:span text:style-name="DataTypeTok">\</text:span>
</text:p>
      <text:p text:style-name="Preformatted_20_Text">
<text:span text:style-name="NormalTok"><text:s text:c="8"/></text:span><text:span text:style-name="AttributeTok">-D</text:span><text:span text:style-name="NormalTok"><text:s text:c="1"/></text:span><text:span text:style-name="StringTok">"</text:span><text:span text:style-name="VariableTok">${LDAP_ADMIN}</text:span><text:span text:style-name="StringTok">"</text:span><text:span text:style-name="NormalTok"><text:s text:c="1"/></text:span><text:span text:style-name="DataTypeTok">\</text:span>
</text:p>
      <text:p text:style-name="Preformatted_20_Text">
<text:span text:style-name="NormalTok"><text:s text:c="8"/></text:span><text:span text:style-name="AttributeTok">-W</text:span><text:span text:style-name="NormalTok"><text:s text:c="1"/></text:span><text:span text:style-name="DataTypeTok">\</text:span>
</text:p>
      <text:p text:style-name="Preformatted_20_Text">
<text:span text:style-name="NormalTok"><text:s text:c="8"/></text:span><text:span text:style-name="StringTok">"cn=</text:span><text:span text:style-name="VariableTok">${USERNAME}</text:span><text:span text:style-name="StringTok">,ou=Groups,</text:span><text:span text:style-name="VariableTok">${BASE_DN}</text:span><text:span text:style-name="StringTok">"</text:span>
</text:p>
      <text:p text:style-name="Preformatted_20_Text">
</text:p>
      <text:p text:style-name="Preformatted_20_Text">
<text:span text:style-name="NormalTok"><text:s text:c="8"/></text:span><text:span text:style-name="ControlFlowTok">if</text:span><text:span text:style-name="NormalTok"><text:s text:c="1"/></text:span><text:span text:style-name="BuiltInTok">[</text:span><text:span text:style-name="NormalTok"><text:s text:c="1"/></text:span><text:span text:style-name="VariableTok">$?</text:span><text:span text:style-name="NormalTok"><text:s text:c="1"/></text:span><text:span text:style-name="OtherTok">-eq</text:span><text:span text:style-name="NormalTok"><text:s text:c="1"/>0 </text:span><text:span text:style-name="BuiltInTok">]</text:span><text:span text:style-name="KeywordTok">;</text:span><text:span text:style-name="NormalTok"><text:s text:c="1"/></text:span><text:span text:style-name="ControlFlowTok">then</text:span>
</text:p>
      <text:p text:style-name="Preformatted_20_Text">
<text:span text:style-name="NormalTok"><text:s text:c="12"/></text:span><text:span text:style-name="BuiltInTok">echo</text:span><text:span text:style-name="NormalTok"><text:s text:c="1"/></text:span><text:span text:style-name="StringTok">"LDAP group deleted successfully."</text:span>
</text:p>
      <text:p text:style-name="Preformatted_20_Text">
<text:span text:style-name="NormalTok"><text:s text:c="8"/></text:span><text:span text:style-name="ControlFlowTok">else</text:span>
</text:p>
      <text:p text:style-name="Preformatted_20_Text">
<text:span text:style-name="NormalTok"><text:s text:c="12"/></text:span><text:span text:style-name="BuiltInTok">echo</text:span><text:span text:style-name="NormalTok"><text:s text:c="1"/></text:span><text:span text:style-name="StringTok">"WARNING: Failed to delete LDAP group."</text:span>
</text:p>
      <text:p text:style-name="Preformatted_20_Text">
<text:span text:style-name="NormalTok"><text:s text:c="8"/></text:span><text:span text:style-name="ControlFlowTok">fi</text:span>
</text:p>
      <text:p text:style-name="Preformatted_20_Text">
<text:span text:style-name="NormalTok"><text:s text:c="8"/></text:span><text:span text:style-name="ControlFlowTok">;;</text:span>
</text:p>
      <text:p text:style-name="Preformatted_20_Text">
</text:p>
      <text:p text:style-name="Preformatted_20_Text">
<text:span text:style-name="NormalTok"><text:s text:c="4"/></text:span><text:span text:style-name="SpecialStringTok">n</text:span><text:span text:style-name="KeywordTok">|</text:span><text:span text:style-name="SpecialStringTok">N</text:span><text:span text:style-name="KeywordTok">)</text:span>
</text:p>
      <text:p text:style-name="Preformatted_20_Text">
<text:span text:style-name="NormalTok"><text:s text:c="8"/></text:span><text:span text:style-name="BuiltInTok">echo</text:span><text:span text:style-name="NormalTok"><text:s text:c="1"/></text:span><text:span text:style-name="StringTok">"Skipping LDAP group deletion."</text:span>
</text:p>
      <text:p text:style-name="Preformatted_20_Text">
<text:span text:style-name="NormalTok"><text:s text:c="8"/></text:span><text:span text:style-name="ControlFlowTok">;;</text:span>
</text:p>
      <text:p text:style-name="Preformatted_20_Text">
</text:p>
      <text:p text:style-name="Preformatted_20_Text">
<text:span text:style-name="NormalTok"><text:s text:c="4"/></text:span><text:span text:style-name="PreprocessorTok">*</text:span><text:span text:style-name="KeywordTok">)</text:span>
</text:p>
      <text:p text:style-name="Preformatted_20_Text">
<text:span text:style-name="NormalTok"><text:s text:c="8"/></text:span><text:span text:style-name="BuiltInTok">echo</text:span><text:span text:style-name="NormalTok"><text:s text:c="1"/></text:span><text:span text:style-name="StringTok">"Invalid option. Skipping group deletion."</text:span>
</text:p>
      <text:p text:style-name="Preformatted_20_Text">
<text:span text:style-name="NormalTok"><text:s text:c="8"/></text:span><text:span text:style-name="ControlFlowTok">;;</text:span>
</text:p>
      <text:p text:style-name="Preformatted_20_Text">
<text:span text:style-name="ControlFlowTok">esac</text:span>
</text:p>
      <text:p text:style-name="Preformatted_20_Text">
</text:p>
      <text:p text:style-name="Preformatted_20_Text">
<text:span text:style-name="CommentTok"># Ask about deleting home directory</text:span>
</text:p>
      <text:p text:style-name="Preformatted_20_Text">
<text:span text:style-name="BuiltInTok">echo</text:span>
</text:p>
      <text:p text:style-name="Preformatted_20_Text">
<text:span text:style-name="BuiltInTok">read</text:span><text:span text:style-name="NormalTok"><text:s text:c="1"/></text:span><text:span text:style-name="AttributeTok">-p</text:span><text:span text:style-name="NormalTok"><text:s text:c="1"/></text:span><text:span text:style-name="StringTok">"Delete home directory '/home/</text:span><text:span text:style-name="VariableTok">${USERNAME}</text:span><text:span text:style-name="StringTok">'? (y/n): "</text:span><text:span text:style-name="NormalTok"><text:s text:c="1"/></text:span><text:span text:style-name="VariableTok">DELETE_HOME</text:span>
</text:p>
      <text:p text:style-name="Preformatted_20_Text">
</text:p>
      <text:p text:style-name="Preformatted_20_Text">
<text:span text:style-name="ControlFlowTok">case</text:span><text:span text:style-name="NormalTok"><text:s text:c="1"/></text:span><text:span text:style-name="VariableTok">$DELETE_HOME</text:span><text:span text:style-name="NormalTok"><text:s text:c="1"/></text:span><text:span text:style-name="KeywordTok">in</text:span>
</text:p>
      <text:p text:style-name="Preformatted_20_Text">
<text:span text:style-name="NormalTok"><text:s text:c="4"/></text:span><text:span text:style-name="SpecialStringTok">y</text:span><text:span text:style-name="KeywordTok">|</text:span><text:span text:style-name="SpecialStringTok">Y</text:span><text:span text:style-name="KeywordTok">)</text:span>
</text:p>
      <text:p text:style-name="Preformatted_20_Text">
</text:p>
      <text:p text:style-name="Preformatted_20_Text">
<text:span text:style-name="NormalTok"><text:s text:c="8"/></text:span><text:span text:style-name="ControlFlowTok">if</text:span><text:span text:style-name="NormalTok"><text:s text:c="1"/></text:span><text:span text:style-name="BuiltInTok">[</text:span><text:span text:style-name="NormalTok"><text:s text:c="1"/></text:span><text:span text:style-name="OtherTok">-d</text:span><text:span text:style-name="NormalTok"><text:s text:c="1"/></text:span><text:span text:style-name="StringTok">"/home/</text:span><text:span text:style-name="VariableTok">${USERNAME}</text:span><text:span text:style-name="StringTok">"</text:span><text:span text:style-name="NormalTok"><text:s text:c="1"/></text:span><text:span text:style-name="BuiltInTok">]</text:span><text:span text:style-name="KeywordTok">;</text:span><text:span text:style-name="NormalTok"><text:s text:c="1"/></text:span><text:span text:style-name="ControlFlowTok">then</text:span>
</text:p>
      <text:p text:style-name="Preformatted_20_Text">
<text:span text:style-name="NormalTok"><text:s text:c="12"/></text:span><text:span text:style-name="FunctionTok">sudo</text:span><text:span text:style-name="NormalTok"><text:s text:c="1"/>rm </text:span><text:span text:style-name="AttributeTok">-rf</text:span><text:span text:style-name="NormalTok"><text:s text:c="1"/></text:span><text:span text:style-name="StringTok">"/home/</text:span><text:span text:style-name="VariableTok">${USERNAME}</text:span><text:span text:style-name="StringTok">"</text:span>
</text:p>
      <text:p text:style-name="Preformatted_20_Text">
</text:p>
      <text:p text:style-name="Preformatted_20_Text">
<text:span text:style-name="NormalTok"><text:s text:c="12"/></text:span><text:span text:style-name="ControlFlowTok">if</text:span><text:span text:style-name="NormalTok"><text:s text:c="1"/></text:span><text:span text:style-name="BuiltInTok">[</text:span><text:span text:style-name="NormalTok"><text:s text:c="1"/></text:span><text:span text:style-name="VariableTok">$?</text:span><text:span text:style-name="NormalTok"><text:s text:c="1"/></text:span><text:span text:style-name="OtherTok">-eq</text:span><text:span text:style-name="NormalTok"><text:s text:c="1"/>0 </text:span><text:span text:style-name="BuiltInTok">]</text:span><text:span text:style-name="KeywordTok">;</text:span><text:span text:style-name="NormalTok"><text:s text:c="1"/></text:span><text:span text:style-name="ControlFlowTok">then</text:span>
</text:p>
      <text:p text:style-name="Preformatted_20_Text">
<text:span text:style-name="NormalTok"><text:s text:c="16"/></text:span><text:span text:style-name="BuiltInTok">echo</text:span><text:span text:style-name="NormalTok"><text:s text:c="1"/></text:span><text:span text:style-name="StringTok">"Home directory deleted successfully."</text:span>
</text:p>
      <text:p text:style-name="Preformatted_20_Text">
<text:span text:style-name="NormalTok"><text:s text:c="12"/></text:span><text:span text:style-name="ControlFlowTok">else</text:span>
</text:p>
      <text:p text:style-name="Preformatted_20_Text">
<text:span text:style-name="NormalTok"><text:s text:c="16"/></text:span><text:span text:style-name="BuiltInTok">echo</text:span><text:span text:style-name="NormalTok"><text:s text:c="1"/></text:span><text:span text:style-name="StringTok">"WARNING: Failed to delete home directory."</text:span>
</text:p>
      <text:p text:style-name="Preformatted_20_Text">
<text:span text:style-name="NormalTok"><text:s text:c="12"/></text:span><text:span text:style-name="ControlFlowTok">fi</text:span>
</text:p>
      <text:p text:style-name="Preformatted_20_Text">
<text:span text:style-name="NormalTok"><text:s text:c="8"/></text:span><text:span text:style-name="ControlFlowTok">else</text:span>
</text:p>
      <text:p text:style-name="Preformatted_20_Text">
<text:span text:style-name="NormalTok"><text:s text:c="12"/></text:span><text:span text:style-name="BuiltInTok">echo</text:span><text:span text:style-name="NormalTok"><text:s text:c="1"/></text:span><text:span text:style-name="StringTok">"Home directory does not exist."</text:span>
</text:p>
      <text:p text:style-name="Preformatted_20_Text">
<text:span text:style-name="NormalTok"><text:s text:c="8"/></text:span><text:span text:style-name="ControlFlowTok">fi</text:span>
</text:p>
      <text:p text:style-name="Preformatted_20_Text">
<text:span text:style-name="NormalTok"><text:s text:c="8"/></text:span><text:span text:style-name="ControlFlowTok">;;</text:span>
</text:p>
      <text:p text:style-name="Preformatted_20_Text">
</text:p>
      <text:p text:style-name="Preformatted_20_Text">
<text:span text:style-name="NormalTok"><text:s text:c="4"/></text:span><text:span text:style-name="SpecialStringTok">n</text:span><text:span text:style-name="KeywordTok">|</text:span><text:span text:style-name="SpecialStringTok">N</text:span><text:span text:style-name="KeywordTok">)</text:span>
</text:p>
      <text:p text:style-name="Preformatted_20_Text">
<text:span text:style-name="NormalTok"><text:s text:c="8"/></text:span><text:span text:style-name="BuiltInTok">echo</text:span><text:span text:style-name="NormalTok"><text:s text:c="1"/></text:span><text:span text:style-name="StringTok">"Skipping home directory deletion."</text:span>
</text:p>
      <text:p text:style-name="Preformatted_20_Text">
<text:span text:style-name="NormalTok"><text:s text:c="8"/></text:span><text:span text:style-name="ControlFlowTok">;;</text:span>
</text:p>
      <text:p text:style-name="Preformatted_20_Text">
</text:p>
      <text:p text:style-name="Preformatted_20_Text">
<text:span text:style-name="NormalTok"><text:s text:c="4"/></text:span><text:span text:style-name="PreprocessorTok">*</text:span><text:span text:style-name="KeywordTok">)</text:span>
</text:p>
      <text:p text:style-name="Preformatted_20_Text">
<text:span text:style-name="NormalTok"><text:s text:c="8"/></text:span><text:span text:style-name="BuiltInTok">echo</text:span><text:span text:style-name="NormalTok"><text:s text:c="1"/></text:span><text:span text:style-name="StringTok">"Invalid option. Skipping home deletion."</text:span>
</text:p>
      <text:p text:style-name="Preformatted_20_Text">
<text:span text:style-name="NormalTok"><text:s text:c="8"/></text:span><text:span text:style-name="ControlFlowTok">;;</text:span>
</text:p>
      <text:p text:style-name="Preformatted_20_Text">
<text:span text:style-name="ControlFlowTok">esac</text:span>
</text:p>
      <text:p text:style-name="Preformatted_20_Text">
</text:p>
      <text:p text:style-name="Preformatted_20_Text">
<text:span text:style-name="BuiltInTok">echo</text:span>
</text:p>
      <text:p text:style-name="Preformatted_20_Text">
<text:span text:style-name="BuiltInTok">echo</text:span><text:span text:style-name="NormalTok"><text:s text:c="1"/></text:span><text:span text:style-name="StringTok">"=================================="</text:span>
</text:p>
      <text:p text:style-name="Preformatted_20_Text">
<text:span text:style-name="BuiltInTok">echo</text:span><text:span text:style-name="NormalTok"><text:s text:c="1"/></text:span><text:span text:style-name="StringTok">"User cleanup completed"</text:span>
</text:p>
      <text:p text:style-name="Preformatted_20_Text">
<text:span text:style-name="BuiltInTok">echo</text:span><text:span text:style-name="NormalTok"><text:s text:c="1"/></text:span><text:span text:style-name="StringTok">"=================================="</text:span>
</text:p>
      <text:h text:style-name="Heading_20_2" text:outline-level="2"><text:bookmark-start text:name="make-script-executable-1"/>Make Script Executable<text:bookmark-end text:name="make-script-executable-1"/></text:h>
      <text:p text:style-name="First_20_paragraph">Before using the script:</text:p>
      <text:p text:style-name="Preformatted_20_Text">
<text:span text:style-name="FunctionTok">chmod</text:span><text:span text:style-name="NormalTok"><text:s text:c="1"/>+x deleteUser.sh</text:span>
</text:p>
      <text:h text:style-name="Heading_20_2" text:outline-level="2"><text:bookmark-start text:name="understanding-script-arguments-1"/>Understanding Script Arguments<text:bookmark-end text:name="understanding-script-arguments-1"/></text:h>
      <text:p text:style-name="First_20_paragraph">The script requires ONE argument:</text:p>
      <table:table table:name="Table55" table:style-name="Table55">
        <table:table-column table:style-name="Table55.A"/>
        <table:table-column table:style-name="Table55.B"/>
        <table:table-header-rows>
          <table:table-row>
            <table:table-cell table:style-name="TableHeaderRowCell" office:value-type="string">
              <text:p text:style-name="Table_20_Heading">Argument</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username</text:p>
          </table:table-cell>
          <table:table-cell table:style-name="TableRowCell" office:value-type="string">
            <text:p text:style-name="Table_20_Contents">LDAP username</text:p>
          </table:table-cell>
        </table:table-row>
      </table:table>
      <text:p text:style-name="First_20_paragraph">Syntax:</text:p>
      <text:p text:style-name="Preformatted_20_Text">
<text:span text:style-name="ExtensionTok">./deleteUser.sh</text:span><text:span text:style-name="NormalTok"><text:s text:c="1"/></text:span><text:span text:style-name="OperatorTok">&lt;</text:span><text:span text:style-name="NormalTok">username</text:span><text:span text:style-name="OperatorTok">&gt;</text:span>
</text:p>
      <text:p text:style-name="First_20_paragraph">Example:</text:p>
      <text:p text:style-name="Preformatted_20_Text">
<text:span text:style-name="ExtensionTok">./deleteUser.sh</text:span><text:span text:style-name="NormalTok"><text:s text:c="1"/>student02</text:span>
</text:p>
      <text:h text:style-name="Heading_20_2" text:outline-level="2"><text:bookmark-start text:name="what-the-script-automatically-does-1"/>What the Script Automatically Does<text:bookmark-end text:name="what-the-script-automatically-does-1"/></text:h>
      <text:p text:style-name="First_20_paragraph">The script performs following operations automatically:</text:p>
      <table:table table:name="Table56" table:style-name="Table56">
        <table:table-column table:style-name="Table56.A"/>
        <table:table-column table:style-name="Table56.B"/>
        <table:table-header-rows>
          <table:table-row>
            <table:table-cell table:style-name="TableHeaderRowCell" office:value-type="string">
              <text:p text:style-name="Table_20_Heading">Opera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Delete LDAP user</text:p>
          </table:table-cell>
          <table:table-cell table:style-name="TableRowCell" office:value-type="string">
            <text:p text:style-name="Table_20_Contents">removes LDAP account</text:p>
          </table:table-cell>
        </table:table-row>
        <table:table-row>
          <table:table-cell table:style-name="TableRowCell" office:value-type="string">
            <text:p text:style-name="Table_20_Contents">Optional group deletion</text:p>
          </table:table-cell>
          <table:table-cell table:style-name="TableRowCell" office:value-type="string">
            <text:p text:style-name="Table_20_Contents">removes LDAP group if requested</text:p>
          </table:table-cell>
        </table:table-row>
        <table:table-row>
          <table:table-cell table:style-name="TableRowCell" office:value-type="string">
            <text:p text:style-name="Table_20_Contents">Optional home deletion</text:p>
          </table:table-cell>
          <table:table-cell table:style-name="TableRowCell" office:value-type="string">
            <text:p text:style-name="Table_20_Contents">removes user home if requested</text:p>
          </table:table-cell>
        </table:table-row>
        <table:table-row>
          <table:table-cell table:style-name="TableRowCell" office:value-type="string">
            <text:p text:style-name="Table_20_Contents">Interactive confirmation</text:p>
          </table:table-cell>
          <table:table-cell table:style-name="TableRowCell" office:value-type="string">
            <text:p text:style-name="Table_20_Contents">prevents accidental cleanup</text:p>
          </table:table-cell>
        </table:table-row>
      </table:table>
      <text:h text:style-name="Heading_20_2" text:outline-level="2"><text:bookmark-start text:name="example-user-deletion"/>Example User Deletion<text:bookmark-end text:name="example-user-deletion"/></text:h>
      <text:p text:style-name="First_20_paragraph">Example:</text:p>
      <text:p text:style-name="Preformatted_20_Text">
<text:span text:style-name="ExtensionTok">./deleteUser.sh</text:span><text:span text:style-name="NormalTok"><text:s text:c="1"/>student02</text:span>
</text:p>
      <text:p text:style-name="First_20_paragraph">Expected output:</text:p>
      <text:p text:style-name="P501">==================================</text:p>
      <text:p text:style-name="P502">Deleting LDAP User</text:p>
      <text:p text:style-name="P503">==================================</text:p>
      <text:p text:style-name="P504">Username : student02</text:p>
      <text:p text:style-name="P505">==================================</text:p>
      <text:p text:style-name="First_20_paragraph">LDAP admin password will be requested.</text:p>
      <text:p text:style-name="Text_20_body">After successful deletion:</text:p>
      <text:p text:style-name="P506">LDAP user deleted successfully.</text:p>
      <text:p text:style-name="First_20_paragraph">The script then asks:</text:p>
      <text:p text:style-name="P507">Delete LDAP group 'student02'? (y/n):</text:p>
      <text:p text:style-name="First_20_paragraph">If:</text:p>
      <text:p text:style-name="P508">y</text:p>
      <text:p text:style-name="First_20_paragraph">is selected, corresponding LDAP group will also be removed.</text:p>
      <text:p text:style-name="Text_20_body">Next prompt:</text:p>
      <text:p text:style-name="P509">Delete home directory '/home/student02'? (y/n):</text:p>
      <text:p text:style-name="First_20_paragraph">If:</text:p>
      <text:p text:style-name="P510">y</text:p>
      <text:p text:style-name="First_20_paragraph">is selected, user home directory will also be deleted.</text:p>
      <text:h text:style-name="Heading_20_2" text:outline-level="2"><text:bookmark-start text:name="important-group-deletion-notes"/>Important Group Deletion Notes<text:bookmark-end text:name="important-group-deletion-notes"/></text:h>
      <text:p text:style-name="First_20_paragraph">IMPORTANT:</text:p>
      <text:p text:style-name="P511">Do NOT delete shared groups accidentally.</text:p>
      <text:p text:style-name="First_20_paragraph">Example:</text:p>
      <text:p text:style-name="P512">hpcusers</text:p>
      <text:p text:style-name="First_20_paragraph">may contain multiple users.</text:p>
      <text:p text:style-name="Text_20_body">Deleting shared groups can create:</text:p>
      <text:list text:style-name="L134">
        <text:list-item>
          <text:p text:style-name="P513">broken group mappings</text:p>
        </text:list-item>
        <text:list-item>
          <text:p text:style-name="P513">permission problems</text:p>
        </text:list-item>
        <text:list-item>
          <text:p text:style-name="P513">Slurm identity issues</text:p>
        </text:list-item>
      </text:list>
      <text:p text:style-name="First_20_paragraph">The script therefore asks confirmation before deleting groups.</text:p>
      <text:h text:style-name="Heading_20_2" text:outline-level="2"><text:bookmark-start text:name="important-home-directory-notes"/>Important Home Directory Notes<text:bookmark-end text:name="important-home-directory-notes"/></text:h>
      <text:p text:style-name="First_20_paragraph">Deleting home directories permanently removes:</text:p>
      <text:list text:style-name="L135">
        <text:list-item>
          <text:p text:style-name="P514">source codes</text:p>
        </text:list-item>
        <text:list-item>
          <text:p text:style-name="P514">job scripts</text:p>
        </text:list-item>
        <text:list-item>
          <text:p text:style-name="P514">outputs</text:p>
        </text:list-item>
        <text:list-item>
          <text:p text:style-name="P514">datasets</text:p>
        </text:list-item>
        <text:list-item>
          <text:p text:style-name="P514">SSH keys</text:p>
        </text:list-item>
        <text:list-item>
          <text:p text:style-name="P514">configuration files</text:p>
        </text:list-item>
      </text:list>
      <text:p text:style-name="First_20_paragraph">IMPORTANT:</text:p>
      <text:p text:style-name="P515">Home directory deletion is irreversible.</text:p>
      <text:p text:style-name="First_20_paragraph">Always verify before deleting.</text:p>
      <text:h text:style-name="Heading_20_2" text:outline-level="2"><text:bookmark-start text:name="verify-user-removal"/>Verify User Removal<text:bookmark-end text:name="verify-user-removal"/></text:h>
      <text:p text:style-name="First_20_paragraph">Verify deletion:</text:p>
      <text:p text:style-name="Preformatted_20_Text">
<text:span text:style-name="FunctionTok">getent</text:span><text:span text:style-name="NormalTok"><text:s text:c="1"/>passwd student02</text:span>
</text:p>
      <text:p text:style-name="First_20_paragraph">Expected:</text:p>
      <text:p text:style-name="P516">no output</text:p>
      <text:p text:style-name="First_20_paragraph">Verify LDAP entry removal:</text:p>
      <text:p text:style-name="Preformatted_20_Text">
<text:span text:style-name="ExtensionTok">ldapsearch</text:span><text:span text:style-name="NormalTok"><text:s text:c="1"/></text:span><text:span text:style-name="AttributeTok">-x</text:span><text:span text:style-name="NormalTok"><text:s text:c="1"/></text:span><text:span text:style-name="DataTypeTok">\</text:span>
</text:p>
      <text:p text:style-name="Preformatted_20_Text">
<text:span text:style-name="NormalTok">-b </text:span><text:span text:style-name="StringTok">"dc=hpc,dc=local"</text:span><text:span text:style-name="NormalTok"><text:s text:c="1"/>uid=student02</text:span>
</text:p>
      <text:p text:style-name="First_20_paragraph">Expected:</text:p>
      <text:p text:style-name="P517">no entries returned</text:p>
      <text:p text:style-name="First_20_paragraph">Verify login failure:</text:p>
      <text:p text:style-name="Preformatted_20_Text">
<text:span text:style-name="FunctionTok">su</text:span><text:span text:style-name="NormalTok"><text:s text:c="1"/></text:span><text:span text:style-name="AttributeTok">-</text:span><text:span text:style-name="NormalTok"><text:s text:c="1"/>student02</text:span>
</text:p>
      <text:p text:style-name="First_20_paragraph">Expected:</text:p>
      <text:p text:style-name="P518">user does not exist</text:p>
      <text:h text:style-name="Heading_20_2" text:outline-level="2"><text:bookmark-start text:name="important-hpc-user-management-concept"/>Important HPC User Management Concept<text:bookmark-end text:name="important-hpc-user-management-concept"/></text:h>
      <text:p text:style-name="First_20_paragraph">In centralized HPC environments:</text:p>
      <text:list text:style-name="L136">
        <text:list-item>
          <text:p text:style-name="P519">user lifecycle management</text:p>
        </text:list-item>
        <text:list-item>
          <text:p text:style-name="P519">account cleanup</text:p>
        </text:list-item>
        <text:list-item>
          <text:p text:style-name="P519">UID/GID consistency</text:p>
        </text:list-item>
        <text:list-item>
          <text:p text:style-name="P519">group management</text:p>
        </text:list-item>
      </text:list>
      <text:p text:style-name="First_20_paragraph">are critical administrative tasks.</text:p>
      <text:p text:style-name="Text_20_body">Improper deletion can create:</text:p>
      <text:list text:style-name="L137">
        <text:list-item>
          <text:p text:style-name="P520">orphaned files</text:p>
        </text:list-item>
        <text:list-item>
          <text:p text:style-name="P520">broken permissions</text:p>
        </text:list-item>
        <text:list-item>
          <text:p text:style-name="P520">Slurm scheduling issues</text:p>
        </text:list-item>
        <text:list-item>
          <text:p text:style-name="P520">incorrect ownership mappings</text:p>
        </text:list-item>
      </text:list>
      <text:p text:style-name="First_20_paragraph">Therefore automated and controlled cleanup procedures are highly important in production HPC systems.</text:p>
      <text:h text:style-name="Heading_20_1" text:outline-level="1"><text:bookmark-start text:name="automated-ldap-password-change-script"/>Automated LDAP Password Change Script<text:bookmark-end text:name="automated-ldap-password-change-script"/></text:h>
      <text:p text:style-name="First_20_paragraph">Managing passwords manually using LDIF files becomes inconvenient in centralized LDAP environments.</text:p>
      <text:p text:style-name="Text_20_body">To simplify password management, an automated password change script can be used.</text:p>
      <text:p text:style-name="Text_20_body">This script automates:</text:p>
      <text:list text:style-name="L138">
        <text:list-item>
          <text:p text:style-name="P521">LDAP password update</text:p>
        </text:list-item>
        <text:list-item>
          <text:p text:style-name="P521">password hash generation</text:p>
        </text:list-item>
        <text:list-item>
          <text:p text:style-name="P521">secure password input</text:p>
        </text:list-item>
        <text:list-item>
          <text:p text:style-name="P521">LDAP password modification</text:p>
        </text:list-item>
      </text:list>
      <text:p text:style-name="First_20_paragraph">IMPORTANT:</text:p>
      <text:p text:style-name="P522">Because authentication is centralized through LDAP,</text:p>
      <text:p text:style-name="P523">password changes automatically work cluster-wide.</text:p>
      <text:p text:style-name="First_20_paragraph">After changing password:</text:p>
      <text:list text:style-name="L139">
        <text:list-item>
          <text:p text:style-name="P524">login node recognizes new password</text:p>
        </text:list-item>
        <text:list-item>
          <text:p text:style-name="P524">compute nodes recognize new password</text:p>
        </text:list-item>
        <text:list-item>
          <text:p text:style-name="P524">master recognizes new password</text:p>
        </text:list-item>
      </text:list>
      <text:p text:style-name="First_20_paragraph">without changing anything individually on nodes.</text:p>
      <text:h text:style-name="Heading_20_2" text:outline-level="2"><text:bookmark-start text:name="script-location-2"/>Script Location<text:bookmark-end text:name="script-location-2"/></text:h>
      <text:p text:style-name="First_20_paragraph">Example:</text:p>
      <text:p text:style-name="Preformatted_20_Text">
<text:span text:style-name="BuiltInTok">cd</text:span><text:span text:style-name="NormalTok"><text:s text:c="1"/>~/ldap-scripts</text:span>
</text:p>
      <text:p text:style-name="Preformatted_20_Text">
<text:span text:style-name="FunctionTok">ls</text:span>
</text:p>
      <text:p text:style-name="First_20_paragraph">Expected:</text:p>
      <text:p text:style-name="P525">changePassword.sh</text:p>
      <text:h text:style-name="Heading_20_2" text:outline-level="2"><text:bookmark-start text:name="password-change-script"/>Password Change Script<text:bookmark-end text:name="password-change-script"/></text:h>
      <text:p text:style-name="First_20_paragraph">Create file:</text:p>
      <text:p text:style-name="Preformatted_20_Text">
<text:span text:style-name="ExtensionTok">vim</text:span><text:span text:style-name="NormalTok"><text:s text:c="1"/>changePassword.sh</text:span>
</text:p>
      <text:p text:style-name="First_20_paragraph">Paste the complete script exactly as shown below:</text:p>
      <text:p text:style-name="Preformatted_20_Text">
<text:span text:style-name="CommentTok">#!/bin/bash</text:span>
</text:p>
      <text:p text:style-name="Preformatted_20_Text">
</text:p>
      <text:p text:style-name="Preformatted_20_Text">
<text:span text:style-name="VariableTok">LDAP_ADMIN</text:span><text:span text:style-name="OperatorTok">=</text:span><text:span text:style-name="StringTok">"cn=Manager,dc=hpc,dc=local"</text:span>
</text:p>
      <text:p text:style-name="Preformatted_20_Text">
<text:span text:style-name="VariableTok">BASE_DN</text:span><text:span text:style-name="OperatorTok">=</text:span><text:span text:style-name="StringTok">"dc=hpc,dc=local"</text:span>
</text:p>
      <text:p text:style-name="Preformatted_20_Text">
</text:p>
      <text:p text:style-name="Preformatted_20_Text">
<text:span text:style-name="VariableTok">USERNAME</text:span><text:span text:style-name="OperatorTok">=</text:span><text:span text:style-name="VariableTok">$1</text:span>
</text:p>
      <text:p text:style-name="Preformatted_20_Text">
</text:p>
      <text:p text:style-name="Preformatted_20_Text">
<text:span text:style-name="ControlFlowTok">if</text:span><text:span text:style-name="NormalTok"><text:s text:c="1"/></text:span><text:span text:style-name="BuiltInTok">[</text:span><text:span text:style-name="NormalTok"><text:s text:c="1"/></text:span><text:span text:style-name="VariableTok">$#</text:span><text:span text:style-name="NormalTok"><text:s text:c="1"/></text:span><text:span text:style-name="OtherTok">-ne</text:span><text:span text:style-name="NormalTok"><text:s text:c="1"/>1 </text:span><text:span text:style-name="BuiltInTok">]</text:span><text:span text:style-name="KeywordTok">;</text:span><text:span text:style-name="NormalTok"><text:s text:c="1"/></text:span><text:span text:style-name="ControlFlowTok">then</text:span>
</text:p>
      <text:p text:style-name="Preformatted_20_Text">
<text:span text:style-name="NormalTok"><text:s text:c="4"/></text:span><text:span text:style-name="BuiltInTok">echo</text:span><text:span text:style-name="NormalTok"><text:s text:c="1"/></text:span><text:span text:style-name="StringTok">"Usage: </text:span><text:span text:style-name="VariableTok">$0</text:span><text:span text:style-name="StringTok"><text:s text:c="1"/>&lt;username&gt;"</text:span>
</text:p>
      <text:p text:style-name="Preformatted_20_Text">
<text:span text:style-name="NormalTok"><text:s text:c="4"/></text:span><text:span text:style-name="BuiltInTok">exit</text:span><text:span text:style-name="NormalTok"><text:s text:c="1"/>1</text:span>
</text:p>
      <text:p text:style-name="Preformatted_20_Text">
<text:span text:style-name="ControlFlowTok">fi</text:span>
</text:p>
      <text:p text:style-name="Preformatted_20_Text">
</text:p>
      <text:p text:style-name="Preformatted_20_Text">
<text:span text:style-name="CommentTok"># Check if user exists</text:span>
</text:p>
      <text:p text:style-name="Preformatted_20_Text">
<text:span text:style-name="VariableTok">USER_EXISTS</text:span><text:span text:style-name="OperatorTok">=</text:span><text:span text:style-name="VariableTok">$(</text:span><text:span text:style-name="ExtensionTok">ldapsearch</text:span><text:span text:style-name="NormalTok"><text:s text:c="1"/></text:span><text:span text:style-name="AttributeTok">-x</text:span><text:span text:style-name="NormalTok"><text:s text:c="1"/></text:span><text:span text:style-name="DataTypeTok">\</text:span>
</text:p>
      <text:p text:style-name="Preformatted_20_Text">
<text:span text:style-name="NormalTok">-b </text:span><text:span text:style-name="StringTok">"ou=People,</text:span><text:span text:style-name="VariableTok">${BASE_DN}</text:span><text:span text:style-name="StringTok">"</text:span><text:span text:style-name="NormalTok"><text:s text:c="1"/></text:span><text:span text:style-name="StringTok">"(uid=</text:span><text:span text:style-name="VariableTok">${USERNAME}</text:span><text:span text:style-name="StringTok">)"</text:span><text:span text:style-name="NormalTok"><text:s text:c="1"/>dn </text:span><text:span text:style-name="DataTypeTok">\</text:span>
</text:p>
      <text:p text:style-name="Preformatted_20_Text">
<text:span text:style-name="KeywordTok">|</text:span><text:span text:style-name="NormalTok"><text:s text:c="1"/></text:span><text:span text:style-name="FunctionTok">grep</text:span><text:span text:style-name="NormalTok"><text:s text:c="1"/></text:span><text:span text:style-name="StringTok">"^dn:"</text:span><text:span text:style-name="VariableTok">)</text:span>
</text:p>
      <text:p text:style-name="Preformatted_20_Text">
</text:p>
      <text:p text:style-name="Preformatted_20_Text">
<text:span text:style-name="ControlFlowTok">if</text:span><text:span text:style-name="NormalTok"><text:s text:c="1"/></text:span><text:span text:style-name="BuiltInTok">[</text:span><text:span text:style-name="NormalTok"><text:s text:c="1"/></text:span><text:span text:style-name="OtherTok">-z</text:span><text:span text:style-name="NormalTok"><text:s text:c="1"/></text:span><text:span text:style-name="StringTok">"</text:span><text:span text:style-name="VariableTok">$USER_EXISTS</text:span><text:span text:style-name="StringTok">"</text:span><text:span text:style-name="NormalTok"><text:s text:c="1"/></text:span><text:span text:style-name="BuiltInTok">]</text:span><text:span text:style-name="KeywordTok">;</text:span><text:span text:style-name="NormalTok"><text:s text:c="1"/></text:span><text:span text:style-name="ControlFlowTok">then</text:span>
</text:p>
      <text:p text:style-name="Preformatted_20_Text">
<text:span text:style-name="NormalTok"><text:s text:c="4"/></text:span><text:span text:style-name="BuiltInTok">echo</text:span><text:span text:style-name="NormalTok"><text:s text:c="1"/></text:span><text:span text:style-name="StringTok">"ERROR: User </text:span><text:span text:style-name="VariableTok">${USERNAME}</text:span><text:span text:style-name="StringTok"><text:s text:c="1"/>does not exist!"</text:span>
</text:p>
      <text:p text:style-name="Preformatted_20_Text">
<text:span text:style-name="NormalTok"><text:s text:c="4"/></text:span><text:span text:style-name="BuiltInTok">exit</text:span><text:span text:style-name="NormalTok"><text:s text:c="1"/>1</text:span>
</text:p>
      <text:p text:style-name="Preformatted_20_Text">
<text:span text:style-name="ControlFlowTok">fi</text:span>
</text:p>
      <text:p text:style-name="Preformatted_20_Text">
</text:p>
      <text:p text:style-name="Preformatted_20_Text">
<text:span text:style-name="BuiltInTok">echo</text:span>
</text:p>
      <text:p text:style-name="Preformatted_20_Text">
<text:span text:style-name="BuiltInTok">echo</text:span><text:span text:style-name="NormalTok"><text:s text:c="1"/></text:span><text:span text:style-name="StringTok">"=================================="</text:span>
</text:p>
      <text:p text:style-name="Preformatted_20_Text">
<text:span text:style-name="BuiltInTok">echo</text:span><text:span text:style-name="NormalTok"><text:s text:c="1"/></text:span><text:span text:style-name="StringTok">"LDAP Password Change"</text:span>
</text:p>
      <text:p text:style-name="Preformatted_20_Text">
<text:span text:style-name="BuiltInTok">echo</text:span><text:span text:style-name="NormalTok"><text:s text:c="1"/></text:span><text:span text:style-name="StringTok">"=================================="</text:span>
</text:p>
      <text:p text:style-name="Preformatted_20_Text">
<text:span text:style-name="BuiltInTok">echo</text:span><text:span text:style-name="NormalTok"><text:s text:c="1"/></text:span><text:span text:style-name="StringTok">"Username : </text:span><text:span text:style-name="VariableTok">${USERNAME}</text:span><text:span text:style-name="StringTok">"</text:span>
</text:p>
      <text:p text:style-name="Preformatted_20_Text">
<text:span text:style-name="BuiltInTok">echo</text:span><text:span text:style-name="NormalTok"><text:s text:c="1"/></text:span><text:span text:style-name="StringTok">"=================================="</text:span>
</text:p>
      <text:p text:style-name="Preformatted_20_Text">
</text:p>
      <text:p text:style-name="Preformatted_20_Text">
<text:span text:style-name="CommentTok"># Take password securely</text:span>
</text:p>
      <text:p text:style-name="Preformatted_20_Text">
<text:span text:style-name="BuiltInTok">echo</text:span>
</text:p>
      <text:p text:style-name="Preformatted_20_Text">
<text:span text:style-name="BuiltInTok">read</text:span><text:span text:style-name="NormalTok"><text:s text:c="1"/></text:span><text:span text:style-name="AttributeTok">-s</text:span><text:span text:style-name="NormalTok"><text:s text:c="1"/></text:span><text:span text:style-name="AttributeTok">-p</text:span><text:span text:style-name="NormalTok"><text:s text:c="1"/></text:span><text:span text:style-name="StringTok">"Enter new password: "</text:span><text:span text:style-name="NormalTok"><text:s text:c="1"/></text:span><text:span text:style-name="VariableTok">PASSWORD1</text:span>
</text:p>
      <text:p text:style-name="Preformatted_20_Text">
<text:span text:style-name="BuiltInTok">echo</text:span>
</text:p>
      <text:p text:style-name="Preformatted_20_Text">
</text:p>
      <text:p text:style-name="Preformatted_20_Text">
<text:span text:style-name="BuiltInTok">read</text:span><text:span text:style-name="NormalTok"><text:s text:c="1"/></text:span><text:span text:style-name="AttributeTok">-s</text:span><text:span text:style-name="NormalTok"><text:s text:c="1"/></text:span><text:span text:style-name="AttributeTok">-p</text:span><text:span text:style-name="NormalTok"><text:s text:c="1"/></text:span><text:span text:style-name="StringTok">"Confirm new password: "</text:span><text:span text:style-name="NormalTok"><text:s text:c="1"/></text:span><text:span text:style-name="VariableTok">PASSWORD2</text:span>
</text:p>
      <text:p text:style-name="Preformatted_20_Text">
<text:span text:style-name="BuiltInTok">echo</text:span>
</text:p>
      <text:p text:style-name="Preformatted_20_Text">
</text:p>
      <text:p text:style-name="Preformatted_20_Text">
<text:span text:style-name="CommentTok"># Check password match</text:span>
</text:p>
      <text:p text:style-name="Preformatted_20_Text">
<text:span text:style-name="ControlFlowTok">if</text:span><text:span text:style-name="NormalTok"><text:s text:c="1"/></text:span><text:span text:style-name="BuiltInTok">[</text:span><text:span text:style-name="NormalTok"><text:s text:c="1"/></text:span><text:span text:style-name="StringTok">"</text:span><text:span text:style-name="VariableTok">$PASSWORD1</text:span><text:span text:style-name="StringTok">"</text:span><text:span text:style-name="NormalTok"><text:s text:c="1"/></text:span><text:span text:style-name="OtherTok">!=</text:span><text:span text:style-name="NormalTok"><text:s text:c="1"/></text:span><text:span text:style-name="StringTok">"</text:span><text:span text:style-name="VariableTok">$PASSWORD2</text:span><text:span text:style-name="StringTok">"</text:span><text:span text:style-name="NormalTok"><text:s text:c="1"/></text:span><text:span text:style-name="BuiltInTok">]</text:span><text:span text:style-name="KeywordTok">;</text:span><text:span text:style-name="NormalTok"><text:s text:c="1"/></text:span><text:span text:style-name="ControlFlowTok">then</text:span>
</text:p>
      <text:p text:style-name="Preformatted_20_Text">
<text:span text:style-name="NormalTok"><text:s text:c="4"/></text:span><text:span text:style-name="BuiltInTok">echo</text:span>
</text:p>
      <text:p text:style-name="Preformatted_20_Text">
<text:span text:style-name="NormalTok"><text:s text:c="4"/></text:span><text:span text:style-name="BuiltInTok">echo</text:span><text:span text:style-name="NormalTok"><text:s text:c="1"/></text:span><text:span text:style-name="StringTok">"ERROR: Passwords do not match!"</text:span>
</text:p>
      <text:p text:style-name="Preformatted_20_Text">
<text:span text:style-name="NormalTok"><text:s text:c="4"/></text:span><text:span text:style-name="BuiltInTok">exit</text:span><text:span text:style-name="NormalTok"><text:s text:c="1"/>1</text:span>
</text:p>
      <text:p text:style-name="Preformatted_20_Text">
<text:span text:style-name="ControlFlowTok">fi</text:span>
</text:p>
      <text:p text:style-name="Preformatted_20_Text">
</text:p>
      <text:p text:style-name="Preformatted_20_Text">
<text:span text:style-name="CommentTok"># Generate LDAP password hash</text:span>
</text:p>
      <text:p text:style-name="Preformatted_20_Text">
<text:span text:style-name="VariableTok">PASSWORD_HASH</text:span><text:span text:style-name="OperatorTok">=</text:span><text:span text:style-name="VariableTok">$(</text:span><text:span text:style-name="ExtensionTok">slappasswd</text:span><text:span text:style-name="NormalTok"><text:s text:c="1"/></text:span><text:span text:style-name="AttributeTok">-s</text:span><text:span text:style-name="NormalTok"><text:s text:c="1"/></text:span><text:span text:style-name="StringTok">"</text:span><text:span text:style-name="VariableTok">$PASSWORD1</text:span><text:span text:style-name="StringTok">"</text:span><text:span text:style-name="VariableTok">)</text:span>
</text:p>
      <text:p text:style-name="Preformatted_20_Text">
</text:p>
      <text:p text:style-name="Preformatted_20_Text">
<text:span text:style-name="CommentTok"># Create LDIF file</text:span>
</text:p>
      <text:p text:style-name="Preformatted_20_Text">
<text:span text:style-name="FunctionTok">cat</text:span><text:span text:style-name="NormalTok"><text:s text:c="1"/></text:span><text:span text:style-name="OperatorTok">&gt;</text:span><text:span text:style-name="NormalTok"><text:s text:c="1"/>/tmp/</text:span><text:span text:style-name="VariableTok">${USERNAME}</text:span><text:span text:style-name="NormalTok">_password.ldif </text:span><text:span text:style-name="OperatorTok">&lt;&lt;EOF</text:span>
</text:p>
      <text:p text:style-name="Preformatted_20_Text">
<text:span text:style-name="StringTok">dn: uid=</text:span><text:span text:style-name="VariableTok">${USERNAME}</text:span><text:span text:style-name="StringTok">,ou=People,</text:span><text:span text:style-name="VariableTok">${BASE_DN}</text:span>
</text:p>
      <text:p text:style-name="Preformatted_20_Text">
<text:span text:style-name="StringTok">changetype: modify</text:span>
</text:p>
      <text:p text:style-name="Preformatted_20_Text">
<text:span text:style-name="StringTok">replace: userPassword</text:span>
</text:p>
      <text:p text:style-name="Preformatted_20_Text">
<text:span text:style-name="StringTok">userPassword: </text:span><text:span text:style-name="VariableTok">${PASSWORD_HASH}</text:span>
</text:p>
      <text:p text:style-name="Preformatted_20_Text">
<text:span text:style-name="OperatorTok">EOF</text:span>
</text:p>
      <text:p text:style-name="Preformatted_20_Text">
</text:p>
      <text:p text:style-name="Preformatted_20_Text">
<text:span text:style-name="BuiltInTok">echo</text:span>
</text:p>
      <text:p text:style-name="Preformatted_20_Text">
<text:span text:style-name="BuiltInTok">echo</text:span><text:span text:style-name="NormalTok"><text:s text:c="1"/></text:span><text:span text:style-name="StringTok">"Updating LDAP password..."</text:span>
</text:p>
      <text:p text:style-name="Preformatted_20_Text">
</text:p>
      <text:p text:style-name="Preformatted_20_Text">
<text:span text:style-name="ExtensionTok">ldapmodify</text:span><text:span text:style-name="NormalTok"><text:s text:c="1"/></text:span><text:span text:style-name="AttributeTok">-x</text:span><text:span text:style-name="NormalTok"><text:s text:c="1"/></text:span><text:span text:style-name="DataTypeTok">\</text:span>
</text:p>
      <text:p text:style-name="Preformatted_20_Text">
<text:span text:style-name="NormalTok">-D </text:span><text:span text:style-name="StringTok">"</text:span><text:span text:style-name="VariableTok">${LDAP_ADMIN}</text:span><text:span text:style-name="StringTok">"</text:span><text:span text:style-name="NormalTok"><text:s text:c="1"/></text:span><text:span text:style-name="DataTypeTok">\</text:span>
</text:p>
      <text:p text:style-name="Preformatted_20_Text">
<text:span text:style-name="NormalTok">-W </text:span><text:span text:style-name="DataTypeTok">\</text:span>
</text:p>
      <text:p text:style-name="Preformatted_20_Text">
<text:span text:style-name="NormalTok">-f /tmp/</text:span><text:span text:style-name="VariableTok">${USERNAME}</text:span><text:span text:style-name="NormalTok">_password.ldif</text:span>
</text:p>
      <text:p text:style-name="Preformatted_20_Text">
</text:p>
      <text:p text:style-name="Preformatted_20_Text">
<text:span text:style-name="ControlFlowTok">if</text:span><text:span text:style-name="NormalTok"><text:s text:c="1"/></text:span><text:span text:style-name="BuiltInTok">[</text:span><text:span text:style-name="NormalTok"><text:s text:c="1"/></text:span><text:span text:style-name="VariableTok">$?</text:span><text:span text:style-name="NormalTok"><text:s text:c="1"/></text:span><text:span text:style-name="OtherTok">-ne</text:span><text:span text:style-name="NormalTok"><text:s text:c="1"/>0 </text:span><text:span text:style-name="BuiltInTok">]</text:span><text:span text:style-name="KeywordTok">;</text:span><text:span text:style-name="NormalTok"><text:s text:c="1"/></text:span><text:span text:style-name="ControlFlowTok">then</text:span>
</text:p>
      <text:p text:style-name="Preformatted_20_Text">
<text:span text:style-name="NormalTok"><text:s text:c="4"/></text:span><text:span text:style-name="BuiltInTok">echo</text:span>
</text:p>
      <text:p text:style-name="Preformatted_20_Text">
<text:span text:style-name="NormalTok"><text:s text:c="4"/></text:span><text:span text:style-name="BuiltInTok">echo</text:span><text:span text:style-name="NormalTok"><text:s text:c="1"/></text:span><text:span text:style-name="StringTok">"ERROR: Failed to change password!"</text:span>
</text:p>
      <text:p text:style-name="Preformatted_20_Text">
<text:span text:style-name="NormalTok"><text:s text:c="4"/></text:span><text:span text:style-name="BuiltInTok">exit</text:span><text:span text:style-name="NormalTok"><text:s text:c="1"/>1</text:span>
</text:p>
      <text:p text:style-name="Preformatted_20_Text">
<text:span text:style-name="ControlFlowTok">fi</text:span>
</text:p>
      <text:p text:style-name="Preformatted_20_Text">
</text:p>
      <text:p text:style-name="Preformatted_20_Text">
<text:span text:style-name="BuiltInTok">echo</text:span>
</text:p>
      <text:p text:style-name="Preformatted_20_Text">
<text:span text:style-name="BuiltInTok">echo</text:span><text:span text:style-name="NormalTok"><text:s text:c="1"/></text:span><text:span text:style-name="StringTok">"=================================="</text:span>
</text:p>
      <text:p text:style-name="Preformatted_20_Text">
<text:span text:style-name="BuiltInTok">echo</text:span><text:span text:style-name="NormalTok"><text:s text:c="1"/></text:span><text:span text:style-name="StringTok">"Password updated successfully"</text:span>
</text:p>
      <text:p text:style-name="Preformatted_20_Text">
<text:span text:style-name="BuiltInTok">echo</text:span><text:span text:style-name="NormalTok"><text:s text:c="1"/></text:span><text:span text:style-name="StringTok">"=================================="</text:span>
</text:p>
      <text:p text:style-name="Preformatted_20_Text">
<text:span text:style-name="BuiltInTok">echo</text:span><text:span text:style-name="NormalTok"><text:s text:c="1"/></text:span><text:span text:style-name="StringTok">"Username : </text:span><text:span text:style-name="VariableTok">${USERNAME}</text:span><text:span text:style-name="StringTok">"</text:span>
</text:p>
      <text:p text:style-name="Preformatted_20_Text">
<text:span text:style-name="BuiltInTok">echo</text:span><text:span text:style-name="NormalTok"><text:s text:c="1"/></text:span><text:span text:style-name="StringTok">"=================================="</text:span>
</text:p>
      <text:h text:style-name="Heading_20_2" text:outline-level="2"><text:bookmark-start text:name="make-script-executable-2"/>Make Script Executable<text:bookmark-end text:name="make-script-executable-2"/></text:h>
      <text:p text:style-name="First_20_paragraph">Before using the script:</text:p>
      <text:p text:style-name="Preformatted_20_Text">
<text:span text:style-name="FunctionTok">chmod</text:span><text:span text:style-name="NormalTok"><text:s text:c="1"/>+x changePassword.sh</text:span>
</text:p>
      <text:h text:style-name="Heading_20_2" text:outline-level="2"><text:bookmark-start text:name="understanding-script-arguments-2"/>Understanding Script Arguments<text:bookmark-end text:name="understanding-script-arguments-2"/></text:h>
      <text:p text:style-name="First_20_paragraph">The script requires ONE argument:</text:p>
      <table:table table:name="Table57" table:style-name="Table57">
        <table:table-column table:style-name="Table57.A"/>
        <table:table-column table:style-name="Table57.B"/>
        <table:table-header-rows>
          <table:table-row>
            <table:table-cell table:style-name="TableHeaderRowCell" office:value-type="string">
              <text:p text:style-name="Table_20_Heading">Argument</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username</text:p>
          </table:table-cell>
          <table:table-cell table:style-name="TableRowCell" office:value-type="string">
            <text:p text:style-name="Table_20_Contents">LDAP username</text:p>
          </table:table-cell>
        </table:table-row>
      </table:table>
      <text:p text:style-name="First_20_paragraph">Syntax:</text:p>
      <text:p text:style-name="Preformatted_20_Text">
<text:span text:style-name="ExtensionTok">./changePassword.sh</text:span><text:span text:style-name="NormalTok"><text:s text:c="1"/></text:span><text:span text:style-name="OperatorTok">&lt;</text:span><text:span text:style-name="NormalTok">username</text:span><text:span text:style-name="OperatorTok">&gt;</text:span>
</text:p>
      <text:p text:style-name="First_20_paragraph">Example:</text:p>
      <text:p text:style-name="Preformatted_20_Text">
<text:span text:style-name="ExtensionTok">./changePassword.sh</text:span><text:span text:style-name="NormalTok"><text:s text:c="1"/>student01</text:span>
</text:p>
      <text:h text:style-name="Heading_20_2" text:outline-level="2"><text:bookmark-start text:name="what-the-script-automatically-does-2"/>What the Script Automatically Does<text:bookmark-end text:name="what-the-script-automatically-does-2"/></text:h>
      <text:p text:style-name="First_20_paragraph">The script performs following operations automatically:</text:p>
      <table:table table:name="Table58" table:style-name="Table58">
        <table:table-column table:style-name="Table58.A"/>
        <table:table-column table:style-name="Table58.B"/>
        <table:table-header-rows>
          <table:table-row>
            <table:table-cell table:style-name="TableHeaderRowCell" office:value-type="string">
              <text:p text:style-name="Table_20_Heading">Opera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Verify LDAP user exists</text:p>
          </table:table-cell>
          <table:table-cell table:style-name="TableRowCell" office:value-type="string">
            <text:p text:style-name="Table_20_Contents">prevents invalid modifications</text:p>
          </table:table-cell>
        </table:table-row>
        <table:table-row>
          <table:table-cell table:style-name="TableRowCell" office:value-type="string">
            <text:p text:style-name="Table_20_Contents">Secure password input</text:p>
          </table:table-cell>
          <table:table-cell table:style-name="TableRowCell" office:value-type="string">
            <text:p text:style-name="Table_20_Contents">password hidden during typing</text:p>
          </table:table-cell>
        </table:table-row>
        <table:table-row>
          <table:table-cell table:style-name="TableRowCell" office:value-type="string">
            <text:p text:style-name="Table_20_Contents">Password confirmation</text:p>
          </table:table-cell>
          <table:table-cell table:style-name="TableRowCell" office:value-type="string">
            <text:p text:style-name="Table_20_Contents">avoids typing mistakes</text:p>
          </table:table-cell>
        </table:table-row>
        <table:table-row>
          <table:table-cell table:style-name="TableRowCell" office:value-type="string">
            <text:p text:style-name="Table_20_Contents">Generate password hash</text:p>
          </table:table-cell>
          <table:table-cell table:style-name="TableRowCell" office:value-type="string">
            <text:p text:style-name="Table_20_Contents">secure LDAP password storage</text:p>
          </table:table-cell>
        </table:table-row>
        <table:table-row>
          <table:table-cell table:style-name="TableRowCell" office:value-type="string">
            <text:p text:style-name="Table_20_Contents">Modify LDAP password</text:p>
          </table:table-cell>
          <table:table-cell table:style-name="TableRowCell" office:value-type="string">
            <text:p text:style-name="Table_20_Contents">centralized password update</text:p>
          </table:table-cell>
        </table:table-row>
      </table:table>
      <text:h text:style-name="Heading_20_2" text:outline-level="2"><text:bookmark-start text:name="example-password-change"/>Example Password Change<text:bookmark-end text:name="example-password-change"/></text:h>
      <text:p text:style-name="First_20_paragraph">Example:</text:p>
      <text:p text:style-name="Preformatted_20_Text">
<text:span text:style-name="ExtensionTok">./changePassword.sh</text:span><text:span text:style-name="NormalTok"><text:s text:c="1"/>student01</text:span>
</text:p>
      <text:p text:style-name="First_20_paragraph">Expected output:</text:p>
      <text:p text:style-name="P526">==================================</text:p>
      <text:p text:style-name="P527">LDAP Password Change</text:p>
      <text:p text:style-name="P528">==================================</text:p>
      <text:p text:style-name="P529">Username : student01</text:p>
      <text:p text:style-name="P530">==================================</text:p>
      <text:p text:style-name="First_20_paragraph">The script asks:</text:p>
      <text:p text:style-name="P531">Enter new password:</text:p>
      <text:p text:style-name="First_20_paragraph">Then:</text:p>
      <text:p text:style-name="P532">Confirm new password:</text:p>
      <text:p text:style-name="First_20_paragraph">LDAP admin password will also be requested.</text:p>
      <text:p text:style-name="Text_20_body">After successful update:</text:p>
      <text:p text:style-name="P533">==================================</text:p>
      <text:p text:style-name="P534">Password updated successfully</text:p>
      <text:p text:style-name="P535">==================================</text:p>
      <text:p text:style-name="P536">Username : student01</text:p>
      <text:p text:style-name="P537">==================================</text:p>
      <text:h text:style-name="Heading_20_2" text:outline-level="2"><text:bookmark-start text:name="verify-password-change"/>Verify Password Change<text:bookmark-end text:name="verify-password-change"/></text:h>
      <text:p text:style-name="First_20_paragraph">Test login using updated password:</text:p>
      <text:p text:style-name="Preformatted_20_Text">
<text:span text:style-name="FunctionTok">su</text:span><text:span text:style-name="NormalTok"><text:s text:c="1"/></text:span><text:span text:style-name="AttributeTok">-</text:span><text:span text:style-name="NormalTok"><text:s text:c="1"/>student01</text:span>
</text:p>
      <text:p text:style-name="First_20_paragraph">or:</text:p>
      <text:p text:style-name="Preformatted_20_Text">
<text:span text:style-name="FunctionTok">ssh</text:span><text:span text:style-name="NormalTok"><text:s text:c="1"/>student01@login</text:span>
</text:p>
      <text:p text:style-name="First_20_paragraph">Expected:</text:p>
      <text:p text:style-name="P538">successful login using new password</text:p>
      <text:p text:style-name="First_20_paragraph">Because LDAP authentication is centralized, the updated password works automatically on:</text:p>
      <text:list text:style-name="L140">
        <text:list-item>
          <text:p text:style-name="P539">login node</text:p>
        </text:list-item>
        <text:list-item>
          <text:p text:style-name="P539">compute nodes</text:p>
        </text:list-item>
        <text:list-item>
          <text:p text:style-name="P539">master node</text:p>
        </text:list-item>
      </text:list>
      <text:h text:style-name="Heading_20_2" text:outline-level="2"><text:bookmark-start text:name="important-password-management-notes"/>Important Password Management Notes<text:bookmark-end text:name="important-password-management-notes"/></text:h>
      <text:p text:style-name="First_20_paragraph">IMPORTANT:</text:p>
      <text:p text:style-name="P540">LDAP stores password hashes, not plain-text passwords.</text:p>
      <text:p text:style-name="First_20_paragraph">The script automatically generates secure LDAP-compatible password hashes using:</text:p>
      <text:p text:style-name="Preformatted_20_Text">
<text:span text:style-name="ExtensionTok">slappasswd</text:span>
</text:p>
      <text:p text:style-name="First_20_paragraph">This improves security by avoiding direct plain-text password storag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ClusterSetup</dc:title>
    <dc:description>Building a mini HPC cluster environment using Rocky Linux, VirtualBox, Slurm, MPI, and OpenMP</dc:description>
    <dc:subject/>
    <meta:keyword/>
    <meta:initial-creator>Cisco Ramon</meta:initial-creator>
    <dc:creator>Cisco Ramon</dc:creator>
    <meta:creation-date>2026-05-18T02:47:09Z</meta:creation-date>
    <dc:date>2026-05-18T02:47:09Z</dc:date>
    <meta:user-defined meta:name="date" meta:value-type="string">[2026-03-14 Sat 00:35]</meta:user-defined>
    <meta:user-defined meta:name="header-includes" meta:value-type="string"/>
  </office:meta>
</office:document-meta>
</file>